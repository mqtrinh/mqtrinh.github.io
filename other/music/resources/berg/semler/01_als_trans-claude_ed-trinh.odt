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3" style:family="paragraph" style:parent-style-name="Text_20_body">
      <style:text-properties officeooo:paragraph-rsid="015168a3"/>
    </style:style>
    <style:style style:name="P4" style:family="paragraph" style:parent-style-name="Text_20_body">
      <style:text-properties officeooo:paragraph-rsid="01426698"/>
    </style:style>
    <style:style style:name="P5" style:family="paragraph" style:parent-style-name="Header">
      <style:paragraph-properties fo:text-align="center" style:justify-single-word="false"/>
      <style:text-properties fo:color="#000000" loext:opacity="100%" style:font-name="Liberation Serif" fo:font-size="11pt" fo:font-style="normal" fo:font-weight="normal" officeooo:rsid="01d8cf7c" officeooo:paragraph-rsid="01d8cf7c" style:font-size-asian="11pt" style:font-style-asian="normal" style:font-weight-asian="normal" style:font-size-complex="11pt" style:font-style-complex="normal" style:font-weight-complex="normal"/>
    </style:style>
    <style:style style:name="P6" style:family="paragraph" style:parent-style-name="Heading_20_1">
      <style:paragraph-properties fo:text-align="center" style:justify-single-word="false" fo:break-before="page"/>
      <style:text-properties fo:font-style="normal" officeooo:paragraph-rsid="01d8cf7c" style:font-style-asian="normal" style:font-style-complex="normal"/>
    </style:style>
    <style:style style:name="P7" style:family="paragraph" style:parent-style-name="Text_20_body">
      <style:text-properties fo:font-style="italic" officeooo:paragraph-rsid="01d79a69" style:font-style-asian="italic" style:font-style-complex="italic"/>
    </style:style>
    <style:style style:name="P8" style:family="paragraph" style:parent-style-name="Text_20_body">
      <style:paragraph-properties fo:text-align="center" style:justify-single-word="false"/>
      <style:text-properties fo:font-style="italic" style:font-style-asian="italic" style:font-style-complex="italic"/>
    </style:style>
    <style:style style:name="P9" style:family="paragraph" style:parent-style-name="Text_20_body">
      <style:paragraph-properties fo:text-align="center" style:justify-single-word="false" fo:break-before="page"/>
      <style:text-properties fo:font-style="italic" style:font-style-asian="italic" style:font-style-complex="italic"/>
    </style:style>
    <style:style style:name="P10" style:family="paragraph" style:parent-style-name="Text_20_body">
      <style:text-properties fo:font-style="normal" officeooo:paragraph-rsid="01d76144" style:font-style-asian="normal" style:font-style-complex="normal"/>
    </style:style>
    <style:style style:name="P11" style:family="paragraph" style:parent-style-name="Text_20_body">
      <style:paragraph-properties fo:text-align="start" style:justify-single-word="false"/>
      <style:text-properties fo:font-style="normal" officeooo:paragraph-rsid="01d76144" style:font-style-asian="normal" style:font-style-complex="normal"/>
    </style:style>
    <style:style style:name="P12" style:family="paragraph" style:parent-style-name="Text_20_body">
      <style:paragraph-properties fo:text-align="end" style:justify-single-word="false"/>
      <style:text-properties fo:font-style="normal" officeooo:paragraph-rsid="01d76144" style:font-style-asian="normal" style:font-style-complex="normal"/>
    </style:style>
    <style:style style:name="P13" style:family="paragraph" style:parent-style-name="Text_20_body">
      <style:paragraph-properties fo:text-align="center" style:justify-single-word="false"/>
      <style:text-properties officeooo:paragraph-rsid="01d76144"/>
    </style:style>
    <style:style style:name="P14" style:family="paragraph" style:parent-style-name="Text_20_body">
      <style:text-properties officeooo:paragraph-rsid="015168a3"/>
    </style:style>
    <style:style style:name="P15" style:family="paragraph" style:parent-style-name="Text_20_body">
      <style:paragraph-properties fo:text-align="start" style:justify-single-word="false"/>
      <style:text-properties officeooo:rsid="015c9c83" officeooo:paragraph-rsid="01d5b6ec"/>
    </style:style>
    <style:style style:name="P16" style:family="paragraph" style:parent-style-name="Text_20_body">
      <style:paragraph-properties fo:text-align="start" style:justify-single-word="false"/>
      <style:text-properties officeooo:rsid="01d76144" officeooo:paragraph-rsid="01d76144"/>
    </style:style>
    <style:style style:name="P17" style:family="paragraph" style:parent-style-name="Text_20_body">
      <style:paragraph-properties fo:text-align="end" style:justify-single-word="false"/>
      <style:text-properties officeooo:rsid="01d76144" officeooo:paragraph-rsid="01d76144"/>
    </style:style>
    <style:style style:name="P18" style:family="paragraph" style:parent-style-name="Text_20_body">
      <style:text-properties officeooo:paragraph-rsid="01d79a69"/>
    </style:style>
    <style:style style:name="T1" style:family="text">
      <style:text-properties fo:font-style="italic" style:font-style-asian="italic" style:font-style-complex="italic"/>
    </style:style>
    <style:style style:name="T2" style:family="text">
      <style:text-properties fo:font-style="italic" officeooo:rsid="013bfe0f" style:font-style-asian="italic" style:font-style-complex="italic"/>
    </style:style>
    <style:style style:name="T3" style:family="text">
      <style:text-properties fo:font-style="italic" officeooo:rsid="0153f6b6" style:font-style-asian="italic" style:font-style-complex="italic"/>
    </style:style>
    <style:style style:name="T4" style:family="text">
      <style:text-properties fo:font-style="italic" officeooo:rsid="01577485" style:font-style-asian="italic" style:font-style-complex="italic"/>
    </style:style>
    <style:style style:name="T5" style:family="text">
      <style:text-properties fo:font-style="italic" officeooo:rsid="0158e3a4" style:font-style-asian="italic" style:font-style-complex="italic"/>
    </style:style>
    <style:style style:name="T6" style:family="text">
      <style:text-properties fo:font-style="italic" officeooo:rsid="013a8899" style:font-style-asian="italic" style:font-style-complex="italic"/>
    </style:style>
    <style:style style:name="T7" style:family="text">
      <style:text-properties fo:font-style="italic" officeooo:rsid="0136cd54" style:font-style-asian="italic" style:font-style-complex="italic"/>
    </style:style>
    <style:style style:name="T8" style:family="text">
      <style:text-properties fo:font-style="italic" officeooo:rsid="01d79a69" style:font-style-asian="italic" style:font-style-complex="italic"/>
    </style:style>
    <style:style style:name="T9" style:family="text">
      <style:text-properties officeooo:rsid="01432a59"/>
    </style:style>
    <style:style style:name="T10" style:family="text">
      <style:text-properties fo:font-style="normal" style:font-style-asian="normal" style:font-style-complex="normal"/>
    </style:style>
    <style:style style:name="T11" style:family="text">
      <style:text-properties fo:font-style="normal" officeooo:rsid="01d6df5a" style:font-style-asian="normal" style:font-style-complex="normal"/>
    </style:style>
    <style:style style:name="T12" style:family="text">
      <style:text-properties officeooo:rsid="01d76144"/>
    </style:style>
    <style:style style:name="T13" style:family="text">
      <style:text-properties officeooo:rsid="01d79a69"/>
    </style:style>
    <style:style style:name="T14" style:family="text">
      <style:text-properties officeooo:rsid="01dc4a5a"/>
    </style:style>
    <style:style style:name="T15" style:family="text">
      <style:text-properties officeooo:rsid="01e25d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text:h>
      <text:p text:style-name="P15"><text:span text:style-name="T11"/></text:p>
      <text:p text:style-name="P15"><text:span text:style-name="T11">[</text:span><text:span text:style-name="T10">Berghof am Ossiacher See<text:line-break/>Heiligen Gestade<text:line-break/>Post Annenheim (Kärnten)</text:span><text:span text:style-name="T11">]</text:span></text:p>
      <text:p text:style-name="P15"><text:span text:style-name="T11"/></text:p>
      <text:p text:style-name="P17"><text:span text:style-name="T11">E</text:span><text:span text:style-name="T10">nde Juli 07</text:span></text:p>
      <text:p text:style-name="P16"><text:span text:style-name="T10"/></text:p>
      <text:p text:style-name="P3">O, Miss Frida, was war das für eine große Freude für mich, als Ihr lieber, langer Brief an Ihnen[?] ankam: Da stand vieles, mein altes gutes [Wissen?] hebt[?] mit großer Macht in mir auf – ich empfand ein innig ergreifendes Frohgefühl! – Doch lassen Sie [mich], liebe Frida, mit – schwieriger ergreift – nicht mir selber beginnen: [Seid?] Sie, vor etwa einem Jahr den Berg- hof verließen – so voll der Hoffnungen für die Zukunft, da begleitete ich Sie im Gedanken in Ihre geliebte Heimat – und mit einem gewissen stolzen Gedanken: ich dachte damals, es müßte mir eine Art geistige Brücke gelingen und über das „große Wasser(!)“ wölben, sie eine Fortsetzung der so schön verlaufenen Stunden auf Berghof möglich machen könnte. Ich bildete mir nämlich ein, daß ich einen so großen Anteil an Ihre Interessen – eine so große Einblick in dieselben genommen hätte, daß ich daraus auch ein gewisses Recht auf diese Interessen erworben hätte. Ich war stolz zum Beispiel, daß Sie, Miss Frida, mich [einer Mitteilung über Schwärmerei?] für würdig halten, daß Sie mit mir Ihren Plan vor der Niederschrift durchzusprechen und daß Sie es mir nach der Vollendung vorlasen – – vorübersetzen!! Mein Stolz darüber war so groß, daß ich mich den ganzen Herbst u. Winter freute eines Tages die Abschrift Ihres Schauspiels von Ihnen zugesandt zu erhalten!; denn das versprachen Sie mir ja!!! Nun können Sie, Miss Frida, sich die Enttäuschung nach den vielen Wochen – ja Monaten der Erwartung denken, als Sie gar nichts von sich hören ließen! Ich schalt mich natürlich „sentimentaler Europäer“ und sagte mir, Sie, Miss Frida, würden schon recht haben – ob es von mir unbescheiden auf meine Anteilnahme hin solche große Rechte zu fordern u. zu erwarten. Und so schwieg ich still – schämte mich so ein wenig – und hätte es in Geheimen doch nie, wie ich seit jeher gefaßt hatte, voll der größten Verehrung und Schätzung an Sie, Miss Frida!! – – – – Und nun kam Ihr Brief – – und da hörte ich, wie Sie so ganz noch die Alte wären – wie recht Sie Frida vom Berghof – jene Frida, die immer mit sich eine große [Fülle?] herumträgt – dabei stets[?] auf alles bedacht, was in der großen Welt vor sich geht, begleitet von einer kleinen Schar Ideale u. Heiligtümer. Da fühlte ich, daß mich mein innerstes Gefühl auch nicht getäuscht hat, daß meine alte Bezeichnung für Sie, Miss Frida, mehr denn je Geltung hat, daß Sie in Wahrheit „der Rosenstock aus 'wüstem' Wedekind“ sind! Nicht wahr, Sie verstehn mich, was ich damit sagen will, Sie verstehn. Daß ich Sie, Miss Frida, immer höher schätzte als die andern Amerikanerinnen, im <text:soft-page-break/>Grund genommen, ja daß mir die simpelsten Durchschnittsmenschen sind, und wären sie selbst beladen mit College Wissen und allen möglichen u. unmöglichen Wissens zweigen!! Und daß ich Sie sofort, wenn gar wegen das genug bewundernswerten Fleißes mit [Talente?], der Sie vielleicht unter die ersten Ihrer College-genossinnen einrangiert, als wegen Ihrer ganzen Persönlichkeit be-sondere, die Sie weit über die besten Ihrer Landsmänninnen – und – ich kann’s ja ruhig sagen – über die edelsten (das ist ein Ausdruck von Altenberg) Ihrer Geschlechtsgenossinnen stellt!! Das klingt nun aus als wäre es eitel Schmeichelei; doch dem ist nicht so: das ist nur eine Erfahrungstatsache: Ich bilde mir nämlich ein – und ich glaube nicht mit Unrecht – Menschenkenntnis im allgemeinen und Kenntnis der Frauenseele im besondern für besitzen und schöpfe ich tiefes Wissen, weniges und Bündigem als auf eigener Erfahrung und Auffassung; und ich kann, trotz meiner Jugend, für solche Dinge behaupten, daß ich nicht in diesen Anteilen nie getäuscht – im Gegenteil immer das Richtige getroffen habe. Darum nehmen Sie, Miss Frida, diese meine Meinungen über Ihre Person ruhig und ohne Widerrede hin – und nehmen Sie mir’s nicht allzu übel, daß ich ungefragt solches über Sie schrieb. Nun aber, ich auf[?] Ihnen das alles gesagt habe, ist’s mir wohlig ums Herz – denn das brannte mir ja schon jahrelang auf der Seele und drückte nichts schneller, als Ihnen das alles und vor der Seele weg herzusagen. – Und das tat ich hiermit!!! Verzeihung!!! </text:p>
      <text:p text:style-name="P3">Nun fragten Sie, Miss Frida, in Ihrem Brief, was ich in Musik treibe? – Hierauf bewußt ich bei Schönberg die Kontrapunktstudien und ich finde mich sehr seine Strengheit – wie ich sonst Strenge erfahrungs-gemäß zu haben. Nun geht’s auf die „Komposition“ im folgenden Halbjahr. Über Sommer soll ich fleißig arbeiten, teils Strauß’sche Kompositionen (ich muß jetzt sowieso mit eine Klaviersonate) teils Kontrapunkt wiederholen (6–8 stimmige Chöre und eine Fuge mit 3 Themen für Streichquintett u. Klavierbegleitung) – das macht mir natürlich viel Freude – und das ist ja auch nötig, denn ohne der ging’s ja nicht!! Freilich gewinnt man durch Schönbergs enormes Können einen grandiosen Überblick über die ganze Musikliteratur und ein gesammtes u. einsiges Austeilsvermögen. Und das ist gut!! Denn bei dem Vielen, was jetzt zusammenkomponiert wird u. auch von Zeitung zu Publikum gepriesen wird, um das Geschmack nun zu leicht korrumpiert. Das richtige Echte erkennt ja doch nur spät Anerkennung – und wenn es einmal früh gefeiert, ist’s gewöhnlich nur Modesache!! Die große Masse ist jetzt bei R. Wagner angelangt, das Volk gereicht!! Die Vorhang gegangenen (etwa Bach, Beethoven, Mozart), schützt sie ja auch eine weiß eine Schranke wäre, es nicht für sie. Aber ich möchte den Leuten nicht in die Seele sehn, die begeistert für einem Bach-Konzert oder einem der letzten Quartette Beethovens oder gar einer Mozartschen Arie u. Menuett applau-dieren, wie sich gelangweilt sie sind. Das zeigt sich ja an dem Deutlichsten in ihm Verständnis – besser gesagt: Unverständnis des Publikums für Brahms, der in seiner Art, dies, Claviersache, Kammermusik so gut Sinfonie, Messen etc gewiß ebenso großes wie Wagner in der Oper geleistet hat, und der seit Jahren in ihrem bei seiner immer bewunderungswürdig erscheint, jetzt eben das <text:soft-page-break/>Schicksal der Beethoven, Bach, Schubert etc. teilt der heißt: man tut begeistert!!! – Aber schon vor 10 Jahren prägte Rich. Strauß das Wort vom „verstümperten (*) [footnote: philisterhafte?] Wagnerianer“ um als den „Gefühlslosen Musik feind hinstellt, gefühlloser als jene Rasse, die immer wieder die alten Klassiker ins Treffen schicken. Denn das sind diejenigen, die bei etwas Neuem immer sagen: „Wir Wagnerianer, wir sind ja gewiß modern, und kann man nicht nachsagen, daß wir am Alten kleben“, (und wir haben doch Hugo Wolf – Bruckner dem Publikum zugänglich u. verständlich gemacht) – „aber: – – Nun jetzt ist’s eine Leistigkeit, nach diesem wunder-vollen vorbereiteten Vorernten dem Modernen, dem wirklich Neuen, und wäre er noch so groß'n. – berenztem, einen tüchtigen Schlag zu versetzen, auf den das Publikum natürlich hineinfällt – gerne hineinfällt, weil es zu ebenso ignorant und philistinös ist, als der bei Wagner angelangte Zeitungsschmierer – oder Notenkleckser!! So ergings und ergeht es allen Neuern [Wagner verhaßt], auch nach dem prügeln Sie Lebendigen – Rich. Strauß – dessen „Salome“ erfolg ja auch kein echter ist. Ich traf gestern einen kaiserlichen Rat ( ich wollte nicht [Nennspuren?] ) der steif und fest behauptete, Strauß wollte mit „Salome“ nur einen Spaß machen u. probieren ob ihm darauf auch noch die Leute hineinfallen. Ich wollte was zum „heiligem Ernst“ sagen fühlte aber, daß mir auf jene Rede hin übel würde, und verstummte – – –! Und die zivilisierte Welt wimmelt von solchen kaiserlichen Räten! – Nun geht es trotzdem verhältnismäßig dem R. Strauß u. Mahler u. Pfitzner u. selbst Max Reger beim Publikum u. der Zeitung noch gut – – weil diese alle in Wagners Fußstapfen meisterschreiten – und nun die große Anwartschaft in der Musik mitmachen – jener Anwartschung von der reinen homophonen Musik, wie sie seit Mozart u. Haydn bis Wagner fast ausnahmslos üblich ist, zur „polyphonen Musik“, wie sie vor Jahrhunderten im Kirchenstil gebräuchlich war u. deren herrlichster Vertreter Seb. Bach war. Das ist natürlich kein Rückschritt, denn man vereinigt nur die „Kunst im reinen Sinn des Wortes“ mit den modernen Mitteln. Solcher zieht sich ohnedies wie ein roter Faden durch die ganze Musik geschichte, über Beethovens beste letzte Quartette (besonders die „große Fuge“) hinweg zu Brahms' Kammermusik zu einigen im Wagners Ring, Meistersinger, Tristan, wo das gleichzeitig Ertönen mehrerer Themen, das Ineinandergreifen mehrerer Motive oft die herrlichsten Wirkungen erzielt – hinan bis zu unsern großen Modernen, bei denen sich immer kräftiger u. herrlicher zeigt, bis es in Schönberg (bis jetzt wenigstens) seinen höchsten, höchsten[?] [Grad?] der Möglichkeit erreicht hat. – Nun da wünscht ich nichts, wie so oft seit ich auf Berghof[?] bin, Sie, Miss Frida, mögen hier sein: Wie wollt' ich Ihnen all das, was ich da klanglos niederschreibe in Wahrheit, im hörbaren Leben umsetzen. Wie gern wollt' ich Ihnen „Salome“, die ich nun so genau u. fast keine vorsingen, bis Sie selbst davon begeistert wären u. deren Schönheit von Herzen liebten. Nun und endlich Schönbergs herrliche Lieder. Ich bin sicher es würde Ihnen gefallen so sehr wie vielen meiner Bekannten die wären ganz weg!! – – Oh fürchten[?] Sie nicht, daß ich vielleicht so greife weil ich Schönbergs Schüler bin. Nein, nein! Ich spräche genau so, wenn ich ihn nie gesehn hätte. Freilich mit feinen Sachen schwierigen als <text:soft-page-break/>alles, was bis jetzt da war u. man kann sie auf öfteren Hören verstehen u. genießen; dann aber wächst auch die Freude, die Begeisterung dafür ins Immense. Dafür spricht wohl auch die Aufnahme seiner Sachen hörer in 3 Konzerten die waren durchwegs musikalische Kreignisse. Der von Opernsängern veranstaltete Liederabend verlief noch am glimpflichsten. Der Erfolg war groß, die Opposition schwach. Aber nun das vom „Rosé-quartett“ gespielte Streichquartett brachte schon einen ungeheuer aufregenden Abend. Nach diesen herrlichen, fast eine Stunde während dem Werk, das ohne Unterbrechung gespielt ward, erhob sich zugleich frenetischer Applaus u. Zischen[?]: ich saß sogar wie einer der fürchten vor einem Detektiv verhaftet würde u. den Saal verlassen müsste Aber das ärgste war wohl die Aufführung der Kammersymphonie für 15 Soloinstrumente! Gleich bei Beginn erhob sich heftes Lachen bei einem Teil der „Zuschauer“, viele sprachen laut, standen auf u. verließen lärmend u. schimpfend den Saal – und hauten die Türen zu. Und als es zu Ende war begann ein Toben u. Wüten einerseits, andererseits ein Klatschen u. Schwenken u.[?] Trampeln der Begeisterung. – Es war immerhin aufregend; ich werd’s nie vergessen. – Es war freilich lange Tönern bis Schönberg wenigstens äußerlich anerkannt wie Strauß sein wird aber es wird [der Tag kommen] u. auch Amerika wird’s erleben. Freilich gehört Liebe u. Lust dazu, denn von selbst liegt einem das Verständnis nicht in den Schoß. Ich fühlte auch Mahler war in allen 3 Konzerten anwesend war u. auf die Proben mit viel Bewunderung beiwohnte – – Oh es waren genussreiche Stunden, diese Orchesterproben : 15 hervor-ragendste Musiker der Hofoper, Mahler, Schönberg, ein paar andere Opern Dirigenten u. außer mir ein paar andere Schüler Schönbergs !! – – – – – das Quartett Schönbergs, das ich zum auf auch beim Allgemeinen Musikfest in Dresden hörte, hatte sehr viel Erfolg; sonst hieß übrigens dieses Musikfest nichts besonderes, außer Strauß' „Salome“, die ich außerdem im Frühjahr in Wien schon 6 mal hörte (*) [footnote: In Wien wurde Salome niemals zur Aufführung gegeben. Unsere Oper fürchtet es nicht aufzuführen.] Schön wars!!! </text:p>
      <text:p text:style-name="P3">Nun aber nach diesem schönen Musikjahr müßt ich Ihnen, Miss Frida, das Anzeigte melden: den Wienern ist es endlich gelungen, Mahler hinauszuekeln. Einen gleichwertigen Ersatz zu finden ist unmöglich; weil Mahler eben winzig immerseitig[?] wäre. Selbst Strauß, der natürlich nicht davon denkt, nach Wien zu kommen, reicht als Opern dirigent nicht an Mahler – was besonders bei Mozart u. den Alten zutrifft. Wenige natürlich bei Wagner u. der Modernen. – – Wie wird es enden ??? Alles was wirklich musikalisch ist, be-trachtet seinen Austritt aus der Oper aufs wärmste u. treffen. Aber die Menge – der musikalische Pöbel – voran die Dümmsten aller „Musiker“: die Kritiker freuen sich ihrer großen Tat, den größten Mann des Jahrhunderts mit Schmutz beworfen zu haben, bis er angewidert u. angeekelt, der Bahn weicht. Für die andere Welt ist’s ja nur ein großes Glück!! Mahler hat von seiner Pension und von Gastspielreisen mehr als genug zum Leben u. ist nun schon für 3 Jahre auf je 8 Wochen jährlich im Contract für Amerika verbunden, wo er vor allem Parsifal u. Salome aufführen wird !!! Oh wie herrlich wird das werden!! Ich freue die an, Miss Frida, hören Sie mir das an <text:soft-page-break/>– es wird mir dann leichter werden [s]einen großen Verlust zu ertragen!! Nun wenn er etwas anderes außer aufführt, etwa eine Mozart=Oper, oder eigene Symphonien – – bitte bitte hören Sie sich an: Sie bekommen da einen Schatz mit fürs Leben – unerschöpflich und kaum je wieder erreichbar. – – Apropos: wenn ich an die heutige Aufführung seiner 6ten Symphonie denke, an diese herrlichen Alpenstimmungen – wenn so plötzlich aus der Ferne Kuhglocken ertönen – da kommt mir immer wieder unsere schöne Dobratsch-partie und [Gespräch?], als wir so lenz[?]berauscht spät Abends über das Plateau marschierten und auf die wesenden Nebel die Herdenglocken tönten – – – Aber für solche Schönheiten hätten die Wiener Hoffnung im moqu[i]erenden[?] Lächeln und Geringe-schätzung; und werden sie erst wohl fühlen, wenn unsere Oper eine bessere Operetten-Bühne u. unsere Philharmonischen Konzerte Bier-Konzerte werden. – und ich kann leicht gerechnen, der Anfang ist gemacht !! Prosit !!!</text:p>
      <text:p text:style-name="P3">Doch nun genug – nein: zuviel!! Ich hab' mich jetzt wohl zu weit fortreißen lassen – ich hoffe Sie strafen lange geduldig mich . Über Litteraturen will ich heute ausserdem auch schweigen – vielleicht ein andermal, wenn ich darf. – Was halt nur bei Ihnen vorsing geht im „Buch und Theater.“</text:p>
      <text:p text:style-name="P3">Und nun, Wien, verehrte Miss Frida; verzeihen Sie mir die Länge meines Briefs, dann die unleserliche Schreibart – die schmutzige Form, die durch das viele Korrigieren bedingt ist, und vor allem die vielleicht zu weit gegangene Offenherzigkeit – – – !</text:p>
      <text:p text:style-name="P3"/>
      <text:p text:style-name="P3">Ergebene Handküsse</text:p>
      <text:p text:style-name="P3">Alban Berg</text:p>
      <text:p text:style-name="P3"/>
      <text:p text:style-name="P3">Anbei die 3 alpenländischen Volkslieder; ich fand leider nur die 2 ersten harmonisiert u. kann aus Ihrer eigenkünstigen Aufzeichnung der 3ten den Rhythmus nicht erkennen, weshalb ich Sie eben hin zu schicken kann.</text:p>
      <text:p text:style-name="P3"/>
      <text:p text:style-name="P3">[Library of Congress stamp]</text:p>
      <text:p text:style-name="P3">[Gift, Frida Semler Seabury, 1948]</text:p>
      <text:p text:style-name="P3"/>
      <text:p text:style-name="P3"/>
      <text:h text:style-name="P6" text:outline-level="1">1</text:h>
      <text:p text:style-name="P11"/>
      <text:p text:style-name="P13"><text:span text:style-name="T4">Translat</text:span><text:span text:style-name="T5">e</text:span><text:span text:style-name="T4">d b</text:span><text:span text:style-name="T7">y Claude Sonnet </text:span><text:span text:style-name="T8">5</text:span></text:p>
      <text:p text:style-name="P13"><text:span text:style-name="T4">E</text:span><text:span text:style-name="T6">dited by </text:span><text:span text:style-name="T2">Minh-Tâ</text:span><text:span text:style-name="T3">m Quang Trinh</text:span></text:p>
      <text:p text:style-name="P10"/>
      <text:p text:style-name="P12">End of July '07</text:p>
      <text:p text:style-name="P10"/>
      <text:p text:style-name="P10">Oh, Miss Frida, what great joy it was for me when your dear, long letter arrived: so much was in it that my old, good [knowledge?] rose up in me with great force — I felt a deeply moving sense of happiness! — But let [me], dear Frida — that is harder to put into words — not begin with myself: [Since?] you left Berghof about a year ago, so full of hopes for the future, I accompanied you in my thoughts to your beloved homeland — and with a certain proud thought: I imagined at the time that I might manage to build a kind of spiritual bridge, arching over the “great water(!),” which could make possible a continuation of the hours that had passed so beautifully at Berghof. For I had imagined that I had taken so great a share in your interests — had gained so deep an insight into them — that I had thereby also earned a certain claim on them. I was proud, for example, that you, Miss Frida, considered me worthy [of being told about your enthusiasms — TRANSLATOR’S NOTE: uncertain reading], that you discussed your plan with me before writing it down, and that you read it to me once it was finished — translated it for me!! My pride in this was so great that all through the autumn and winter I looked forward to the day when you would send me a copy of your play — for you did promise me that!!! Now you can imagine, Miss Frida, my disappointment after the many weeks — indeed months — of waiting, when nothing at all was heard from you! Naturally I scolded myself as a “sentimental European” and told myself that you, Miss Frida, were probably right not to indulge me — that it was immodest of me, on the strength of my interest, to demand and expect such great privileges. And so I kept silent — felt a little ashamed — and yet, in secret, never ceased to hold you, as I always had, in the fullest reverence and esteem, Miss Frida!! — — — — And then your letter came — — and from it I heard how entirely unchanged you still were — how truly you were the Frida of Berghof — that Frida who always carries about with her a great [abundance? — uncertain reading], while always mindful of everything happening in the wide world, accompanied by a small host of ideals and sacred things. Then I felt that my innermost feeling had not deceived me after all, that my old name for you, Miss Frida, holds truer now than ever — that you really are “the rosebush out of Wedekind’s ‘wilderness.’” Is that not so — you understand what I mean by that, you understand.</text:p>
      <text:p text:style-name="P3"><text:soft-page-break/>[TRANSLATOR’S NOTE: the following stretch of the German is itself somewhat tangled/ungrammatical in the source, and the translation below follows its evident sense rather than its literal syntax.] That I have always esteemed you, Miss Frida, far above the other American women — that to me, at bottom, the simplest, most ordinary people remain simply that, even were they laden with college learning and every possible and impossible branch of knowledge!! And that I value you not so much on account of your admirable diligence and [talent? — uncertain reading], which perhaps ranks you among the foremost of your college companions, as for your whole personality, which places you far above the best of your countrywomen — and, I may say so calmly — above the noblest (this is an expression of Altenberg’s) of your sex!! This may sound like mere flattery; but it is not so — it is simply a fact of experience. For I imagine — and I believe not without reason — that I possess a knowledge of human nature in general, and of the female soul in particular, and that I draw a knowledge that is deep, if sparing and concise, from my own experience and perception; and despite my youth I can claim that in such matters I have never once been deceived — on the contrary, I have always hit upon what was right. So accept, Miss Frida, these opinions of mine about your person calmly and without objection — and do not hold it too much against me that I wrote such things about you unasked. But now that I have said all this to you, my heart feels at ease — for it had burned on my soul for years already, and nothing pressed more urgently than to speak it all out to you, straight from the soul. — And this I have now done!!! Forgive me!!!</text:p>
      <text:p text:style-name="P3">Now, you asked, Miss Frida, in your letter, what I am doing in music? — To that: [TRANSLATOR’S NOTE: this sentence is garbled in the source transcription] with Schönberg I am pursuing studies in counterpoint, and I find his strictness very much suits me — more strictness, in fact, than I am otherwise used to. Next term we move on to “composition.” Over the summer I am to work diligently — partly on Straussian compositions (in any case I now have to write a piano sonata), partly reviewing counterpoint (6–8 part choruses, and a fugue with 3 themes for string quintet with piano accompaniment) — this of course gives me great pleasure, and it is also necessary, for without it nothing would go forward!! To be sure, through Schönberg’s enormous mastery one gains a magnificent overview of the whole of musical literature, and a unified, discriminating power of judgment. And that is good!! For amid all the things now being thrown together as compositions, and praised to the public by the newspapers, taste is all too easily corrupted. The truly genuine wins recognition only late, after all — and when it is ever celebrated early, that is usually only a matter of fashion!! The great mass [of the public] has now arrived at R. Wagner — the people have caught up with him!!</text:p>
      <text:p text:style-name="P3">[TRANSLATOR’S NOTE: the following two sentences are difficult to construe in the source and are translated according to their evident general sense.] Those who have gone before (Bach, Beethoven, Mozart, say) are protected, as it were, by a barrier that does not apply <text:soft-page-break/>to them — the public does not really reach them. But I would not wish to look into the souls of those people who applaud so enthusiastically at a Bach concert, or at one of Beethoven’s late quartets, or even at a Mozart aria and minuet, and see how bored they actually are. This shows itself most clearly in the public’s understanding — or rather, lack of understanding — of Brahms, who in his own way, in piano works and chamber music quite as much as in symphonies, masses, and so forth, surely achieved something just as great as Wagner did in opera, and who, ever admirable as he has long seemed, now simply shares the fate of Beethoven, Bach, Schubert, and the rest — that is to say: people merely pretend to be enthusiastic about him!!! But already ten years ago Richard Strauss coined the phrase the “bungling(*) [philistine? — uncertain reading] Wagnerian,” casting him as an enemy of feeling in music — more unfeeling, indeed, than that breed who keep sending the old classics into the field as their excuse. For these are the very people who, faced with anything new, always say: “We Wagnerians are certainly modern, and no one can accuse us of clinging to the old” (and indeed, we did make Hugo Wolf and Bruckner accessible and comprehensible to the public) — “but — —"</text:p>
      <text:p text:style-name="P3">[TRANSLATOR’S NOTE: this sentence is heavily garbled in the source.] Now, however, it has become an easy matter, after this wonderful, well-prepared groundwork, to deal a telling blow against the modern, against what is truly new — however great it may be — given how limited the public is, a blow which the public naturally falls for, gladly falls for, because it is just as ignorant and philistine as the journalistic hack — or note-scribbler — who has only just caught up to Wagner!! So it went, and so it still goes, for all innovators [hated as Wagner once was] — even now people go on thrashing the one of them who is still living, Richard Strauss — whose success with “Salome” is, in truth, no genuine success either. Yesterday I met an Imperial Councillor (I had rather not [name him? — uncertain reading]) who insisted stubbornly that with “Salome” Strauss only meant to play a joke, to test whether people would still fall for it. I wanted to say something about its “sacred earnestness,” but felt that such talk was making me ill, and I fell silent — — —! And the civilized world swarms with such Imperial Councillors! Still, things go comparatively well for R. Strauss, Mahler, Pfitzner, and even Max Reger with the public and the press — — because all of them stride masterfully in Wagner’s footsteps —</text:p>
      <text:p text:style-name="P18">— and so now take part in the great transition under way in music: that shift from pure homophonic music, the almost universal practice from Mozart and Haydn down to Wagner, toward “polyphonic music,” as it was customary centuries ago in the church style, whose most glorious representative was Sebastian Bach. This is of course no step backward, for one is merely uniting “art in the pure sense of the word” with modern means. This thread runs, in any case, like a red line through the whole history of music — through Beethoven’s finest late quartets (especially the “Great Fugue"), onward to Brahms’s chamber music, and in places in Wagner’s Ring, Meistersinger, and Tristan, where the simultaneous sounding of <text:soft-page-break/>several themes, the interweaving of several motifs, often achieves the most glorious effects — up to our great moderns, in whom it appears ever more powerful and glorious, until in Schönberg (at least up to now) it has reached its highest, highest [degree? — uncertain reading] of possibility.</text:p>
      <text:p text:style-name="P18">Now there is nothing I wish for so much, as so often since I have been at Berghof, as that you, Miss Frida, might be here: how I should like to translate into audible, living reality all that I am setting down here soundlessly on paper. How gladly I should like to sing you “Salome” — which by now I know almost note for note — until you yourself were enraptured by it and loved its beauty with all your heart. And then, finally, Schönberg’s glorious songs. I am sure you would like them just as much as many of my acquaintances have, who were quite carried away by them!! — — Oh, do not fear that I feel this way merely because I am Schönberg’s pupil. No, no! I would speak exactly the same way even had I never met him. To be sure, with such refined things, more difficult than anything that has come before, one can only come to understand and enjoy them through repeated hearing; but then the joy, the enthusiasm for them, grows immensely as well. This is borne out, I think, by how his works were received at three concerts, all of which were veritable musical events. The song recital, given by opera singers, passed off most smoothly of the three. The success was great, the opposition weak. But then the string quartet, played by the Rosé Quartet, already made for a tremendously agitated evening. After this magnificent work, performed without interruption for almost a full hour, frenzied applause and hissing broke out at once: I sat there almost as though I feared being arrested by a detective and forced to leave the hall. But worst of all, probably, was the performance of the Chamber Symphony for 15 solo instruments! Right at the start, violent laughter broke out among part of the “audience”; many talked loudly, stood up, and left the hall noisily, cursing, slamming the doors behind them. And when it was over, raging and storming broke out on one side, and on the other, clapping, waving, and stamping of enthusiasm. — It was exciting, in any case; I shall never forget it. — It will certainly be a long time before Schönberg is even outwardly acknowledged the way Strauss is, but the day will come — and America too will live to see it. Of course it takes love and desire for it, for understanding does not fall into one’s lap by itself. I noticed, too, that Mahler was present at all three concerts and attended the rehearsals with great admiration — — Oh, what enjoyable hours those orchestra rehearsals were: 15 of the most outstanding musicians of the Court Opera, Mahler, Schönberg, a few other opera conductors, and besides myself a few other pupils of Schönberg’s!! — — — — The Schönberg quartet, which I also heard at the General Music Festival in Dresden, had great success there as well; otherwise, incidentally, this music festival offered nothing special, except for Strauss’s “Salome,” which I had in any case already heard six times that spring in Vienna (*) [footnote in source: Salome was never performed in Vienna. Our opera house is afraid to stage it. — TRANSLATOR’S NOTE: this footnote appears to contradict the main text, which states the writer heard “Salome” six times in Vienna <text:soft-page-break/>that spring; the contradiction is present in the source material itself.] It was beautiful!!!</text:p>
      <text:p text:style-name="P3">But now, after this fine year in music, I must report to you, Miss Frida, the [unwelcome] news: the Viennese have finally succeeded in disgusting Mahler into leaving. To find an equal replacement is impossible, for Mahler was simply [uniquely versatile in every respect? — uncertain reading]. Even Strauss, who of course has no thought of coming to Vienna, does not measure up to Mahler as an opera conductor — which is especially true with Mozart and the old masters, less so, naturally, with Wagner and the moderns. How will it end??? Everyone who is truly musical regards his departure from the Opera with the deepest [regret] and is profoundly affected by it. But the crowd — the musical rabble, led by the stupidest of all “musicians,” the critics — rejoices in its great achievement of having pelted the greatest man of the century with filth, until, disgusted and revolted, he yields and steps aside. For the rest of the world, it is of course nothing but great good fortune!! Mahler has more than enough to live on from his pension and from guest engagements, and is already under contract for America for three years, eight weeks each year, where above all he will conduct Parsifal and Salome!!! Oh, how splendid that will be!! [TRANSLATOR’S NOTE: the following clause is garbled in the source; possibly “I look forward to it” was intended.] I am delighted at the prospect, Miss Frida — hear me out on this — it will then be easier for me to bear so great a loss!! Now, should he conduct anything else besides — say a Mozart opera, or his own symphonies — please, please go and hear it: you will come away with a treasure for life — inexhaustible, and scarcely ever to be had again. By the way: when I think of today’s performance of his Sixth Symphony, of those wonderful Alpine moods — when cowbells suddenly sound out from far away — I am reminded again and again of our lovely excursion to the Dobratsch, and our [conversation? — uncertain reading], when, intoxicated with spring, we marched late in the evening across the plateau, while the herd-bells rang out over the drifting mists — — — But for such beauties the Viennese have only a mocking smile and contempt; and they will only come to feel it once our Opera has become little more than a glorified operetta stage, and our Philharmonic concerts mere beer-hall concerts. — And I can easily reckon that the beginning has already been made!! Prosit!!!</text:p>
      <text:p text:style-name="P3">But enough now — no: too much!! I have clearly let myself get carried away here — I hope you will punish me with long-suffering patience. About literature, too, I shall keep silent for today — perhaps another time, if I may. — [TRANSLATOR’S NOTE: the following clause is garbled in the source.] I am curious only about how things stand with you in the way of “books and theatre."</text:p>
      <text:p text:style-name="P3">And now, Vienna, honored Miss Frida; forgive me the length of my letter, then the illegible handwriting — the untidy state of the page, brought about by so much correcting — and above all, perhaps, the candor that has gone too far — — — !</text:p>
      <text:p text:style-name="P3"/>
      <text:p text:style-name="P3"><text:soft-page-break/>With devoted kisses of the hand,</text:p>
      <text:p text:style-name="P3">Alban Berg</text:p>
      <text:p text:style-name="P3"/>
      <text:p text:style-name="P3">Enclosed are the 3 Alpine folk songs; unfortunately I found only the first two harmonized, and from your own handwritten notation of the third I cannot make out the rhythm — which is why, for now, I can only send you [these two].</text:p>
      <text:p text:style-name="P3"/>
      <text:p text:style-name="P8"/>
      <text:p text:style-name="P9"><text:span text:style-name="T9">Claude’s </text:span>Notes</text:p>
      <text:p text:style-name="P4"/>
      <text:p text:style-name="Text_20_body">This translation follows the cleaned-up transcription as given. Where the underlying German transcription itself was marked uncertain (bracketed “[?]” readings) or was garbled/ungrammatical, I have translated according to the most plausible sense and flagged the spot inline above with “TRANSLATOR’S NOTE” or “uncertain reading."</text:p>
      <text:p text:style-name="P7">Opening passage (page 1), ending at “...mich [einer Mitteilung über Schwärmerei?] für würdig halten"</text:p>
      <text:p text:style-name="P18">I read this as Berg saying Frida considered him worthy of being told about her enthusiasms / <text:span text:style-name="T13">c</text:span>onfided in about some excited plan — but the bracketed German <text:span text:style-name="T13">i</text:span>tself is a guess, so the English here is corre-spondingly soft.</text:p>
      <text:p text:style-name="P18"><text:span text:style-name="T1">The Salome / “kaiserlichen Rat” passage (page 9), from “auch nach dem prügeln Sie Lebendigen” through “in Wagners Fußstapfen meisterschreiten"</text:span></text:p>
      <text:p text:style-name="P18"><text:span text:style-name="T13">T</text:span>he German syntax around “auch nach dem prügeln Sie Lebendigen” is irregular even in the source, and I've rendered it as “even now people go on thrashing the one of them <text:span text:style-name="T13">w</text:span>ho is still living [i.e. Strauss]” — but a different construal is possible. The rest of this stretch (the anecdote about the Imperial Councillor and “Salome” as a “joke") translates fairly clean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8pt" fo:font-weight="bold" officeooo:rsid="009bbf16"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in" fo:margin-bottom="0.1799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1.4236in" style:rel-column-width="21845*"/>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d8cf7c" officeooo:paragraph-rsid="01d8cf7c"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MT1" style:family="text">
      <style:text-properties officeooo:rsid="01e25d65"/>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text:page-number text:select-page="current">12</text:page-number></text:p>
            </table:table-cell>
            <table:table-cell table:style-name="Table1.A1" office:value-type="string">
              <text:p text:style-name="MP2"><text:span text:style-name="MT1">Berg to Semler #</text:span>1</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6-30T20:16:02.694984429</dc:date>
    <meta:editing-duration>PT11H50M26S</meta:editing-duration>
    <meta:editing-cycles>375</meta:editing-cycles>
    <meta:generator>LibreOffice/7.3.7.2$Linux_X86_64 LibreOffice_project/30$Build-2</meta:generator>
    <meta:document-statistic meta:table-count="1" meta:image-count="0" meta:object-count="0" meta:page-count="12" meta:paragraph-count="38" meta:word-count="5192" meta:character-count="31723" meta:non-whitespace-character-count="26367"/>
  </office:meta>
</office:document-meta>
</file>