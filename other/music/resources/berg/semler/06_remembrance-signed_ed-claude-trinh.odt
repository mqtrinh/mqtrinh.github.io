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paragraph-properties fo:text-align="start" style:justify-single-word="false"/>
      <style:text-properties fo:font-style="normal" officeooo:rsid="0212a806" officeooo:paragraph-rsid="0212a806" style:font-style-asian="normal" style:font-style-complex="normal"/>
    </style:style>
    <style:style style:name="P6" style:family="paragraph" style:parent-style-name="Text_20_body">
      <style:paragraph-properties fo:text-align="start" style:justify-single-word="false"/>
      <style:text-properties fo:font-style="normal" officeooo:rsid="0212a806" officeooo:paragraph-rsid="02244297" style:font-style-asian="normal" style:font-style-complex="normal"/>
    </style:style>
    <style:style style:name="P7" style:family="paragraph" style:parent-style-name="Text_20_body">
      <style:paragraph-properties fo:text-align="start" style:justify-single-word="false"/>
      <style:text-properties fo:font-style="normal" officeooo:rsid="0212a806" officeooo:paragraph-rsid="02321c2d" style:font-style-asian="normal" style:font-style-complex="normal"/>
    </style:style>
    <style:style style:name="P8" style:family="paragraph" style:parent-style-name="Title">
      <style:text-properties officeooo:rsid="01d6123a" officeooo:paragraph-rsid="01d6123a"/>
    </style:style>
    <style:style style:name="P9" style:family="paragraph" style:parent-style-name="Subtitle">
      <style:text-properties officeooo:rsid="01d6123a" officeooo:paragraph-rsid="01d6123a"/>
    </style:style>
    <style:style style:name="P10" style:family="paragraph" style:parent-style-name="Footnote">
      <style:text-properties officeooo:rsid="01dacc8b" officeooo:paragraph-rsid="020edf0d"/>
    </style:style>
    <style:style style:name="P11" style:family="paragraph" style:parent-style-name="Footnote">
      <style:text-properties officeooo:paragraph-rsid="01de0da9"/>
    </style:style>
    <style:style style:name="P12" style:family="paragraph" style:parent-style-name="Footnote">
      <style:text-properties fo:language="en" fo:country="US"/>
    </style:style>
    <style:style style:name="P13" style:family="paragraph" style:parent-style-name="Footnote">
      <style:text-properties officeooo:paragraph-rsid="01fcca72"/>
    </style:style>
    <style:style style:name="P14" style:family="paragraph" style:parent-style-name="Footnote">
      <style:text-properties officeooo:rsid="02022941" officeooo:paragraph-rsid="02022941"/>
    </style:style>
    <style:style style:name="P15" style:family="paragraph" style:parent-style-name="Footnote">
      <style:text-properties officeooo:paragraph-rsid="020871ec"/>
    </style:style>
    <style:style style:name="P16" style:family="paragraph" style:parent-style-name="Footnote">
      <style:text-properties officeooo:rsid="020a2a1c" officeooo:paragraph-rsid="020a2a1c"/>
    </style:style>
    <style:style style:name="P17" style:family="paragraph" style:parent-style-name="Footnote">
      <style:text-properties officeooo:rsid="020c6c8c" officeooo:paragraph-rsid="020c6c8c"/>
    </style:style>
    <style:style style:name="P18" style:family="paragraph" style:parent-style-name="Text_20_body">
      <style:paragraph-properties fo:text-align="end" style:justify-single-word="false"/>
      <style:text-properties fo:font-style="italic" officeooo:paragraph-rsid="01d708db" style:font-style-asian="italic" style:font-style-complex="italic"/>
    </style:style>
    <style:style style:name="P19" style:family="paragraph" style:parent-style-name="Text_20_body">
      <style:text-properties fo:font-style="italic" officeooo:paragraph-rsid="01d708db" style:font-style-asian="italic" style:font-style-complex="italic"/>
    </style:style>
    <style:style style:name="P20" style:family="paragraph" style:parent-style-name="Text_20_body">
      <style:text-properties officeooo:paragraph-rsid="01d708db"/>
    </style:style>
    <style:style style:name="P21" style:family="paragraph" style:parent-style-name="Text_20_body">
      <style:text-properties officeooo:paragraph-rsid="01d8dd44"/>
    </style:style>
    <style:style style:name="P22" style:family="paragraph" style:parent-style-name="Text_20_body">
      <style:text-properties officeooo:paragraph-rsid="01dc1364"/>
    </style:style>
    <style:style style:name="P23" style:family="paragraph" style:parent-style-name="Text_20_body">
      <style:text-properties officeooo:paragraph-rsid="01e1d5c5"/>
    </style:style>
    <style:style style:name="P24" style:family="paragraph" style:parent-style-name="Text_20_body">
      <style:text-properties officeooo:paragraph-rsid="01e1d729"/>
    </style:style>
    <style:style style:name="P25" style:family="paragraph" style:parent-style-name="Text_20_body">
      <style:text-properties officeooo:paragraph-rsid="01ecdf35"/>
    </style:style>
    <style:style style:name="P26" style:family="paragraph" style:parent-style-name="Text_20_body">
      <style:text-properties officeooo:paragraph-rsid="01eebe37"/>
    </style:style>
    <style:style style:name="P27" style:family="paragraph" style:parent-style-name="Text_20_body">
      <style:text-properties officeooo:paragraph-rsid="01f14eef"/>
    </style:style>
    <style:style style:name="P28" style:family="paragraph" style:parent-style-name="Text_20_body">
      <style:text-properties officeooo:paragraph-rsid="01f1f926"/>
    </style:style>
    <style:style style:name="P29" style:family="paragraph" style:parent-style-name="Text_20_body">
      <style:text-properties officeooo:paragraph-rsid="01f33044"/>
    </style:style>
    <style:style style:name="P30" style:family="paragraph" style:parent-style-name="Text_20_body">
      <style:text-properties officeooo:paragraph-rsid="01f49edc"/>
    </style:style>
    <style:style style:name="P31" style:family="paragraph" style:parent-style-name="Text_20_body">
      <style:text-properties officeooo:paragraph-rsid="01f7dd5b"/>
    </style:style>
    <style:style style:name="P32" style:family="paragraph" style:parent-style-name="Text_20_body">
      <style:text-properties officeooo:paragraph-rsid="01fe6f95"/>
    </style:style>
    <style:style style:name="P33" style:family="paragraph" style:parent-style-name="Text_20_body">
      <style:paragraph-properties fo:text-align="center" style:justify-single-word="false"/>
      <style:text-properties officeooo:paragraph-rsid="02117e01"/>
    </style:style>
    <style:style style:name="P34" style:family="paragraph" style:parent-style-name="Text_20_body">
      <style:paragraph-properties fo:text-align="center" style:justify-single-word="false"/>
      <style:text-properties officeooo:rsid="0212a806" officeooo:paragraph-rsid="0212a806"/>
    </style:style>
    <style:style style:name="P35" style:family="paragraph" style:parent-style-name="Text_20_body">
      <style:text-properties officeooo:paragraph-rsid="02000a6f"/>
    </style:style>
    <style:style style:name="P36" style:family="paragraph" style:parent-style-name="Text_20_body">
      <style:paragraph-properties fo:text-align="center" style:justify-single-word="false"/>
      <style:text-properties fo:font-style="italic" officeooo:rsid="0212a806" officeooo:paragraph-rsid="0212a806" style:font-style-asian="italic" style:font-style-complex="italic"/>
    </style:style>
    <style:style style:name="P37"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38" style:family="paragraph" style:parent-style-name="Text_20_body">
      <style:paragraph-properties fo:text-align="start" style:justify-single-word="false"/>
      <style:text-properties fo:font-style="italic" officeooo:rsid="0212a806" officeooo:paragraph-rsid="02391535" style:font-style-asian="italic" style:font-style-complex="italic"/>
    </style:style>
    <style:style style:name="P39" style:family="paragraph" style:parent-style-name="Text_20_body">
      <style:text-properties fo:font-style="italic" officeooo:paragraph-rsid="01d708db" style:font-style-asian="italic" style:font-style-complex="italic"/>
    </style:style>
    <style:style style:name="P40" style:family="paragraph" style:parent-style-name="Text_20_body">
      <style:paragraph-properties fo:text-align="start" style:justify-single-word="false"/>
      <style:text-properties fo:font-style="normal" officeooo:rsid="0212a806" officeooo:paragraph-rsid="02244297" style:font-style-asian="normal" style:font-style-complex="normal"/>
    </style:style>
    <style:style style:name="P41" style:family="paragraph" style:parent-style-name="Text_20_body">
      <style:text-properties officeooo:paragraph-rsid="02000a6f"/>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20a2a1c"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eebe37" style:font-style-asian="normal" style:font-style-complex="normal"/>
    </style:style>
    <style:style style:name="T17" style:family="text">
      <style:text-properties fo:font-style="normal" officeooo:rsid="01fcca72" style:font-style-asian="normal" style:font-style-complex="normal"/>
    </style:style>
    <style:style style:name="T18" style:family="text">
      <style:text-properties fo:font-style="normal" officeooo:rsid="020a2a1c" style:font-style-asian="normal" style:font-style-complex="normal"/>
    </style:style>
    <style:style style:name="T19" style:family="text">
      <style:text-properties fo:font-style="normal" officeooo:rsid="020bacf3" style:font-style-asian="normal" style:font-style-complex="normal"/>
    </style:style>
    <style:style style:name="T20" style:family="text">
      <style:text-properties fo:font-style="normal" officeooo:rsid="020871ec" style:font-style-asian="normal" style:font-style-complex="normal"/>
    </style:style>
    <style:style style:name="T21" style:family="text">
      <style:text-properties fo:font-style="normal" officeooo:rsid="022c3b97" style:font-style-asian="normal" style:font-style-complex="normal"/>
    </style:style>
    <style:style style:name="T22" style:family="text">
      <style:text-properties fo:font-style="normal" officeooo:rsid="0224387a"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officeooo:rsid="01d708db"/>
    </style:style>
    <style:style style:name="T25" style:family="text">
      <style:text-properties officeooo:rsid="01dacc8b"/>
    </style:style>
    <style:style style:name="T26" style:family="text">
      <style:text-properties officeooo:rsid="01dcb2d6"/>
    </style:style>
    <style:style style:name="T27" style:family="text">
      <style:text-properties officeooo:rsid="01de2915"/>
    </style:style>
    <style:style style:name="T28" style:family="text">
      <style:text-properties officeooo:rsid="01de693e"/>
    </style:style>
    <style:style style:name="T29" style:family="text">
      <style:text-properties officeooo:rsid="01e1d5c5"/>
    </style:style>
    <style:style style:name="T30" style:family="text">
      <style:text-properties officeooo:rsid="01e72fce"/>
    </style:style>
    <style:style style:name="T31" style:family="text">
      <style:text-properties officeooo:rsid="01e88898"/>
    </style:style>
    <style:style style:name="T32" style:family="text">
      <style:text-properties officeooo:rsid="01ea1744"/>
    </style:style>
    <style:style style:name="T33" style:family="text">
      <style:text-properties officeooo:rsid="01eb5b1f"/>
    </style:style>
    <style:style style:name="T34" style:family="text">
      <style:text-properties officeooo:rsid="01ecdf35"/>
    </style:style>
    <style:style style:name="T35" style:family="text">
      <style:text-properties officeooo:rsid="01eebe37"/>
    </style:style>
    <style:style style:name="T36" style:family="text">
      <style:text-properties style:text-underline-style="solid" style:text-underline-width="auto" style:text-underline-color="font-color"/>
    </style:style>
    <style:style style:name="T37" style:family="text">
      <style:text-properties officeooo:rsid="01f49edc"/>
    </style:style>
    <style:style style:name="T38" style:family="text">
      <style:text-properties officeooo:rsid="01f687d7"/>
    </style:style>
    <style:style style:name="T39" style:family="text">
      <style:text-properties officeooo:rsid="01f7dd5b"/>
    </style:style>
    <style:style style:name="T40" style:family="text">
      <style:text-properties officeooo:rsid="01f9ba86"/>
    </style:style>
    <style:style style:name="T41" style:family="text">
      <style:text-properties officeooo:rsid="01fb494b"/>
    </style:style>
    <style:style style:name="T42" style:family="text">
      <style:text-properties officeooo:rsid="01fcca72"/>
    </style:style>
    <style:style style:name="T43" style:family="text">
      <style:text-properties officeooo:rsid="01fe6f95"/>
    </style:style>
    <style:style style:name="T44" style:family="text">
      <style:text-properties officeooo:rsid="020410eb"/>
    </style:style>
    <style:style style:name="T45" style:family="text">
      <style:text-properties officeooo:rsid="0205fb56"/>
    </style:style>
    <style:style style:name="T46" style:family="text">
      <style:text-properties officeooo:rsid="0206dcae"/>
    </style:style>
    <style:style style:name="T47" style:family="text">
      <style:text-properties officeooo:rsid="020871ec"/>
    </style:style>
    <style:style style:name="T48" style:family="text">
      <style:text-properties fo:font-variant="normal" fo:text-transform="none" fo:color="#404040" loext:opacity="100%" fo:letter-spacing="normal" fo:font-style="normal" officeooo:rsid="0208d9c5" style:font-style-asian="normal" style:font-style-complex="normal"/>
    </style:style>
    <style:style style:name="T49" style:family="text">
      <style:text-properties officeooo:rsid="020910d4"/>
    </style:style>
    <style:style style:name="T50" style:family="text">
      <style:text-properties officeooo:rsid="020a2a1c"/>
    </style:style>
    <style:style style:name="T51" style:family="text">
      <style:text-properties officeooo:rsid="020a98b6"/>
    </style:style>
    <style:style style:name="T52" style:family="text">
      <style:text-properties officeooo:rsid="020cc242"/>
    </style:style>
    <style:style style:name="T53" style:family="text">
      <style:text-properties officeooo:rsid="021056e3"/>
    </style:style>
    <style:style style:name="T54" style:family="text">
      <style:text-properties officeooo:rsid="02219fe2"/>
    </style:style>
    <style:style style:name="T55" style:family="text">
      <style:text-properties officeooo:rsid="0224387a"/>
    </style:style>
    <style:style style:name="T56" style:family="text">
      <style:text-properties officeooo:rsid="02244297"/>
    </style:style>
    <style:style style:name="T57" style:family="text">
      <style:text-properties fo:font-weight="normal" style:font-weight-asian="normal" style:font-weight-complex="normal"/>
    </style:style>
    <style:style style:name="T58" style:family="text">
      <style:text-properties officeooo:rsid="02255d8a"/>
    </style:style>
    <style:style style:name="T59" style:family="text">
      <style:text-properties officeooo:rsid="022c3b97"/>
    </style:style>
    <style:style style:name="T60" style:family="text">
      <style:text-properties officeooo:rsid="02321c2d"/>
    </style:style>
    <style:style style:name="T61" style:family="text">
      <style:text-properties officeooo:rsid="0237a4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903 and 1904</text:p>
      <text:p text:style-name="P9">Frida Semler Seabury</text:p>
      <text:p text:style-name="Text_20_body"/>
      <text:p text:style-name="P33"><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20">The summers I spent at the Berghof are among my freshest memories, because I was so ecstatically happy there — and knew it at the time. <text:s/>I was sixteen — a prim young thing whose reading [a<text:span text:style-name="T24">]</text:span>nd acquaintance had been carefully supervised. <text:s/>[<text:span text:style-name="T24">Left</text:span>] <text:span text:style-name="T24">[w]</text:span>ith my friend Nora Kahle at the Berg<text:span text:style-name="T24">[s] </text:span><text:span text:style-name="T40">[</text:span><text:span text:style-name="T10">sic</text:span><text:span text:style-name="T40">]</text:span><text:span text:style-name="T24">,</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20">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4">[</text:span>F<text:span text:style-name="T24">]</text:span>rau [Grabin] sie schwimmen auch zu Besuch auf Frau <text:span text:style-name="T24">X —</text:span> we <text:span text:style-name="T25">[</text:span><text:span text:style-name="T8">sic</text:span><text:span text:style-name="T25">]</text:span> <text:span text:style-name="T24">nett</text:span>!”<text:note text:id="ftn1" text:note-class="footnote"><text:note-citation>1</text:note-citation><text:note-body><text:p text:style-name="P10">“Ah indeed, Mrs. Grabin <text:span text:style-name="T7">—</text:span> so you’re swimming to go <text:span text:style-name="T27">visit</text:span> <text:span text:style-name="T28">Mrs.</text:span> X, too <text:span text:style-name="T7">—</text:span> how nice!”</text:p></text:note-body></text:note> “Guten Tag Herr R[itt]ineister <text:span text:style-name="T24">— </text:span>wie geht es heute [Ih<text:span text:style-name="T26">r</text:span>e<text:span text:style-name="T26">r</text:span>] schonen Fraulein Tochter.”<text:note text:id="ftn2" text:note-class="footnote"><text:note-citation>2</text:note-citation><text:note-body><text:p text:style-name="P11">“Hello Mr. Rittineister <text:span text:style-name="T1">—</text:span> how <text:span text:style-name="T26">is your</text:span> beautiful little daughter doing today.”</text:p></text:note-body></text:note> <text:s/>I laughed and swallowed water and choked my way to the <text:soft-page-break/>other shore. <text:s/>These were special swims. <text:s/>Usually we swam only in the mornings before lunch. <text:s/>Lunch <text:span text:style-name="T24">— </text:span>like [b]reakfast was eaten outdoors. <text:s/>There was always interesting talk <text:span text:style-name="T24">— </text:span>sometimes serious discussions about music or books or politics <text:span text:style-name="T24">— </text:span>and much delightful nonsense. <text:s/>We were all in irrepressible high spirits.</text:p>
      <text:p text:style-name="P21">One of us must have read somewhere a phrase, “Was ist der me[<text:span text:style-name="T24">n</text:span>]sch <text:span text:style-name="T24">— </text:span>ein nichts!” <text:s/>It may have been in one of the Ibsen plays we read aloud with divided parts. <text:s/>At all events, it became a slogan. <text:s/>At any happening in which it was at all applicable, one of us would say sombrely, “Was ist der me<text:span text:style-name="T46">[n]</text:span>sch!” confident of the resounding reply <text:span text:style-name="T24">— “</text:span>Ein Nichts!” <text:s/>Only young people in the joy of very positive living could have rejoiced so in the mockery of negativism.</text:p>
      <text:p text:style-name="P22">Another game might have been called “tact a l’Americaine.” <text:s/>I had told a story of Mrs. Cleveland when mistress of the White House; at a diplomatic dinner the pricelass glasses were much admired. <text:s/>Alas <text:span text:style-name="T24">— </text:span>in the midst of the ecstasies over them, an ambassador broke his. <text:s/>There was an infinitesimal pause of dismay. <text:s/>Then Mrs. Cleveland said, “O, don’t be distressed. <text:s/>You see they break at a touch.” <text:s/>And tapping a knife against her glass <text:span text:style-name="T24">—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4">—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3">We were artistic between courses. <text:s/>The inside dough of the brown peasant bread made wonderful clay. <text:s/>We did statues of each other and funeral monuments were particularly popular giving as they did an opportunity not only for sculptural <text:span text:style-name="T29">e</text:span>ffects in the grand manner, but also for jibes at each other’s idiosyncrasies.</text:p>
      <text:p text:style-name="P23">We used to discuss the last words of great men <text:span text:style-name="T1">— </text:span>whether they planned them long ahead or whether they just happened, <text:span text:style-name="T1">—</text:span>Goethes <text:span text:style-name="T29">[</text:span><text:span text:style-name="T8">sic</text:span><text:span text:style-name="T29">] </text:span>symbolical “Mehr Licht”, etc., and we used to try out various phrases on each other. <text:s/>We little dreamed that what one of us said would one day be so important.</text:p>
      <text:p text:style-name="P24">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29">[</text:span><text:span text:style-name="T8">sic</text:span><text:span text:style-name="T29">]</text:span><text:span text:style-name="T29"><text:note text:id="ftn3" text:note-class="footnote"><text:note-citation>3</text:note-citation><text:note-body><text:p text:style-name="P17"><text:span text:style-name="T13">Claude:</text:span> Ossiacher See, a lake in Carinthia.</text:p></text:note-body></text:note></text:span><text:span text:style-name="T29"> </text:span>seemed surrounded by villas where some prominent opera singer lived in sin with a famous novelist or where a popular playwright shared his days with a glamorous actress not tied to him in any way. <text:s/>The innocent question <text:span text:style-name="T1">—</text:span><text:span text:style-name="T29"> “</text:span>Who lives in the yellow house?” would of necessity bring a reply a New York maiden of sixteen hardly expected but the bald facts were generally couched in picturesque language that made the hearing doubly difficult. <text:s/>In time <text:soft-page-break/>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20">My younger brother spent the summer at Berghof the year after I left. He was a most puritanical young person of twelve. <text:s/>On one of the evening walks when a famous Wagnerian singer and her playwright companio<text:span text:style-name="T30">[</text:span>n<text:span text:style-name="T30">]</text:span> were of the group, little Herbert insisted on walking twelve paces behind the main party. <text:s/>Solicitously Alban inquired, “Are you tired? <text:s/>Shall we turn back?” <text:s/>“No, I’<text:span text:style-name="T53">m</text:span> not tired,” my brother replied gravely. Pressed further as to whether he felt unwell or was bored or what, he replied firmly, “I do not care to walk with that woman. <text:s/>I do not approve of her morals.” <text:s/>That woman <text:span text:style-name="T31">w</text:span>as delighted at young America’s <text:span text:style-name="T31">[</text:span><text:span text:style-name="T33">smug</text:span>ness].</text:p>
      <text:p text:style-name="P25"><text:span text:style-name="T32">[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4">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35">[n]i</text:span>st<text:span text:style-name="T34">[.]</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6">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3"> — </text:span><text:span text:style-name="T16">[p]o</text:span>pped it in his pocket and was immediately “with” us. <text:s/>There was no affectation in this or anything else he did. <text:s/>He wanted our company, and he wanted his book <text:span text:style-name="T1">— </text:span>so he contrived to have both.</text:p>
      <text:p text:style-name="P27">In the evenings we read Ibsen aloud with divided parts. <text:s/>In 1903 Ibsen was a discovery, and we thrilled over Baumeister Sollness<text:note text:id="ftn4" text:note-class="footnote"><text:note-citation>4</text:note-citation><text:note-body><text:p text:style-name="Footnote"><text:span text:style-name="T14">Claude:</text:span><text:span text:style-name="T51"> </text:span><text:span text:style-name="T58">N</text:span><text:span text:style-name="T50">ormally titled </text:span><text:span text:style-name="T1">Bygmester Solness</text:span><text:span text:style-name="T15">.</text:span></text:p></text:note-body></text:note> and Hedda and Ghosts. <text:s/>It was in the second summer that we all read <text:span text:style-name="T1">— </text:span>not aloud <text:span text:style-name="T1">—</text:span> Wedekind’s Reigen<text:note text:id="ftn5" text:note-class="footnote"><text:note-citation>5</text:note-citation><text:note-body><text:p text:style-name="P16"><text:span text:style-name="T13">Claude:</text:span><text:span text:style-name="T57"> </text:span><text:span text:style-name="T1">Reigen</text:span> is by Schnitzler, not Wedekind.</text:p></text:note-body></text:note> and Erdgeist. Alban was greatly entertained a<text:span text:style-name="T43">[</text:span>t t<text:span text:style-name="T35">]</text:span>he advance I had made in courage from one summer <text:soft-page-break/>to the next. <text:s/>Coming upon me at <text:span text:style-name="T45">[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5"> —</text:span><text:span text:style-name="T1"> </text:span>and last work “Lulu.”</text:p>
      <text:p text:style-name="P28">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29">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20">The end of summer was dreadful. <text:s/>To get into a tight high collar, hour glass stays, and high button shoes was constraint every muscle resisted.</text:p>
      <text:p text:style-name="P30">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37">[</text:span>hastily]<text:span text:style-name="T41">)</text:span> <text:span text:style-name="T1">— “</text:span>Oder in der <text:span text:style-name="T37">[</text:span>dritten] Gallerie.”<text:note text:id="ftn6" text:note-class="footnote"><text:note-citation>6</text:note-citation><text:note-body><text:p text:style-name="P12">“All our friends <text:span text:style-name="T41">have gone off to</text:span> their estates — <text:span text:style-name="T41">o</text:span>r <text:span text:style-name="T41">to</text:span> the <text:span text:style-name="T41">third</text:span> gallery.”</text:p></text:note-body></text:note></text:p>
      <text:p text:style-name="P20">We all saw [Kainz<text:note text:id="ftn7" text:note-class="footnote"><text:note-citation>7</text:note-citation><text:note-body><text:p text:style-name="P15"><text:span text:style-name="T14">Claude:</text:span><text:span text:style-name="T18"> </text:span><text:span text:style-name="T19">The famous Austrian actor </text:span><text:span text:style-name="T20">Josef Kainz</text:span><text:span text:style-name="T48">.</text:span></text:p></text:note-body></text:note>] play Hamlet and I cried [and] Alban’s brother Charley said “Na Fridl was hast,”<text:note text:id="ftn8" text:note-class="footnote"><text:note-citation>8</text:note-citation><text:note-body><text:p text:style-name="Footnote">“<text:span text:style-name="T49">Well, Fridl, what’s </text:span><text:span text:style-name="T52">got you</text:span><text:span text:style-name="T49">?”</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61">A</text:span>nd it <text:span text:style-name="T36">was</text:span> a nice toque.)</text:p>
      <text:p text:style-name="P31">Long steps leading from Art Galleries or Royal Palaces were too much for us. <text:s/>Alban always went before us, bowing in [<text:span text:style-name="T38">kingly</text:span>] fash-ion to right and left and saying “Mein Volk” to astonished scrub 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text:soft-page-break/>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1">Once I dined in an oval dining room <text:span text:style-name="T39">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39">[</text:span><text:span text:style-name="T9">sic</text:span><text:span text:style-name="T39">]</text:span>.”<text:note text:id="ftn9" text:note-class="footnote"><text:note-citation>9</text:note-citation><text:note-body><text:p text:style-name="P13">“<text:span text:style-name="T42">Yup</text:span><text:span text:style-name="T17"> — gone mad.”</text:span></text:p></text:note-body></text:note> He was always a most sensitive and responsive companion.</text:p>
      <text:p text:style-name="P32">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5">I used his time and patience heavily during my last three days at Berghof. <text:s/>An attack of tonsilitis had given me a high fever which made me very lively. <text:s/>On the first day I wrote an act of a play. <text:s/>I[<text:span text:style-name="T43">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35"/>
      <text:p text:style-name="P18">Frida Semler Seabury</text:p>
      <text:p text:style-name="P19"/>
      <text:p text:style-name="P19">I am sending on these very personal notes because of their picture of Alban Berg as a very young man — a very gay, very sweet person.<text:span text:style-name="T15"><text:note text:id="ftn10" text:note-class="footnote"><text:note-citation>10</text:note-citation><text:note-body><text:p text:style-name="P14"><text:span text:style-name="T44">Added in</text:span><text:span text:style-name="T47"> </text:span><text:span text:style-name="T44">h</text:span>andwrit<text:span text:style-name="T44">ing</text:span>, like her signature.</text:p></text:note-body></text:note></text:span></text:p>
      <text:p text:style-name="P36"/>
      <text:p text:style-name="P36"/>
      <text:p text:style-name="P37">Claude’s <text:span text:style-name="T54">Commentary</text:span></text:p>
      <text:p text:style-name="P34"/>
      <text:p text:style-name="P38">I contrived a costume… What a busy garrison it must have been: </text:p>
      <text:p text:style-name="P38"><text:span text:style-name="T15">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span></text:p>
      <text:p text:style-name="P5">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P6">The essay overall has this quality of protesting, gently but repeatedly, that everything was perfectly innocent and cheerful and platonic. She’s at pains to describe Alban as universally kind and attentive — to everyone, to his mother, to her brother, to sick guests. But scattered through that portrait are these moments — the instep, floating in the lake reading letters together, the moonlit garden talks — that carry a different charge. <text:span text:style-name="T56">[</text:span>…<text:span text:style-name="T56">]</text:span></text:p>
      <text:p text:style-name="P6"/>
      <text:p text:style-name="P38">Once I dined in an oval dining room… He was always a most sensitive and responsive companion:</text:p>
      <text:p text:style-name="P38"><text:span text:style-name="T15">The room had once belonged to an archduke’s mistress — so this was, by implication, a love nest, a space designed for an illicit romantic liaison. The archduke evidently wasn’t a man of many ideas, but when he did have one, he committed to it fully (“got ideas hard”): in this case, the idea of decorating the ceiling with garlands of roses, each containing a scroll reading “Sub Rosa” </text:span><text:span text:style-name="T21">[</text:span><text:span text:style-name="T15">…</text:span><text:span text:style-name="T22">]</text:span><text:span text:style-name="T15"> discretion announced in giant stucco letters across the ceiling. It’s a private joke made permanent and architectural, and not even a very private one, since now random dinner guests are reading it decades later.</text:span></text:p>
      <text:p text:style-name="P5">Frida’s reaction is the comic core of the passage: she’s so struck by the cheek of this — a room built for clandestine love, papered in winking reminders of its own clandestineness — that she can’t focus on her food. She has to crane her neck up and around, scanning every single garland, just to make sure they don’t escalate into something even more indiscreet (“some other sentiment hadn’t crept in”). She’s worried the scrolls might say something more explicit than “sub rosa,” and has to check.</text:p>
      <text:p text:style-name="P7">Alban, watching her crane her neck around the entire ceiling like an owl, finds it hilarious <text:s/>— and his single comment<text:span text:style-name="T59">[</text:span>…<text:span text:style-name="T59">]</text:span>is droll understatement: agreeing, essentially, “yes, it is a bit much, isn’t it,” about either the room, the archduke, or her reaction (possibly all thre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6-30T23:41:09.463576696</dc:date>
    <meta:editing-duration>PT13H7M12S</meta:editing-duration>
    <meta:editing-cycles>445</meta:editing-cycles>
    <meta:generator>LibreOffice/7.3.7.2$Linux_X86_64 LibreOffice_project/30$Build-2</meta:generator>
    <meta:document-statistic meta:table-count="1" meta:image-count="0" meta:object-count="0" meta:page-count="6" meta:paragraph-count="46" meta:word-count="3032" meta:character-count="17283" meta:non-whitespace-character-count="14115"/>
  </office:meta>
</office:document-meta>
</file>