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881bde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82" style:family="paragraph" style:parent-style-name="Footnote">
      <style:text-properties officeooo:rsid="0203bf40" officeooo:paragraph-rsid="0203bf40"/>
    </style:style>
    <style:style style:name="P83" style:family="paragraph" style:parent-style-name="Footnote">
      <style:text-properties officeooo:rsid="020418e5" officeooo:paragraph-rsid="020418e5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d69bf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eab97" officeooo:paragraph-rsid="032eab97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08866" officeooo:paragraph-rsid="03308866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158a2" officeooo:paragraph-rsid="033158a2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69c0c" officeooo:paragraph-rsid="03369c0c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785ad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5c7f" officeooo:paragraph-rsid="03395c7f" style:font-style-asian="normal" style:font-weight-asian="normal" style:font-name-complex="Times New Roman2" style:font-size-complex="12pt" style:font-style-complex="normal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ad32" officeooo:paragraph-rsid="036042c5" style:font-style-asian="normal" style:font-weight-asian="normal" style:font-name-complex="Times New Roman2" style:font-size-complex="12pt" style:font-style-complex="normal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6ef9e4" officeooo:paragraph-rsid="036ef9e4" style:font-style-asian="normal" style:font-weight-asian="normal" style:font-name-complex="Times New Roman2" style:font-size-complex="12pt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e04f9" officeooo:paragraph-rsid="037e04f9" style:font-style-asian="normal" style:font-weight-asian="normal" style:font-name-complex="Times New Roman2" style:font-size-complex="12pt" style:font-style-complex="normal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f484d" officeooo:paragraph-rsid="037f484d" style:font-style-asian="normal" style:font-weight-asian="normal" style:font-name-complex="Times New Roman2" style:font-size-complex="12pt" style:font-style-complex="normal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b4acf" officeooo:paragraph-rsid="038b4acf" style:font-style-asian="normal" style:font-weight-asian="normal" style:font-name-complex="Times New Roman2" style:font-size-complex="12pt" style:font-style-complex="normal" style:font-weight-complex="normal"/>
    </style:style>
    <style:style style:name="P142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43" style:family="paragraph" style:parent-style-name="Footnote">
      <style:text-properties officeooo:rsid="02bbbc96" officeooo:paragraph-rsid="02bbbc96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5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b4b47" officeooo:paragraph-rsid="033b4b47" style:font-style-asian="normal" style:font-weight-asian="normal" style:font-name-complex="Times New Roman2" style:font-size-complex="12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c7175" officeooo:paragraph-rsid="033c7175" style:font-style-asian="normal" style:font-weight-asian="normal" style:font-name-complex="Times New Roman2" style:font-size-complex="12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dea4f" officeooo:paragraph-rsid="033dea4f" style:font-style-asian="normal" style:font-weight-asian="normal" style:font-name-complex="Times New Roman2" style:font-size-complex="12pt" style:font-style-complex="normal" style:font-weight-complex="normal"/>
    </style:style>
    <style:style style:name="P15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4aa78b" officeooo:paragraph-rsid="034aa78b" style:font-style-asian="normal" style:font-weight-asian="normal" style:font-name-complex="Times New Roman2" style:font-size-complex="12pt" style:font-style-complex="normal" style:font-weight-complex="normal"/>
    </style:style>
    <style:style style:name="P15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42469" officeooo:paragraph-rsid="03542469" style:font-style-asian="normal" style:font-weight-asian="normal" style:font-name-complex="Times New Roman2" style:font-size-complex="12pt" style:font-style-complex="normal" style:font-weight-complex="normal"/>
    </style:style>
    <style:style style:name="P15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b4de8" officeooo:paragraph-rsid="035b4de8" style:font-style-asian="normal" style:font-weight-asian="normal" style:font-name-complex="Times New Roman2" style:font-size-complex="12pt" style:font-style-complex="normal" style:font-weight-complex="normal"/>
    </style:style>
    <style:style style:name="P16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05a2b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6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667c8" officeooo:paragraph-rsid="036667c8" style:font-style-asian="normal" style:font-weight-asian="normal" style:font-name-complex="Times New Roman2" style:font-size-complex="12pt" style:font-style-complex="normal" style:font-weight-complex="normal"/>
    </style:style>
    <style:style style:name="P16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c28de" officeooo:paragraph-rsid="036c28de" style:font-style-asian="normal" style:font-weight-asian="normal" style:font-name-complex="Times New Roman2" style:font-size-complex="12pt" style:font-style-complex="normal" style:font-weight-complex="normal"/>
    </style:style>
    <style:style style:name="P16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768f31" officeooo:paragraph-rsid="037d0e1e" style:font-style-asian="normal" style:font-weight-asian="normal" style:font-name-complex="Times New Roman2" style:font-size-complex="12pt" style:font-style-complex="normal" style:font-weight-complex="normal"/>
    </style:style>
    <style:style style:name="P16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1a53c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6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560c0" officeooo:paragraph-rsid="038560c0" style:font-style-asian="normal" style:font-weight-asian="normal" style:font-name-complex="Times New Roman2" style:font-size-complex="12pt" style:font-style-complex="normal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b69e0" officeooo:paragraph-rsid="038b69e0" style:font-style-asian="normal" style:font-weight-asian="normal" style:font-name-complex="Times New Roman2" style:font-size-complex="12pt" style:font-style-complex="normal" style:font-weight-complex="normal"/>
    </style:style>
    <style:style style:name="P167" style:family="paragraph" style:parent-style-name="Footnote">
      <style:text-properties officeooo:rsid="039136cd" officeooo:paragraph-rsid="039136cd"/>
    </style:style>
    <style:style style:name="P168" style:family="paragraph" style:parent-style-name="Heading_20_1" style:master-page-name="First_20_Page">
      <style:paragraph-properties style:page-number="auto"/>
    </style:style>
    <style:style style:name="P16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38348e6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7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fae10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7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fae10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17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6cd3d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7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6cd3d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17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7786a" officeooo:paragraph-rsid="0397786a" style:font-style-asian="normal" style:font-weight-asian="normal" style:font-name-complex="Times New Roman2" style:font-size-complex="12pt" style:font-style-complex="normal" style:font-weight-complex="normal"/>
    </style:style>
    <style:style style:name="P17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fae10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7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80688" officeooo:paragraph-rsid="03980688" style:font-style-asian="normal" style:font-weight-asian="normal" style:font-name-complex="Times New Roman2" style:font-size-complex="12pt" style:font-style-complex="normal" style:font-weight-complex="normal"/>
    </style:style>
    <style:style style:name="P17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9d49a3" style:font-style-asian="normal" style:font-weight-asian="normal" style:font-name-complex="Times New Roman2" style:font-size-complex="12pt" style:font-style-complex="normal" style:font-weight-complex="normal"/>
    </style:style>
    <style:style style:name="P17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17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a1aaa9" officeooo:paragraph-rsid="03a1aaa9" style:font-style-asian="normal" style:font-weight-asian="normal" style:font-name-complex="Times New Roman2" style:font-size-complex="12pt" style:font-style-complex="normal" style:font-weight-complex="normal"/>
    </style:style>
    <style:style style:name="P180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9ead77" style:font-weight-asian="bold" style:font-weight-complex="bold"/>
    </style:style>
    <style:style style:name="P18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35e4c" style:font-name-complex="Times New Roman2" style:font-size-complex="12pt"/>
    </style:style>
    <style:style style:name="T24" style:family="text">
      <style:text-properties officeooo:rsid="01d77a9b" style:font-name-complex="Times New Roman2" style:font-size-complex="12pt"/>
    </style:style>
    <style:style style:name="T25" style:family="text">
      <style:text-properties officeooo:rsid="01d89107" style:font-name-complex="Times New Roman2" style:font-size-complex="12pt"/>
    </style:style>
    <style:style style:name="T26" style:family="text">
      <style:text-properties officeooo:rsid="01d99096" style:font-name-complex="Times New Roman2" style:font-size-complex="12pt"/>
    </style:style>
    <style:style style:name="T27" style:family="text">
      <style:text-properties officeooo:rsid="01db2508" style:font-name-complex="Times New Roman2" style:font-size-complex="12pt"/>
    </style:style>
    <style:style style:name="T28" style:family="text">
      <style:text-properties officeooo:rsid="01de14a5" style:font-name-complex="Times New Roman2" style:font-size-complex="12pt"/>
    </style:style>
    <style:style style:name="T29" style:family="text">
      <style:text-properties officeooo:rsid="01df020f" style:font-name-complex="Times New Roman2" style:font-size-complex="12pt"/>
    </style:style>
    <style:style style:name="T30" style:family="text">
      <style:text-properties officeooo:rsid="01e0946c" style:font-name-complex="Times New Roman2" style:font-size-complex="12pt"/>
    </style:style>
    <style:style style:name="T31" style:family="text">
      <style:text-properties officeooo:rsid="01e0dc23" style:font-name-complex="Times New Roman2" style:font-size-complex="12pt"/>
    </style:style>
    <style:style style:name="T32" style:family="text">
      <style:text-properties officeooo:rsid="01e17e96" style:font-name-complex="Times New Roman2" style:font-size-complex="12pt"/>
    </style:style>
    <style:style style:name="T33" style:family="text">
      <style:text-properties officeooo:rsid="01e4cfcf" style:font-name-complex="Times New Roman2" style:font-size-complex="12pt"/>
    </style:style>
    <style:style style:name="T34" style:family="text">
      <style:text-properties officeooo:rsid="01e5305c" style:font-name-complex="Times New Roman2" style:font-size-complex="12pt"/>
    </style:style>
    <style:style style:name="T35" style:family="text">
      <style:text-properties officeooo:rsid="01e6e7fb" style:font-name-complex="Times New Roman2" style:font-size-complex="12pt"/>
    </style:style>
    <style:style style:name="T36" style:family="text">
      <style:text-properties officeooo:rsid="01e8d8ca" style:font-name-complex="Times New Roman2" style:font-size-complex="12pt"/>
    </style:style>
    <style:style style:name="T37" style:family="text">
      <style:text-properties officeooo:rsid="01fa8789" style:font-name-complex="Times New Roman2" style:font-size-complex="12pt"/>
    </style:style>
    <style:style style:name="T38" style:family="text">
      <style:text-properties officeooo:rsid="01fc3525" style:font-name-complex="Times New Roman2" style:font-size-complex="12pt"/>
    </style:style>
    <style:style style:name="T39" style:family="text">
      <style:text-properties officeooo:rsid="02a02062" style:font-name-complex="Times New Roman2" style:font-size-complex="12pt"/>
    </style:style>
    <style:style style:name="T40" style:family="text">
      <style:text-properties officeooo:rsid="02a347f3" style:font-name-complex="Times New Roman2" style:font-size-complex="12pt"/>
    </style:style>
    <style:style style:name="T41" style:family="text">
      <style:text-properties officeooo:rsid="02a4a20e" style:font-name-complex="Times New Roman2" style:font-size-complex="12pt"/>
    </style:style>
    <style:style style:name="T42" style:family="text">
      <style:text-properties officeooo:rsid="031f6ebc" style:font-name-complex="Times New Roman2" style:font-size-complex="12pt"/>
    </style:style>
    <style:style style:name="T43" style:family="text">
      <style:text-properties fo:font-style="italic" style:font-style-asian="italic" style:font-name-complex="Times New Roman2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0" style:family="text">
      <style:text-properties fo:font-style="italic" officeooo:rsid="039a861e" style:font-style-asian="italic" style:font-style-complex="italic"/>
    </style:style>
    <style:style style:name="T51" style:family="text">
      <style:text-properties fo:font-weight="bold" style:font-weight-asian="bold" style:font-name-complex="Times New Roman2" style:font-size-complex="12pt" style:font-weight-complex="bold"/>
    </style:style>
    <style:style style:name="T52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3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4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1de14a5" style:font-weight-asian="bold" style:font-weight-complex="bold"/>
    </style:style>
    <style:style style:name="T57" style:family="text">
      <style:text-properties fo:font-weight="bold" officeooo:rsid="025f4ee2" style:font-weight-asian="bold" style:font-weight-complex="bold"/>
    </style:style>
    <style:style style:name="T58" style:family="text">
      <style:text-properties fo:font-weight="bold" officeooo:rsid="02a7088a" style:font-weight-asian="bold" style:font-weight-complex="bold"/>
    </style:style>
    <style:style style:name="T59" style:family="text">
      <style:text-properties fo:font-weight="bold" officeooo:rsid="02d6eabc" style:font-weight-asian="bold" style:font-weight-complex="bold"/>
    </style:style>
    <style:style style:name="T60" style:family="text">
      <style:text-properties fo:font-weight="bold" officeooo:rsid="02dc920d" style:font-weight-asian="bold" style:font-weight-complex="bold"/>
    </style:style>
    <style:style style:name="T61" style:family="text">
      <style:text-properties fo:font-weight="bold" officeooo:rsid="032943d9" style:font-weight-asian="bold" style:font-weight-complex="bold"/>
    </style:style>
    <style:style style:name="T62" style:family="text">
      <style:text-properties fo:font-weight="bold" officeooo:rsid="02e52838" style:font-weight-asian="bold" style:font-weight-complex="bold"/>
    </style:style>
    <style:style style:name="T63" style:family="text">
      <style:text-properties fo:font-weight="bold" officeooo:rsid="03598608" style:font-weight-asian="bold" style:font-weight-complex="bold"/>
    </style:style>
    <style:style style:name="T64" style:family="text">
      <style:text-properties fo:font-weight="bold" officeooo:rsid="03768f31" style:font-weight-asian="bold" style:font-weight-complex="bold"/>
    </style:style>
    <style:style style:name="T65" style:family="text">
      <style:text-properties fo:font-weight="bold" officeooo:rsid="038716e0" style:font-weight-asian="bold" style:font-weight-complex="bold"/>
    </style:style>
    <style:style style:name="T66" style:family="text">
      <style:text-properties style:font-name="Transliteration1" style:font-name-complex="Times New Roman2" style:font-size-complex="12pt"/>
    </style:style>
    <style:style style:name="T67" style:family="text">
      <style:text-properties style:font-name="Transliteration1" officeooo:rsid="01af8865" style:font-name-complex="Times New Roman2" style:font-size-complex="12pt"/>
    </style:style>
    <style:style style:name="T68" style:family="text">
      <style:text-properties style:font-name="Transliteration1" officeooo:rsid="01b6a868" style:font-name-complex="Times New Roman2" style:font-size-complex="12pt"/>
    </style:style>
    <style:style style:name="T69" style:family="text">
      <style:text-properties style:font-name="Transliteration1" officeooo:rsid="01b824db" style:font-name-complex="Times New Roman2" style:font-size-complex="12pt"/>
    </style:style>
    <style:style style:name="T70" style:family="text">
      <style:text-properties style:font-name="Transliteration1" officeooo:rsid="01b903ad" style:font-name-complex="Times New Roman2" style:font-size-complex="12pt"/>
    </style:style>
    <style:style style:name="T71" style:family="text">
      <style:text-properties style:font-name="Transliteration1" officeooo:rsid="01b9d1b8" style:font-name-complex="Times New Roman2" style:font-size-complex="12pt"/>
    </style:style>
    <style:style style:name="T72" style:family="text">
      <style:text-properties style:font-name="Transliteration1" officeooo:rsid="01ba7b25" style:font-name-complex="Times New Roman2" style:font-size-complex="12pt"/>
    </style:style>
    <style:style style:name="T73" style:family="text">
      <style:text-properties style:font-name="Transliteration1" officeooo:rsid="01bb6611" style:font-name-complex="Times New Roman2" style:font-size-complex="12pt"/>
    </style:style>
    <style:style style:name="T74" style:family="text">
      <style:text-properties style:font-name="Transliteration1" officeooo:rsid="01bd9025" style:font-name-complex="Times New Roman2" style:font-size-complex="12pt"/>
    </style:style>
    <style:style style:name="T75" style:family="text">
      <style:text-properties style:font-name="Transliteration1" officeooo:rsid="01bf10ab" style:font-name-complex="Times New Roman2" style:font-size-complex="12pt"/>
    </style:style>
    <style:style style:name="T76" style:family="text">
      <style:text-properties style:font-name="Transliteration1" officeooo:rsid="01c261d7" style:font-name-complex="Times New Roman2" style:font-size-complex="12pt"/>
    </style:style>
    <style:style style:name="T77" style:family="text">
      <style:text-properties style:font-name="Transliteration1" officeooo:rsid="01c3673a" style:font-name-complex="Times New Roman2" style:font-size-complex="12pt"/>
    </style:style>
    <style:style style:name="T78" style:family="text">
      <style:text-properties style:font-name="Transliteration1" officeooo:rsid="01c3b4d7" style:font-name-complex="Times New Roman2" style:font-size-complex="12pt"/>
    </style:style>
    <style:style style:name="T79" style:family="text">
      <style:text-properties style:font-name="Transliteration1" officeooo:rsid="01c854a0" style:font-name-complex="Times New Roman2" style:font-size-complex="12pt"/>
    </style:style>
    <style:style style:name="T80" style:family="text">
      <style:text-properties style:font-name="Transliteration1" officeooo:rsid="01c972dc" style:font-name-complex="Times New Roman2" style:font-size-complex="12pt"/>
    </style:style>
    <style:style style:name="T81" style:family="text">
      <style:text-properties style:font-name="Transliteration1" officeooo:rsid="01cad4a6" style:font-name-complex="Times New Roman2" style:font-size-complex="12pt"/>
    </style:style>
    <style:style style:name="T82" style:family="text">
      <style:text-properties style:font-name="Transliteration1" officeooo:rsid="01cbb55b" style:font-name-complex="Times New Roman2" style:font-size-complex="12pt"/>
    </style:style>
    <style:style style:name="T83" style:family="text">
      <style:text-properties style:font-name="Transliteration1" officeooo:rsid="01cc98b2" style:font-name-complex="Times New Roman2" style:font-size-complex="12pt"/>
    </style:style>
    <style:style style:name="T84" style:family="text">
      <style:text-properties style:font-name="Transliteration1" officeooo:rsid="01ce2d0b" style:font-name-complex="Times New Roman2" style:font-size-complex="12pt"/>
    </style:style>
    <style:style style:name="T85" style:family="text">
      <style:text-properties style:font-name="Transliteration1" officeooo:rsid="01d35e4c" style:font-name-complex="Times New Roman2" style:font-size-complex="12pt"/>
    </style:style>
    <style:style style:name="T86" style:family="text">
      <style:text-properties style:font-name="Transliteration1" officeooo:rsid="01d77a9b" style:font-name-complex="Times New Roman2" style:font-size-complex="12pt"/>
    </style:style>
    <style:style style:name="T87" style:family="text">
      <style:text-properties style:font-name="Transliteration1" officeooo:rsid="01de14a5" style:font-name-complex="Times New Roman2" style:font-size-complex="12pt"/>
    </style:style>
    <style:style style:name="T88" style:family="text">
      <style:text-properties style:font-name="Transliteration1" officeooo:rsid="02a0c07d" style:font-name-complex="Times New Roman2" style:font-size-complex="12pt"/>
    </style:style>
    <style:style style:name="T89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90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91" style:family="text">
      <style:text-properties fo:font-style="normal" style:font-style-asian="normal" style:font-name-complex="Times New Roman2" style:font-size-complex="12pt" style:font-style-complex="normal"/>
    </style:style>
    <style:style style:name="T92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93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94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95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96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97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98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99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100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101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102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103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04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05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06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07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08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09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10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11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12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13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14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15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16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17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18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19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20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21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22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23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24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25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26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27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28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29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30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31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32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33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34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35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36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37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38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139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140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141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142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143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144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145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146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147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148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149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150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151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152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194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195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196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197" style:family="text">
      <style:text-properties fo:font-style="normal" officeooo:rsid="0374bbe6" style:font-style-asian="normal" style:font-name-complex="Times New Roman2" style:font-size-complex="12pt" style:font-style-complex="normal"/>
    </style:style>
    <style:style style:name="T198" style:family="text">
      <style:text-properties fo:font-style="normal" officeooo:rsid="039ead77" style:font-style-asian="normal" style:font-name-complex="Times New Roman2" style:font-size-complex="12pt" style:font-style-complex="normal"/>
    </style:style>
    <style:style style:name="T199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200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201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202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203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204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05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06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07" style:family="text">
      <style:text-properties officeooo:rsid="019bc138"/>
    </style:style>
    <style:style style:name="T208" style:family="text">
      <style:text-properties officeooo:rsid="01a55361"/>
    </style:style>
    <style:style style:name="T209" style:family="text">
      <style:text-properties style:font-name="Transliteration"/>
    </style:style>
    <style:style style:name="T210" style:family="text">
      <style:text-properties style:font-name="Transliteration" officeooo:rsid="01bf10ab" style:font-name-complex="Times New Roman2" style:font-size-complex="12pt"/>
    </style:style>
    <style:style style:name="T211" style:family="text">
      <style:text-properties style:font-name="Transliteration" officeooo:rsid="01cad4a6" style:font-name-complex="Times New Roman2" style:font-size-complex="12pt"/>
    </style:style>
    <style:style style:name="T212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13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14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15" style:family="text">
      <style:text-properties style:font-name="Transliteration" officeooo:rsid="020418e5"/>
    </style:style>
    <style:style style:name="T216" style:family="text">
      <style:text-properties style:font-name="Transliteration" officeooo:rsid="025745bd"/>
    </style:style>
    <style:style style:name="T217" style:family="text">
      <style:text-properties style:font-name="Transliteration" officeooo:rsid="029f16e9"/>
    </style:style>
    <style:style style:name="T218" style:family="text">
      <style:text-properties style:font-name="Transliteration" officeooo:rsid="02bda874"/>
    </style:style>
    <style:style style:name="T219" style:family="text">
      <style:text-properties style:font-name="Transliteration" officeooo:rsid="030046e2"/>
    </style:style>
    <style:style style:name="T220" style:family="text">
      <style:text-properties style:font-name="Transliteration" officeooo:rsid="0357e92b"/>
    </style:style>
    <style:style style:name="T221" style:family="text">
      <style:text-properties officeooo:rsid="01c3851d"/>
    </style:style>
    <style:style style:name="T222" style:family="text">
      <style:text-properties officeooo:rsid="01c4d4c4"/>
    </style:style>
    <style:style style:name="T223" style:family="text">
      <style:text-properties officeooo:rsid="01d5f246"/>
    </style:style>
    <style:style style:name="T224" style:family="text">
      <style:text-properties officeooo:rsid="01d77a9b"/>
    </style:style>
    <style:style style:name="T225" style:family="text">
      <style:text-properties officeooo:rsid="01db2508"/>
    </style:style>
    <style:style style:name="T226" style:family="text">
      <style:text-properties officeooo:rsid="01de14a5"/>
    </style:style>
    <style:style style:name="T227" style:family="text">
      <style:text-properties officeooo:rsid="01e17e96"/>
    </style:style>
    <style:style style:name="T228" style:family="text">
      <style:text-properties officeooo:rsid="01e3e1e7"/>
    </style:style>
    <style:style style:name="T229" style:family="text">
      <style:text-properties officeooo:rsid="01e5305c"/>
    </style:style>
    <style:style style:name="T230" style:family="text">
      <style:text-properties officeooo:rsid="01e8d8ca"/>
    </style:style>
    <style:style style:name="T231" style:family="text">
      <style:text-properties officeooo:rsid="01ef44e0"/>
    </style:style>
    <style:style style:name="T232" style:family="text">
      <style:text-properties officeooo:rsid="02440f4b"/>
    </style:style>
    <style:style style:name="T233" style:family="text">
      <style:text-properties officeooo:rsid="024a16bb"/>
    </style:style>
    <style:style style:name="T234" style:family="text">
      <style:text-properties officeooo:rsid="024c80cc"/>
    </style:style>
    <style:style style:name="T235" style:family="text">
      <style:text-properties officeooo:rsid="025745bd"/>
    </style:style>
    <style:style style:name="T236" style:family="text">
      <style:text-properties officeooo:rsid="025ad19f"/>
    </style:style>
    <style:style style:name="T237" style:family="text">
      <style:text-properties officeooo:rsid="025bb2fa"/>
    </style:style>
    <style:style style:name="T238" style:family="text">
      <style:text-properties officeooo:rsid="025d0ff2"/>
    </style:style>
    <style:style style:name="T239" style:family="text">
      <style:text-properties officeooo:rsid="0266b04b"/>
    </style:style>
    <style:style style:name="T240" style:family="text">
      <style:text-properties officeooo:rsid="02691be0"/>
    </style:style>
    <style:style style:name="T241" style:family="text">
      <style:text-properties officeooo:rsid="026dc537"/>
    </style:style>
    <style:style style:name="T242" style:family="text">
      <style:text-properties officeooo:rsid="027045c5"/>
    </style:style>
    <style:style style:name="T243" style:family="text">
      <style:text-properties officeooo:rsid="02715978"/>
    </style:style>
    <style:style style:name="T244" style:family="text">
      <style:text-properties officeooo:rsid="0276fbb7"/>
    </style:style>
    <style:style style:name="T245" style:family="text">
      <style:text-properties officeooo:rsid="027887ec"/>
    </style:style>
    <style:style style:name="T246" style:family="text">
      <style:text-properties officeooo:rsid="027eb967"/>
    </style:style>
    <style:style style:name="T247" style:family="text">
      <style:text-properties officeooo:rsid="027eb9e1"/>
    </style:style>
    <style:style style:name="T248" style:family="text">
      <style:text-properties officeooo:rsid="027f1a42"/>
    </style:style>
    <style:style style:name="T249" style:family="text">
      <style:text-properties officeooo:rsid="028ea34d"/>
    </style:style>
    <style:style style:name="T250" style:family="text">
      <style:text-properties officeooo:rsid="028f3e5a"/>
    </style:style>
    <style:style style:name="T251" style:family="text">
      <style:text-properties officeooo:rsid="0293afa3"/>
    </style:style>
    <style:style style:name="T252" style:family="text">
      <style:text-properties officeooo:rsid="02947fdd"/>
    </style:style>
    <style:style style:name="T253" style:family="text">
      <style:text-properties officeooo:rsid="0295c253"/>
    </style:style>
    <style:style style:name="T254" style:family="text">
      <style:text-properties officeooo:rsid="02970406"/>
    </style:style>
    <style:style style:name="T255" style:family="text">
      <style:text-properties officeooo:rsid="0297ec39"/>
    </style:style>
    <style:style style:name="T256" style:family="text">
      <style:text-properties officeooo:rsid="029b59f5"/>
    </style:style>
    <style:style style:name="T257" style:family="text">
      <style:text-properties officeooo:rsid="029d0a25"/>
    </style:style>
    <style:style style:name="T258" style:family="text">
      <style:text-properties officeooo:rsid="029f16e9"/>
    </style:style>
    <style:style style:name="T259" style:family="text">
      <style:text-properties officeooo:rsid="029f95be"/>
    </style:style>
    <style:style style:name="T260" style:family="text">
      <style:text-properties officeooo:rsid="02a02062"/>
    </style:style>
    <style:style style:name="T261" style:family="text">
      <style:text-properties officeooo:rsid="02a2033b"/>
    </style:style>
    <style:style style:name="T262" style:family="text">
      <style:text-properties officeooo:rsid="02a7088a"/>
    </style:style>
    <style:style style:name="T263" style:family="text">
      <style:text-properties officeooo:rsid="02a8c64e"/>
    </style:style>
    <style:style style:name="T264" style:family="text">
      <style:text-properties officeooo:rsid="02a9c9a0"/>
    </style:style>
    <style:style style:name="T265" style:family="text">
      <style:text-properties officeooo:rsid="02aa3e62"/>
    </style:style>
    <style:style style:name="T266" style:family="text">
      <style:text-properties officeooo:rsid="02b0334c"/>
    </style:style>
    <style:style style:name="T267" style:family="text">
      <style:text-properties officeooo:rsid="02b1ff7e"/>
    </style:style>
    <style:style style:name="T268" style:family="text">
      <style:text-properties officeooo:rsid="02b2008c"/>
    </style:style>
    <style:style style:name="T269" style:family="text">
      <style:text-properties officeooo:rsid="0256b750"/>
    </style:style>
    <style:style style:name="T270" style:family="text">
      <style:text-properties officeooo:rsid="02b61928"/>
    </style:style>
    <style:style style:name="T271" style:family="text">
      <style:text-properties officeooo:rsid="02bbbc96"/>
    </style:style>
    <style:style style:name="T272" style:family="text">
      <style:text-properties officeooo:rsid="02bea321"/>
    </style:style>
    <style:style style:name="T273" style:family="text">
      <style:text-properties officeooo:rsid="02c0933e"/>
    </style:style>
    <style:style style:name="T274" style:family="text">
      <style:text-properties officeooo:rsid="02c105d2"/>
    </style:style>
    <style:style style:name="T275" style:family="text">
      <style:text-properties officeooo:rsid="02c22b77"/>
    </style:style>
    <style:style style:name="T276" style:family="text">
      <style:text-properties officeooo:rsid="02c4179b"/>
    </style:style>
    <style:style style:name="T277" style:family="text">
      <style:text-properties officeooo:rsid="02c46c36"/>
    </style:style>
    <style:style style:name="T278" style:family="text">
      <style:text-properties officeooo:rsid="02c77a05"/>
    </style:style>
    <style:style style:name="T279" style:family="text">
      <style:text-properties officeooo:rsid="02caebe4"/>
    </style:style>
    <style:style style:name="T280" style:family="text">
      <style:text-properties officeooo:rsid="02ceda45"/>
    </style:style>
    <style:style style:name="T281" style:family="text">
      <style:text-properties officeooo:rsid="02d184f4"/>
    </style:style>
    <style:style style:name="T282" style:family="text">
      <style:text-properties officeooo:rsid="02d6eabc"/>
    </style:style>
    <style:style style:name="T283" style:family="text">
      <style:text-properties officeooo:rsid="02d87694"/>
    </style:style>
    <style:style style:name="T284" style:family="text">
      <style:text-properties officeooo:rsid="02d93565"/>
    </style:style>
    <style:style style:name="T285" style:family="text">
      <style:text-properties officeooo:rsid="02db814c"/>
    </style:style>
    <style:style style:name="T286" style:family="text">
      <style:text-properties officeooo:rsid="02dc920d"/>
    </style:style>
    <style:style style:name="T287" style:family="text">
      <style:text-properties officeooo:rsid="02dd2b19"/>
    </style:style>
    <style:style style:name="T288" style:family="text">
      <style:text-properties officeooo:rsid="02de82dd"/>
    </style:style>
    <style:style style:name="T289" style:family="text">
      <style:text-properties officeooo:rsid="02e00fd6"/>
    </style:style>
    <style:style style:name="T290" style:family="text">
      <style:text-properties officeooo:rsid="02e20158"/>
    </style:style>
    <style:style style:name="T291" style:family="text">
      <style:text-properties officeooo:rsid="02e52838"/>
    </style:style>
    <style:style style:name="T292" style:family="text">
      <style:text-properties officeooo:rsid="02e5b47d"/>
    </style:style>
    <style:style style:name="T293" style:family="text">
      <style:text-properties officeooo:rsid="02e67a3b"/>
    </style:style>
    <style:style style:name="T294" style:family="text">
      <style:text-properties officeooo:rsid="02e7dd85"/>
    </style:style>
    <style:style style:name="T295" style:family="text">
      <style:text-properties officeooo:rsid="02e9158c"/>
    </style:style>
    <style:style style:name="T296" style:family="text">
      <style:text-properties officeooo:rsid="02eac353"/>
    </style:style>
    <style:style style:name="T297" style:family="text">
      <style:text-properties officeooo:rsid="02ed24ae"/>
    </style:style>
    <style:style style:name="T298" style:family="text">
      <style:text-properties officeooo:rsid="02ee767e"/>
    </style:style>
    <style:style style:name="T299" style:family="text">
      <style:text-properties officeooo:rsid="02efcf31"/>
    </style:style>
    <style:style style:name="T300" style:family="text">
      <style:text-properties officeooo:rsid="02f0c0de"/>
    </style:style>
    <style:style style:name="T301" style:family="text">
      <style:text-properties officeooo:rsid="02f2e21f"/>
    </style:style>
    <style:style style:name="T302" style:family="text">
      <style:text-properties officeooo:rsid="02f3688d"/>
    </style:style>
    <style:style style:name="T303" style:family="text">
      <style:text-properties officeooo:rsid="02f592de"/>
    </style:style>
    <style:style style:name="T304" style:family="text">
      <style:text-properties officeooo:rsid="02f8fadd"/>
    </style:style>
    <style:style style:name="T305" style:family="text">
      <style:text-properties officeooo:rsid="02fab54e"/>
    </style:style>
    <style:style style:name="T306" style:family="text">
      <style:text-properties officeooo:rsid="02fb3f60"/>
    </style:style>
    <style:style style:name="T307" style:family="text">
      <style:text-properties officeooo:rsid="02fcbabe"/>
    </style:style>
    <style:style style:name="T308" style:family="text">
      <style:text-properties officeooo:rsid="02fd969a"/>
    </style:style>
    <style:style style:name="T309" style:family="text">
      <style:text-properties officeooo:rsid="02fe0376"/>
    </style:style>
    <style:style style:name="T310" style:family="text">
      <style:text-properties officeooo:rsid="02ff76fe"/>
    </style:style>
    <style:style style:name="T311" style:family="text">
      <style:text-properties officeooo:rsid="030046e2"/>
    </style:style>
    <style:style style:name="T312" style:family="text">
      <style:text-properties officeooo:rsid="03022d1d"/>
    </style:style>
    <style:style style:name="T313" style:family="text">
      <style:text-properties officeooo:rsid="0303ef5e"/>
    </style:style>
    <style:style style:name="T314" style:family="text">
      <style:text-properties officeooo:rsid="03046fb2"/>
    </style:style>
    <style:style style:name="T315" style:family="text">
      <style:text-properties officeooo:rsid="03064108"/>
    </style:style>
    <style:style style:name="T316" style:family="text">
      <style:text-properties officeooo:rsid="030f8e93"/>
    </style:style>
    <style:style style:name="T317" style:family="text">
      <style:text-properties officeooo:rsid="0310f661"/>
    </style:style>
    <style:style style:name="T318" style:family="text">
      <style:text-properties officeooo:rsid="031277d4"/>
    </style:style>
    <style:style style:name="T319" style:family="text">
      <style:text-properties officeooo:rsid="0312fcc4"/>
    </style:style>
    <style:style style:name="T320" style:family="text">
      <style:text-properties officeooo:rsid="0314c907"/>
    </style:style>
    <style:style style:name="T321" style:family="text">
      <style:text-properties officeooo:rsid="03163ce8"/>
    </style:style>
    <style:style style:name="T322" style:family="text">
      <style:text-properties officeooo:rsid="031819a2"/>
    </style:style>
    <style:style style:name="T323" style:family="text">
      <style:text-properties officeooo:rsid="03188350"/>
    </style:style>
    <style:style style:name="T324" style:family="text">
      <style:text-properties officeooo:rsid="03195f85"/>
    </style:style>
    <style:style style:name="T325" style:family="text">
      <style:text-properties officeooo:rsid="0319edd6"/>
    </style:style>
    <style:style style:name="T326" style:family="text">
      <style:text-properties officeooo:rsid="031bcf75"/>
    </style:style>
    <style:style style:name="T327" style:family="text">
      <style:text-properties officeooo:rsid="031cb3fc"/>
    </style:style>
    <style:style style:name="T328" style:family="text">
      <style:text-properties officeooo:rsid="031cd793"/>
    </style:style>
    <style:style style:name="T329" style:family="text">
      <style:text-properties officeooo:rsid="032080b1"/>
    </style:style>
    <style:style style:name="T330" style:family="text">
      <style:text-properties officeooo:rsid="0324a5dd"/>
    </style:style>
    <style:style style:name="T331" style:family="text">
      <style:text-properties officeooo:rsid="03252e67"/>
    </style:style>
    <style:style style:name="T332" style:family="text">
      <style:text-properties officeooo:rsid="03259599"/>
    </style:style>
    <style:style style:name="T333" style:family="text">
      <style:text-properties officeooo:rsid="0325eac1"/>
    </style:style>
    <style:style style:name="T334" style:family="text">
      <style:text-properties officeooo:rsid="0327bc17"/>
    </style:style>
    <style:style style:name="T335" style:family="text">
      <style:text-properties officeooo:rsid="032943d9"/>
    </style:style>
    <style:style style:name="T336" style:family="text">
      <style:text-properties officeooo:rsid="032c9a73"/>
    </style:style>
    <style:style style:name="T337" style:family="text">
      <style:text-properties officeooo:rsid="032d69bf"/>
    </style:style>
    <style:style style:name="T338" style:family="text">
      <style:text-properties officeooo:rsid="033158a2"/>
    </style:style>
    <style:style style:name="T339" style:family="text">
      <style:text-properties officeooo:rsid="0331da63"/>
    </style:style>
    <style:style style:name="T340" style:family="text">
      <style:text-properties officeooo:rsid="03338d99"/>
    </style:style>
    <style:style style:name="T341" style:family="text">
      <style:text-properties officeooo:rsid="03357423"/>
    </style:style>
    <style:style style:name="T342" style:family="text">
      <style:text-properties officeooo:rsid="033b4b47"/>
    </style:style>
    <style:style style:name="T343" style:family="text">
      <style:text-properties officeooo:rsid="033d6cd5"/>
    </style:style>
    <style:style style:name="T344" style:family="text">
      <style:text-properties officeooo:rsid="033dea4f"/>
    </style:style>
    <style:style style:name="T345" style:family="text">
      <style:text-properties officeooo:rsid="034192ee"/>
    </style:style>
    <style:style style:name="T346" style:family="text">
      <style:text-properties officeooo:rsid="0345faf9"/>
    </style:style>
    <style:style style:name="T347" style:family="text">
      <style:text-properties officeooo:rsid="03475744"/>
    </style:style>
    <style:style style:name="T348" style:family="text">
      <style:text-properties officeooo:rsid="0348e06e"/>
    </style:style>
    <style:style style:name="T349" style:family="text">
      <style:text-properties officeooo:rsid="034a4b42"/>
    </style:style>
    <style:style style:name="T350" style:family="text">
      <style:text-properties officeooo:rsid="034aa78b"/>
    </style:style>
    <style:style style:name="T351" style:family="text">
      <style:text-properties officeooo:rsid="034c25e5"/>
    </style:style>
    <style:style style:name="T352" style:family="text">
      <style:text-properties officeooo:rsid="034e75c0"/>
    </style:style>
    <style:style style:name="T353" style:family="text">
      <style:text-properties officeooo:rsid="034f0e4c"/>
    </style:style>
    <style:style style:name="T354" style:family="text">
      <style:text-properties officeooo:rsid="0350a5b5"/>
    </style:style>
    <style:style style:name="T355" style:family="text">
      <style:text-properties officeooo:rsid="03511110"/>
    </style:style>
    <style:style style:name="T356" style:family="text">
      <style:text-properties officeooo:rsid="0352a33b"/>
    </style:style>
    <style:style style:name="T357" style:family="text">
      <style:text-properties officeooo:rsid="03542469"/>
    </style:style>
    <style:style style:name="T358" style:family="text">
      <style:text-properties officeooo:rsid="0354fed6"/>
    </style:style>
    <style:style style:name="T359" style:family="text">
      <style:text-properties officeooo:rsid="03566a6b"/>
    </style:style>
    <style:style style:name="T360" style:family="text">
      <style:text-properties officeooo:rsid="0357e92b"/>
    </style:style>
    <style:style style:name="T361" style:family="text">
      <style:text-properties officeooo:rsid="0358f4de"/>
    </style:style>
    <style:style style:name="T362" style:family="text">
      <style:text-properties officeooo:rsid="03598608"/>
    </style:style>
    <style:style style:name="T363" style:family="text">
      <style:text-properties officeooo:rsid="035a6ce8"/>
    </style:style>
    <style:style style:name="T364" style:family="text">
      <style:text-properties officeooo:rsid="035d07c8"/>
    </style:style>
    <style:style style:name="T365" style:family="text">
      <style:text-properties officeooo:rsid="035ea621"/>
    </style:style>
    <style:style style:name="T366" style:family="text">
      <style:text-properties officeooo:rsid="03620837"/>
    </style:style>
    <style:style style:name="T367" style:family="text">
      <style:text-properties officeooo:rsid="0362c918"/>
    </style:style>
    <style:style style:name="T368" style:family="text">
      <style:text-properties officeooo:rsid="03633187"/>
    </style:style>
    <style:style style:name="T369" style:family="text">
      <style:text-properties officeooo:rsid="0363feaf"/>
    </style:style>
    <style:style style:name="T370" style:family="text">
      <style:text-properties officeooo:rsid="0364dcde"/>
    </style:style>
    <style:style style:name="T371" style:family="text">
      <style:text-properties officeooo:rsid="0364ebdd"/>
    </style:style>
    <style:style style:name="T372" style:family="text">
      <style:text-properties officeooo:rsid="03682c8f"/>
    </style:style>
    <style:style style:name="T373" style:family="text">
      <style:text-properties officeooo:rsid="0368e650"/>
    </style:style>
    <style:style style:name="T374" style:family="text">
      <style:text-properties officeooo:rsid="0369d67a"/>
    </style:style>
    <style:style style:name="T375" style:family="text">
      <style:text-properties officeooo:rsid="036ae07b"/>
    </style:style>
    <style:style style:name="T376" style:family="text">
      <style:text-properties officeooo:rsid="036c28de"/>
    </style:style>
    <style:style style:name="T377" style:family="text">
      <style:text-properties officeooo:rsid="036d5a91"/>
    </style:style>
    <style:style style:name="T378" style:family="text">
      <style:text-properties officeooo:rsid="036ffe92"/>
    </style:style>
    <style:style style:name="T379" style:family="text">
      <style:text-properties officeooo:rsid="03715fd1"/>
    </style:style>
    <style:style style:name="T380" style:family="text">
      <style:text-properties officeooo:rsid="03722fdc"/>
    </style:style>
    <style:style style:name="T381" style:family="text">
      <style:text-properties officeooo:rsid="03768f31"/>
    </style:style>
    <style:style style:name="T382" style:family="text">
      <style:text-properties officeooo:rsid="0376c958"/>
    </style:style>
    <style:style style:name="T383" style:family="text">
      <style:text-properties officeooo:rsid="0377af81"/>
    </style:style>
    <style:style style:name="T384" style:family="text">
      <style:text-properties officeooo:rsid="03781abe"/>
    </style:style>
    <style:style style:name="T385" style:family="text">
      <style:text-properties officeooo:rsid="037a156a"/>
    </style:style>
    <style:style style:name="T386" style:family="text">
      <style:text-properties officeooo:rsid="037ba93b"/>
    </style:style>
    <style:style style:name="T387" style:family="text">
      <style:text-properties officeooo:rsid="037d0e1e"/>
    </style:style>
    <style:style style:name="T388" style:family="text">
      <style:text-properties officeooo:rsid="037f7bfa"/>
    </style:style>
    <style:style style:name="T389" style:family="text">
      <style:text-properties officeooo:rsid="0381a53c"/>
    </style:style>
    <style:style style:name="T390" style:family="text">
      <style:text-properties officeooo:rsid="038348e6"/>
    </style:style>
    <style:style style:name="T391" style:family="text">
      <style:text-properties fo:font-variant="normal" fo:text-transform="none" fo:color="#404040" loext:opacity="100%" fo:letter-spacing="normal"/>
    </style:style>
    <style:style style:name="T392" style:family="text">
      <style:text-properties fo:font-variant="normal" fo:text-transform="none" fo:color="#404040" loext:opacity="100%" fo:letter-spacing="normal" officeooo:rsid="038348e6"/>
    </style:style>
    <style:style style:name="T393" style:family="text">
      <style:text-properties fo:font-variant="normal" fo:text-transform="none" fo:color="#404040" loext:opacity="100%" fo:letter-spacing="normal" officeooo:rsid="036ae07b"/>
    </style:style>
    <style:style style:name="T394" style:family="text">
      <style:text-properties fo:font-variant="normal" fo:text-transform="none" fo:color="#404040" loext:opacity="100%" fo:letter-spacing="normal" fo:font-weight="bold" style:font-weight-asian="bold" style:font-weight-complex="bold"/>
    </style:style>
    <style:style style:name="T395" style:family="text">
      <style:text-properties fo:font-variant="normal" fo:text-transform="none" fo:color="#404040" loext:opacity="100%" fo:letter-spacing="normal" fo:font-weight="bold" officeooo:rsid="038348e6" style:font-weight-asian="bold" style:font-weight-complex="bold"/>
    </style:style>
    <style:style style:name="T396" style:family="text">
      <style:text-properties fo:font-variant="normal" fo:text-transform="none" fo:color="#404040" loext:opacity="100%" fo:letter-spacing="normal" fo:font-weight="bold" officeooo:rsid="0396cd3d" style:font-weight-asian="bold" style:font-weight-complex="bold"/>
    </style:style>
    <style:style style:name="T397" style:family="text">
      <style:text-properties fo:font-variant="normal" fo:text-transform="none" fo:color="#404040" loext:opacity="100%" fo:letter-spacing="normal" officeooo:rsid="038a0833"/>
    </style:style>
    <style:style style:name="T398" style:family="text">
      <style:text-properties fo:font-variant="normal" fo:text-transform="none" fo:color="#404040" loext:opacity="100%" fo:letter-spacing="normal" officeooo:rsid="038a7561"/>
    </style:style>
    <style:style style:name="T399" style:family="text">
      <style:text-properties fo:font-variant="normal" fo:text-transform="none" fo:color="#404040" loext:opacity="100%" fo:letter-spacing="normal" officeooo:rsid="0396745c"/>
    </style:style>
    <style:style style:name="T400" style:family="text">
      <style:text-properties fo:font-variant="normal" fo:text-transform="none" fo:color="#404040" loext:opacity="100%" fo:letter-spacing="normal" officeooo:rsid="0396cd3d"/>
    </style:style>
    <style:style style:name="T401" style:family="text">
      <style:text-properties fo:font-variant="normal" fo:text-transform="none" fo:color="#404040" loext:opacity="100%" fo:letter-spacing="normal" officeooo:rsid="0397786a"/>
    </style:style>
    <style:style style:name="T402" style:family="text">
      <style:text-properties fo:font-variant="normal" fo:text-transform="none" fo:color="#404040" loext:opacity="100%" fo:letter-spacing="normal" officeooo:rsid="0397f5b4"/>
    </style:style>
    <style:style style:name="T403" style:family="text">
      <style:text-properties fo:font-variant="normal" fo:text-transform="none" fo:color="#404040" loext:opacity="100%" fo:letter-spacing="normal" officeooo:rsid="03980688"/>
    </style:style>
    <style:style style:name="T404" style:family="text">
      <style:text-properties fo:font-variant="normal" fo:text-transform="none" fo:color="#404040" loext:opacity="100%" fo:letter-spacing="normal" officeooo:rsid="0398471c"/>
    </style:style>
    <style:style style:name="T405" style:family="text">
      <style:text-properties fo:font-variant="normal" fo:text-transform="none" fo:color="#404040" loext:opacity="100%" fo:letter-spacing="normal" officeooo:rsid="039bbb72"/>
    </style:style>
    <style:style style:name="T406" style:family="text">
      <style:text-properties fo:font-variant="normal" fo:text-transform="none" fo:color="#404040" loext:opacity="100%" fo:letter-spacing="normal" officeooo:rsid="039c96ba"/>
    </style:style>
    <style:style style:name="T407" style:family="text">
      <style:text-properties fo:font-variant="normal" fo:text-transform="none" fo:color="#404040" loext:opacity="100%" fo:letter-spacing="normal" officeooo:rsid="039d49a3"/>
    </style:style>
    <style:style style:name="T408" style:family="text">
      <style:text-properties fo:font-variant="normal" fo:text-transform="none" fo:color="#404040" loext:opacity="100%" fo:letter-spacing="normal" officeooo:rsid="03a00168"/>
    </style:style>
    <style:style style:name="T409" style:family="text">
      <style:text-properties officeooo:rsid="03848180"/>
    </style:style>
    <style:style style:name="T410" style:family="text">
      <style:text-properties officeooo:rsid="038716e0"/>
    </style:style>
    <style:style style:name="T411" style:family="text">
      <style:text-properties officeooo:rsid="038a0833"/>
    </style:style>
    <style:style style:name="T412" style:family="text">
      <style:text-properties officeooo:rsid="0397f5b4"/>
    </style:style>
    <style:style style:name="T413" style:family="text">
      <style:text-properties officeooo:rsid="03980688"/>
    </style:style>
    <style:style style:name="T414" style:family="text">
      <style:text-properties officeooo:rsid="03999ab4"/>
    </style:style>
    <style:style style:name="T415" style:family="text">
      <style:text-properties officeooo:rsid="039a861e"/>
    </style:style>
    <style:style style:name="T416" style:family="text">
      <style:text-properties officeooo:rsid="039c96ba"/>
    </style:style>
    <style:style style:name="T417" style:family="text">
      <style:text-properties officeooo:rsid="039d4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8" text:outline-level="1"><text:span text:style-name="T207">Bentresh Stela</text:span> (<text:span text:style-name="T207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6"><text:span text:style-name="T3">[B]<text:tab/><text:tab/>M. Broze. </text:span><text:span text:style-name="T43">La princesse de Bakhtan : Essai d’analyse stylistique. </text:span><text:span text:style-name="T91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92">. </text:span><text:span text:style-name="T93">Last updated August 1, 2020. Accessed October 18, 2025.</text:span><text:span text:style-name="T92"> </text:span><text:a xlink:type="simple" xlink:href="https://www.attalus.org/egypt/bentresh_stela.html" text:style-name="Internet_20_link" text:visited-style-name="Visited_20_Internet_20_Link"><text:span text:style-name="T92">https://www.attalus.org/egypt/bentresh_stela.html</text:span></text:a></text:p>
      <text:p text:style-name="P37"/>
      <text:p text:style-name="P91"><text:span text:style-name="T92">[</text:span><text:span text:style-name="T91">DB]<text:tab/><text:tab/></text:span><text:span text:style-name="T96">A story designed to make propaganda for the cult of Khonsu (The Bentresh-Stela…). </text:span><text:span text:style-name="T97">In</text:span><text:span text:style-name="T96"> </text:span><text:span text:style-name="T43">Egyptian Reading Book, Vol. </text:span><text:span text:style-name="T45">I</text:span><text:span text:style-name="T43">: Exercises and Middle Egyptian Texts</text:span><text:span text:style-name="T91">. Ed. A. De Buck. </text:span><text:span text:style-name="T94">Nederlandsch Archaeologisch-Philologisch Instituut. </text:span><text:span text:style-name="T91">Leyden (1948). </text:span><text:span text:style-name="T96">106–109.</text:span></text:p>
      <text:p text:style-name="P39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92"><text:span text:style-name="T96">[G]<text:tab/><text:tab/>A. Gardiner. </text:span><text:span text:style-name="T46">Egyptian Grammar: Being an Introduction to the Study of Hieroglyphs</text:span><text:span text:style-name="T96">. 3rd Edition, Revised. Griffith Institute, Ashmolean Museum, Oxford. Printed at the University Press, Cambridge (2007).</text:span></text:p>
      <text:p text:style-name="P40"/>
      <text:p text:style-name="P142"><text:span text:style-name="T96">[</text:span><text:span text:style-name="T91">H]<text:tab/><text:tab/>J. </text:span><text:span text:style-name="T125">E.</text:span><text:span text:style-name="T91"> Hoch. </text:span><text:span text:style-name="T43">Middle Egyptian Grammar</text:span><text:span text:style-name="T91">. </text:span><text:span text:style-name="T125">Benben Publications. Mississauga (1997).</text:span></text:p>
      <text:p text:style-name="P39"/>
      <text:p text:style-name="P81"><text:soft-page-break/><text:span text:style-name="T96">[</text:span><text:span text:style-name="T91">L]<text:tab/><text:tab/>III. Two Pseudepigrapha: The Bentresh Stela. In </text:span><text:span text:style-name="T43">Ancient Egyptian Literature, </text:span><text:span text:style-name="T45">Vol. III: The Late Period. </text:span><text:span text:style-name="T98">Trans. M. Lichtheim. University of California Press. Berkeley (1980). 90</text:span><text:span text:style-name="T96">–</text:span><text:span text:style-name="T98">93.</text:span></text:p>
      <text:p text:style-name="P38"/>
      <text:p text:style-name="P14"><text:span text:style-name="T95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95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08">1</text:span><text:span text:style-name="T231">1</text:span>/1<text:span text:style-name="T231">7</text:span>/25</text:p>
      <text:p text:style-name="P20"/>
      <text:p text:style-name="P20"/>
      <text:p text:style-name="P15"><text:span text:style-name="T89">(1)</text:span><text:span text:style-name="T66"> @</text:span><text:span text:style-name="T67">r </text:span><text:span text:style-name="T74">K</text:span><text:span text:style-name="T77">A </text:span><text:span text:style-name="T74">N</text:span><text:span text:style-name="T72">x</text:span><text:span text:style-name="T73">t</text:span></text:p>
      <text:p text:style-name="P15"><text:span text:style-name="T79">t</text:span><text:span text:style-name="T74">wt </text:span><text:span text:style-name="T79">x</text:span><text:span text:style-name="T73">a</text:span><text:span text:style-name="T68">.</text:span><text:span text:style-name="T69">w</text:span></text:p>
      <text:p text:style-name="P15"><text:span text:style-name="T79">D</text:span><text:span text:style-name="T73">d</text:span><text:span text:style-name="T69"> </text:span><text:span text:style-name="T79">n</text:span><text:span text:style-name="T73">s.</text:span><text:span text:style-name="T75">y</text:span><text:span text:style-name="T80">(t)</text:span><text:span text:style-name="T69"> mi </text:span><text:span text:style-name="T80">(I)</text:span><text:span text:style-name="T73">tm</text:span></text:p>
      <text:p text:style-name="P33"/>
      <text:p text:style-name="P17"><text:span text:style-name="T69">@r </text:span><text:span text:style-name="T76">Nbw</text:span></text:p>
      <text:p text:style-name="P17"><text:span text:style-name="T79">ws</text:span><text:span text:style-name="T80">(</text:span><text:span text:style-name="T79">r</text:span><text:span text:style-name="T80">)</text:span><text:span text:style-name="T79"> x</text:span><text:span text:style-name="T69">pS</text:span><text:span text:style-name="T76">w</text:span><text:span text:style-name="T69"> </text:span><text:span text:style-name="T79">d</text:span><text:span text:style-name="T70">r </text:span><text:span text:style-name="T81">P</text:span><text:span text:style-name="T79">Dt</text:span><text:span text:style-name="T70"> </text:span><text:span text:style-name="T79">9</text:span></text:p>
      <text:p text:style-name="P34"/>
      <text:p text:style-name="P15"><text:span text:style-name="T70">Nsw Bity </text:span><text:span text:style-name="T76">N</text:span><text:span text:style-name="T71">b </text:span><text:span text:style-name="T76">&amp;</text:span><text:span text:style-name="T71">A.wy </text:span></text:p>
      <text:p text:style-name="P87"><text:span text:style-name="T71">W</text:span><text:span text:style-name="T66">sr-MaA.t-Ra </text:span><text:span text:style-name="T82">%tp-</text:span><text:span text:style-name="T83">(n)</text:span><text:span text:style-name="T82">-Ra</text:span></text:p>
      <text:p text:style-name="P35"/>
      <text:p text:style-name="P88"><text:span text:style-name="T84">%</text:span><text:span text:style-name="T66">A Ra</text:span></text:p>
      <text:p text:style-name="P89"><text:span text:style-name="T66">xt=f Mri-Imn Ra-</text:span><text:span text:style-name="T78">m</text:span><text:span text:style-name="T66">s-</text:span><text:span text:style-name="T78">s(w)</text:span></text:p>
      <text:p text:style-name="P30"/>
      <text:p text:style-name="P89"><text:span text:style-name="T66">Imn-Ra </text:span><text:span text:style-name="T90">(2)</text:span><text:span text:style-name="T87"> </text:span><text:span text:style-name="T66">Nb </text:span><text:span text:style-name="T88">Nsw.t</text:span><text:span text:style-name="T85"> PsD.t Nb.wt </text:span><text:span text:style-name="T66">WAs.t</text:span></text:p>
      <text:p text:style-name="P29">mri nTr nfr Imn</text:p>
      <text:p text:style-name="P87"><text:span text:style-name="T66">ms.</text:span><text:span text:style-name="T86">[</text:span><text:span text:style-name="T66">ti</text:span><text:span text:style-name="T86">]</text:span><text:span text:style-name="T66">w Ra-@r-Ax.ty</text:span></text:p>
      <text:p text:style-name="P29">pr.<text:span text:style-name="T224">w</text:span> ax n <text:span text:style-name="T222">N</text:span>b <text:span text:style-name="T222">+</text:span>r.<text:span text:style-name="T223">(</text:span>t<text:span text:style-name="T223">)</text:span></text:p>
      <text:p text:style-name="P29">wtt n KA-<text:span text:style-name="T221">Mwt=f</text:span></text:p>
      <text:p text:style-name="P31">nsw.t n Km.t <text:span text:style-name="T225">HqA</text:span> _Sr.wt</text:p>
      <text:p text:style-name="P31">iTy <text:span text:style-name="T56">(3)</text:span><text:span text:style-name="T226"> </text:span><text:span text:style-name="T227">iT</text:span> <text:span text:style-name="T227">PDt</text:span> 9</text:p>
      <text:p text:style-name="P32">pri m <text:span text:style-name="T228">X</text:span>t</text:p>
      <text:p text:style-name="P32">s<text:span text:style-name="T229">r(w) </text:span>n=f nx.tw</text:p>
      <text:p text:style-name="P31"><text:span text:style-name="T230">w</text:span>D n=f pri a m swH.t</text:p>
      <text:p text:style-name="P31"/>
      <text:p text:style-name="P28"/>
      <text:p text:style-name="P15"><text:span text:style-name="T51">(</text:span><text:span text:style-name="T52">1</text:span><text:span text:style-name="T51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10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12">nfr Hr</text:span><text:span text:style-name="T14">], </text:span><text:span text:style-name="T16">like Atum,</text:span></text:p>
      <text:p text:style-name="P8"/>
      <text:p text:style-name="P8">Golden Horus,</text:p>
      <text:p text:style-name="P93"><text:span text:style-name="T16">s</text:span><text:span text:style-name="T3">trong </text:span><text:span text:style-name="T19">[F 68] </text:span><text:span text:style-name="T3">of arm </text:span><text:span text:style-name="T14">[</text:span><text:span text:style-name="T212">nfr Hr</text:span><text:span text:style-name="T14">] </text:span><text:span text:style-name="T20">[who] drives away the Nine Bows [</text:span><text:span text:style-name="T211">pD.t psD.t</text:span><text:span text:style-name="T20">],</text:span></text:p>
      <text:p text:style-name="P8"/>
      <text:p text:style-name="P8">Dual King, Lord of the Two Lands,</text:p>
      <text:p text:style-name="P84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86"><text:span text:style-name="T22">h</text:span><text:span text:style-name="T3">is </text:span><text:span text:style-name="T42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85"><text:span text:style-name="T17">Amun-Re, </text:span><text:span text:style-name="T53">(2)</text:span><text:span text:style-name="T30"> </text:span><text:span text:style-name="T17">Lord of </text:span><text:span text:style-name="T39">t</text:span><text:span text:style-name="T23">he Thrones </text:span><text:span text:style-name="T39">[</text:span><text:span text:style-name="T49">cf.</text:span><text:span text:style-name="T39"> </text:span><text:span text:style-name="T41">G 627 and </text:span><text:span text:style-name="T39">TLA 26200</text:span><text:span text:style-name="T40">]</text:span><text:span text:style-name="T39"> </text:span><text:span text:style-name="T23">[of] the Ennead</text:span><text:span text:style-name="T17">, </text:span><text:span text:style-name="T23">of the Ladies of Thebes</text:span><text:span text:style-name="T23"><text:note text:id="ftn1" text:note-class="footnote"><text:note-citation>1</text:note-citation><text:note-body><text:p text:style-name="P82"><text:span text:style-name="T215">W</text:span><text:span text:style-name="T209">As.t </text:span><text:span text:style-name="T215">=</text:span> Waset <text:span text:style-name="T271">=</text:span> “<text:span text:style-name="T271">The Scepter”</text:span>.</text:p></text:note-body></text:note></text:span><text:span text:style-name="T27">,</text:span></text:p>
      <text:p text:style-name="P11">beloved of the good god, Amun,</text:p>
      <text:p text:style-name="P87"><text:span text:style-name="T3">bo</text:span><text:span text:style-name="T24">[</text:span><text:span text:style-name="T3">r</text:span><text:span text:style-name="T24">]</text:span><text:span text:style-name="T3">n of Re-Horakhty,</text:span></text:p>
      <text:p text:style-name="P87"><text:span text:style-name="T25">seed [F 91] of the </text:span><text:span text:style-name="T47">akh</text:span><text:span text:style-name="T29"> </text:span><text:span text:style-name="T25">of</text:span><text:span text:style-name="T18"> the Lord of </text:span><text:span text:style-name="T25">Ancestors[?</text:span><text:span text:style-name="T26"> F 324</text:span><text:span text:style-name="T25">],</text:span></text:p>
      <text:p text:style-name="P90"><text:span text:style-name="T3">begotten of Ka</text:span><text:span text:style-name="T24">m</text:span><text:span text:style-name="T3">u</text:span><text:span text:style-name="T24">t</text:span><text:span text:style-name="T3">ef,</text:span></text:p>
      <text:p text:style-name="P94"><text:span text:style-name="T28">k</text:span><text:span text:style-name="T3">ing of the Black Land</text:span><text:span text:style-name="T3"><text:note text:id="ftn2" text:note-class="footnote"><text:note-citation>2</text:note-citation><text:note-body><text:p text:style-name="P83"><text:span text:style-name="T209">Km.t</text:span> = Kemet.</text:p></text:note-body></text:note></text:span><text:span text:style-name="T3">, </text:span><text:span text:style-name="T36">ruler </text:span><text:span text:style-name="T3">of the Red Land</text:span><text:span text:style-name="T3"><text:note text:id="ftn3" text:note-class="footnote"><text:note-citation>3</text:note-citation><text:note-body><text:p text:style-name="P83"><text:span text:style-name="T209">_Sr.wt</text:span> = Deshrut.</text:p></text:note-body></text:note></text:span><text:span text:style-name="T3">,</text:span></text:p>
      <text:p text:style-name="P95"><text:soft-page-break/><text:span text:style-name="T3">sovereign </text:span><text:span text:style-name="T54">(3)</text:span><text:span text:style-name="T31"> </text:span><text:span text:style-name="T38">[</text:span><text:span text:style-name="T37">who</text:span><text:span text:style-name="T38">]</text:span><text:span text:style-name="T37"> seized </text:span><text:span text:style-name="T32">the Nine Bows,</text:span></text:p>
      <text:p text:style-name="P96"><text:span text:style-name="T32">t</text:span><text:span text:style-name="T3">hat when he came forth from the womb </text:span><text:span text:style-name="T38">[second tense?]</text:span><text:span text:style-name="T3">,</text:span></text:p>
      <text:p text:style-name="P96"><text:span text:style-name="T34">victories </text:span><text:span text:style-name="T35">[F 139] </text:span><text:span text:style-name="T34">were</text:span><text:span text:style-name="T3"> </text:span><text:span text:style-name="T33">foretold </text:span><text:span text:style-name="T35">[passive] </text:span><text:span text:style-name="T33">[F 235] of him,</text:span></text:p>
      <text:p text:style-name="P97"><text:span text:style-name="T3">command [F 73</text:span><text:span text:style-name="T96">–</text:span><text:span text:style-name="T91">74] [</text:span><text:span text:style-name="T100">g</text:span><text:span text:style-name="T101">iven</text:span><text:span text:style-name="T91">] to him [while] active [F 91] in the egg,</text:span></text:p>
      <text:p text:style-name="P41"/>
      <text:p text:style-name="P41"/>
      <text:p text:style-name="P98"><text:span text:style-name="T200">1</text:span><text:span text:style-name="T201">2</text:span><text:span text:style-name="T199">/</text:span><text:span text:style-name="T201">7</text:span><text:span text:style-name="T199">/25</text:span></text:p>
      <text:p text:style-name="P42"/>
      <text:p text:style-name="P43"/>
      <text:p text:style-name="P105"><text:span text:style-name="T91">kA </text:span><text:span text:style-name="T102">mn ib hb=f mtwn</text:span></text:p>
      <text:p text:style-name="P106"><text:span text:style-name="T108">n</text:span><text:span text:style-name="T91">sw.t n nTr pri nx.t mi MnT(w)</text:span></text:p>
      <text:p text:style-name="P107"><text:span text:style-name="T91">wr pH.t</text:span><text:span text:style-name="T103">y</text:span><text:span text:style-name="T91"> </text:span><text:span text:style-name="T202">(4)</text:span><text:span text:style-name="T113"> </text:span><text:span text:style-name="T91">mi sA Nw.t</text:span></text:p>
      <text:p text:style-name="P120"/>
      <text:p text:style-name="P108"><text:span text:style-name="T91">is Hm=f </text:span><text:span text:style-name="T116">m N</text:span><text:span text:style-name="T91">hr</text:span><text:span text:style-name="T116">n</text:span><text:span text:style-name="T91"> </text:span><text:span text:style-name="T116">mi </text:span><text:span text:style-name="T91">n</text:span><text:span text:style-name="T124">(y)</text:span><text:span text:style-name="T91">t-</text:span><text:span text:style-name="T118">a</text:span><text:span text:style-name="T91">=f </text:span><text:span text:style-name="T114">Tnw rnp.t</text:span></text:p>
      <text:p text:style-name="P109"><text:span text:style-name="T114">w</text:span><text:span text:style-name="T91">r.w </text:span><text:span text:style-name="T114">n </text:span><text:span text:style-name="T91">xAs.</text:span><text:span text:style-name="T114">t nb iw&lt;</text:span><text:span text:style-name="T130">=sn&gt;</text:span><text:span text:style-name="T114"> m ks</text:span><text:span text:style-name="T136">.</text:span><text:span text:style-name="T114">w m Htp.</text:span><text:span text:style-name="T129">w</text:span><text:span text:style-name="T114"> n bA.</text:span><text:span text:style-name="T129">w</text:span><text:span text:style-name="T126"> </text:span><text:span text:style-name="T91">n Hm</text:span><text:span text:style-name="T115">=f S</text:span><text:span text:style-name="T91">Aa &lt;</text:span><text:span text:style-name="T137">r&gt;</text:span><text:span text:style-name="T115"> </text:span><text:span text:style-name="T91">pHw.w</text:span></text:p>
      <text:p text:style-name="P45"/>
      <text:p text:style-name="P44"/>
      <text:p text:style-name="P99"><text:span text:style-name="T91">Bull </text:span><text:span text:style-name="T104">firm [F 106] of heart </text:span><text:span text:style-name="T99">[</text:span><text:span text:style-name="T212">nfr Hr</text:span><text:span text:style-name="T99">]</text:span><text:span text:style-name="T104">, </text:span><text:span text:style-name="T105">when he </text:span><text:span text:style-name="T107">trot</text:span><text:span text:style-name="T105">s </text:span><text:span text:style-name="T106">[circumstantial?] </text:span><text:span text:style-name="T107">[F 158] </text:span><text:span text:style-name="T106">[into] the arena [variant spelling, F 121],</text:span></text:p>
      <text:p text:style-name="P100"><text:span text:style-name="T106">d</text:span><text:span text:style-name="T91">ivine king </text:span><text:span text:style-name="T109">[indirect genitive] [who] c</text:span><text:span text:style-name="T120">a</text:span><text:span text:style-name="T109">me </text:span><text:span text:style-name="T120">[</text:span><text:span text:style-name="T121">no gemination, so </text:span><text:span text:style-name="T120">perfect participle] </text:span><text:span text:style-name="T109">[in] might like Montu,</text:span></text:p>
      <text:p text:style-name="P101"><text:span text:style-name="T91">Great of s</text:span><text:span text:style-name="T110">trength </text:span><text:span text:style-name="T111">[playful spelling of dual </text:span><text:span text:style-name="T213">-ty</text:span><text:span text:style-name="T111">] </text:span><text:span text:style-name="T122">[leopard heads?] </text:span><text:span text:style-name="T99">[</text:span><text:span text:style-name="T212">nfr Hr</text:span><text:span text:style-name="T99">] </text:span><text:span text:style-name="T202">(4)</text:span><text:span text:style-name="T99"> </text:span><text:span text:style-name="T112">like the son of Nut:</text:span></text:p>
      <text:p text:style-name="P46"/>
      <text:p text:style-name="P102"><text:span text:style-name="T112">S</text:span><text:span text:style-name="T91">o, his majesty [was] </text:span><text:span text:style-name="T119">in</text:span><text:span text:style-name="T91"> Naharin</text:span><text:span text:style-name="T123">a</text:span><text:span text:style-name="T91"> </text:span><text:span text:style-name="T117">like </text:span><text:span text:style-name="T119">[</text:span><text:span text:style-name="T123">that</text:span><text:span text:style-name="T119">] </text:span><text:span text:style-name="T123">of</text:span><text:span text:style-name="T119"> his custom </text:span><text:span text:style-name="T124">[</text:span><text:span text:style-name="T48">cf.</text:span><text:span text:style-name="T124"> H 248] </text:span><text:span text:style-name="T119">each [F 305] year.</text:span></text:p>
      <text:p text:style-name="P103"><text:span text:style-name="T91">[As for] the princes of every foreign land </text:span><text:span text:style-name="T134">[F 185]</text:span><text:span text:style-name="T91">, they </text:span><text:span text:style-name="T131">came in </text:span><text:span text:style-name="T135">prostration</text:span><text:span text:style-name="T136">s</text:span><text:span text:style-name="T135"> [F 287]</text:span><text:span text:style-name="T131">, in peace [“peaces”], </text:span><text:span text:style-name="T132">to the might [</text:span><text:span text:style-name="T214">bA.w</text:span><text:span text:style-name="T132"> = mass noun?] </text:span><text:span text:style-name="T133">of his majesty, </text:span><text:span text:style-name="T137">as far as </text:span><text:span text:style-name="T138">the far north [F 92, last variant spelling].</text:span></text:p>
      <text:p text:style-name="P47"/>
      <text:p text:style-name="P47"/>
      <text:p text:style-name="P22"><text:span text:style-name="T119">1</text:span><text:span text:style-name="T91">2/21/25</text:span></text:p>
      <text:p text:style-name="P51"/>
      <text:p text:style-name="P51"/>
      <text:p text:style-name="P110"><text:span text:style-name="T115">in</text:span><text:span text:style-name="T91">w=</text:span><text:span text:style-name="T115">sn nbw xsb</text:span><text:span text:style-name="T91">d</text:span><text:span text:style-name="T115"> </text:span><text:span text:style-name="T203">(5)</text:span><text:span text:style-name="T115"> mfk</text:span><text:span text:style-name="T91">A.t</text:span><text:span text:style-name="T115"> x</text:span><text:span text:style-name="T127">A.</text:span><text:span text:style-name="T115">w nb </text:span><text:span text:style-name="T127">tA-</text:span><text:span text:style-name="T115">nTr </text:span><text:span text:style-name="T127">Hr</text:span><text:span text:style-name="T115"> </text:span><text:span text:style-name="T127">psD=</text:span><text:span text:style-name="T115">sn</text:span></text:p>
      <text:p text:style-name="P110"><text:span text:style-name="T115">wa nb </text:span><text:span text:style-name="T128">Hr xrp sn</text:span><text:span text:style-name="T115">w=f</text:span></text:p>
      <text:p text:style-name="P111"><text:span text:style-name="T115">a</text:span><text:span text:style-name="T91">Ha rdi</text:span><text:span text:style-name="T148">{.t}</text:span><text:span text:style-name="T91"> </text:span><text:span text:style-name="T148">pA </text:span><text:span text:style-name="T91">wr n B</text:span><text:span text:style-name="T143">xtn in</text:span><text:span text:style-name="T148">.</text:span><text:span text:style-name="T143">t</text:span><text:span text:style-name="T148">w</text:span><text:span text:style-name="T143"> </text:span><text:span text:style-name="T144">in.</text:span><text:span text:style-name="T148">w</text:span><text:span text:style-name="T144">=f</text:span></text:p>
      <text:p text:style-name="P112"><text:span text:style-name="T144">d</text:span><text:span text:style-name="T91">i.n=f </text:span><text:span text:style-name="T145">sA.t=f wr.t </text:span><text:span text:style-name="T149">HAt </text:span><text:span text:style-name="T145">i</text:span><text:span text:style-name="T166">r.w[?]</text:span></text:p>
      <text:p text:style-name="P112"><text:span text:style-name="T145">Hr swAS</text:span><text:span text:style-name="T150">{y}</text:span><text:span text:style-name="T145"> Hm=f</text:span></text:p>
      <text:p text:style-name="P113"><text:span text:style-name="T145">H</text:span><text:span text:style-name="T91">r dbH [</text:span><text:span text:style-name="T151">anx</text:span><text:span text:style-name="T91">] xr=f</text:span></text:p>
      <text:p text:style-name="P113"><text:span text:style-name="T91">wn </text:span><text:span text:style-name="T205">(</text:span><text:span text:style-name="T199">6</text:span><text:span text:style-name="T205">)</text:span><text:span text:style-name="T91"> st nfr</text:span><text:span text:style-name="T153">(.ti?)</text:span><text:span text:style-name="T91"> r </text:span><text:span text:style-name="T152">aA</text:span><text:span text:style-name="T91"> wr Hr ib Hm=f r xt nb</text:span></text:p>
      <text:p text:style-name="P47"/>
      <text:p text:style-name="P47"/>
      <text:p text:style-name="P104"><text:span text:style-name="T119">[</text:span><text:span text:style-name="T91">As for] their tribute [F 22]: </text:span><text:span text:style-name="T139">gold, lapis lazuli, </text:span><text:span text:style-name="T204">(5)</text:span><text:span text:style-name="T142"> </text:span><text:span text:style-name="T139">turq</text:span><text:span text:style-name="T142">u</text:span><text:span text:style-name="T139">oise [F 106], </text:span><text:span text:style-name="T140">every herb [F 183] from the gods’ land </text:span><text:span text:style-name="T162">[were] </text:span><text:span text:style-name="T140">upon their back</text:span><text:span text:style-name="T141">[s].</text:span></text:p>
      <text:p text:style-name="P104"><text:span text:style-name="T162">E</text:span><text:span text:style-name="T163">ach one </text:span><text:span text:style-name="T162">was</text:span><text:span text:style-name="T163"> </text:span><text:span text:style-name="T164">outdoing </text:span><text:span text:style-name="T163">[F 196, “</text:span><text:span text:style-name="T164">getting ahead of”</text:span><text:span text:style-name="T163">] </text:span><text:span text:style-name="T165">his companion.</text:span></text:p>
      <text:p text:style-name="P57">Then the chief of Bakhtan <text:span text:style-name="T232">caused t</text:span><text:span text:style-name="T246">hat</text:span><text:span text:style-name="T232"> his tribute </text:span><text:span text:style-name="T246">be brought.</text:span></text:p>
      <text:p text:style-name="P58">[and] put his eldest daughter <text:span text:style-name="T233">in front of </text:span><text:span text:style-name="T247">[?]</text:span><text:span text:style-name="T234">,</text:span></text:p>
      <text:p text:style-name="P59">[and] was praising [F 216] his majesty,</text:p>
      <text:p text:style-name="P60">[and] was pleading [F 311] [for] [life] from [“upon”] him.</text:p>
      <text:p text:style-name="P61"><text:soft-page-break/>[<text:span text:style-name="T216">wn</text:span><text:span text:style-name="T235"> as </text:span><text:span text:style-name="T387">imperfect </text:span>converter? TLA 550129] <text:span text:style-name="T235">The </text:span><text:span text:style-name="T57">(6)</text:span> woman <text:span text:style-name="T248">had been</text:span><text:span text:style-name="T236"> pleasing [stative?] t</text:span><text:span text:style-name="T237">o the utmost greatness upon his majesty’s heart, </text:span><text:span text:style-name="T238">than any thing [else].</text:span></text:p>
      <text:p text:style-name="P64"/>
      <text:p text:style-name="P63"/>
      <text:p text:style-name="P23"><text:span text:style-name="T119">1</text:span><text:span text:style-name="T91">/</text:span><text:span text:style-name="T161">4</text:span><text:span text:style-name="T91">/2</text:span><text:span text:style-name="T161">6</text:span></text:p>
      <text:p text:style-name="P52"/>
      <text:p text:style-name="P52"/>
      <text:p text:style-name="P114"><text:span text:style-name="T91">aHa.n wd</text:span><text:span text:style-name="T154">n</text:span><text:span text:style-name="T156">(.w)</text:span><text:span text:style-name="T91"> nxb</text:span><text:span text:style-name="T155">(.t)</text:span><text:span text:style-name="T154">=s</text:span><text:span text:style-name="T91"> </text:span><text:span text:style-name="T157">N</text:span><text:span text:style-name="T91">sw.t </text:span><text:span text:style-name="T157">W</text:span><text:span text:style-name="T91">r.t Nfr.w-</text:span><text:span text:style-name="T157">Ra</text:span></text:p>
      <text:p text:style-name="P114"><text:span text:style-name="T158">spr</text:span><text:span text:style-name="T146"> Hm=f </text:span><text:span text:style-name="T147">r Km.t</text:span></text:p>
      <text:p text:style-name="P115"><text:span text:style-name="T147">i</text:span><text:span text:style-name="T167">r.n=s irty nb </text:span><text:span text:style-name="T159">Hm.</text:span><text:span text:style-name="T160">t</text:span><text:span text:style-name="T159">-</text:span><text:span text:style-name="T167">nsw</text:span></text:p>
      <text:p text:style-name="P121"/>
      <text:p text:style-name="P115"><text:span text:style-name="T115">x</text:span><text:span text:style-name="T91">pr </text:span><text:span text:style-name="T168">Hsb.t 15 Smw </text:span><text:span text:style-name="T169">(2)</text:span><text:span text:style-name="T168"> sw 22</text:span></text:p>
      <text:p text:style-name="P116"><text:span text:style-name="T168">i</text:span><text:span text:style-name="T91">sk Hm=f </text:span><text:span text:style-name="T175">m </text:span><text:span text:style-name="T91">WAs.t Nx.t </text:span><text:span text:style-name="T176">@m</text:span><text:span text:style-name="T170">.t </text:span><text:span text:style-name="T176">N</text:span><text:span text:style-name="T170">i</text:span><text:span text:style-name="T171">w.wt</text:span></text:p>
      <text:p text:style-name="P117"><text:span text:style-name="T91">Hr ir</text:span><text:span text:style-name="T177">{</text:span><text:span text:style-name="T91">y</text:span><text:span text:style-name="T177">}&lt;.t&gt;</text:span><text:span text:style-name="T91"> </text:span><text:span text:style-name="T206">(7)</text:span><text:span text:style-name="T182"> </text:span><text:span text:style-name="T91">Hs</text:span><text:span text:style-name="T195">(ty)</text:span><text:span text:style-name="T91"> n </text:span><text:span text:style-name="T178">(i)</text:span><text:span text:style-name="T172">t</text:span><text:span text:style-name="T180">=f</text:span><text:span text:style-name="T172"> Imn-</text:span><text:span text:style-name="T179">Ra </text:span><text:span text:style-name="T172">Nb </text:span><text:span text:style-name="T181">Nsw.t</text:span><text:span text:style-name="T173"> &amp;A.wy</text:span></text:p>
      <text:p text:style-name="P118"><text:span text:style-name="T183">m </text:span><text:span text:style-name="T91">hb=f nfr </text:span><text:span text:style-name="T184">n</text:span><text:span text:style-name="T91"> </text:span><text:span text:style-name="T185">I</text:span><text:span text:style-name="T91">p</text:span><text:span text:style-name="T185">(.t)</text:span><text:span text:style-name="T91"> </text:span><text:span text:style-name="T186">s.t</text:span><text:span text:style-name="T174"> ib=f nt sp tp</text:span></text:p>
      <text:p text:style-name="P119"><text:span text:style-name="T91">i</text:span><text:span text:style-name="T187">i</text:span><text:span text:style-name="T91">.tw r Dd n Hm=f</text:span></text:p>
      <text:p text:style-name="P119"><text:span text:style-name="T91">wn wp.</text:span><text:span text:style-name="T190">(</text:span><text:span text:style-name="T189">wt)</text:span><text:span text:style-name="T91"> ii.n pA wr n Bxt</text:span><text:span text:style-name="T188">n</text:span><text:span text:style-name="T91"> </text:span><text:span text:style-name="T191">iw</text:span><text:span text:style-name="T91"> Xr </text:span><text:span text:style-name="T192">in.</text:span><text:span text:style-name="T191">w</text:span><text:span text:style-name="T91"> </text:span><text:span text:style-name="T191">aS(A)</text:span><text:span text:style-name="T194">{</text:span><text:span text:style-name="T193">t</text:span><text:span text:style-name="T194">}</text:span><text:span text:style-name="T91"> n nsw.t</text:span></text:p>
      <text:p text:style-name="P48"/>
      <text:p text:style-name="P48"/>
      <text:p text:style-name="P67">Then <text:span text:style-name="T239">her titulary [F 138] </text:span><text:span text:style-name="T240">was recorded [F 73] [past passive]: </text:span><text:span text:style-name="T241">Great Queen Neferure.</text:span></text:p>
      <text:p text:style-name="P62">As the king returned <text:span text:style-name="T244">[second tense?]</text:span> to <text:span text:style-name="T242">the Black Lan</text:span><text:span text:style-name="T243">d</text:span>,</text:p>
      <text:p text:style-name="P68"><text:span text:style-name="T244">so she did every doing </text:span><text:span text:style-name="T272">[</text:span><text:span text:style-name="T273">wh</text:span><text:span text:style-name="T274">ich</text:span><text:span text:style-name="T273"> </text:span><text:span text:style-name="T272">noun </text:span><text:span text:style-name="T273">form?</text:span><text:span text:style-name="T272">] </text:span><text:span text:style-name="T244">of a king’s wife </text:span><text:span text:style-name="T245">[direct genitive]</text:span><text:span text:style-name="T244">.</text:span></text:p>
      <text:p text:style-name="P68"/>
      <text:p text:style-name="P68">It happened <text:span text:style-name="T249">in regnal year 15, month 2 [playful spelling], </text:span><text:span text:style-name="T250">day 22,</text:span></text:p>
      <text:p text:style-name="P70"><text:span text:style-name="T275">lo</text:span> [“non-enclitic” particle, TLA 31760; see also F 30], <text:span text:style-name="T251">his majesty </text:span><text:span text:style-name="T252">[was] in </text:span><text:span text:style-name="T276">Mighty </text:span><text:span text:style-name="T252">Thebes, </text:span><text:span text:style-name="T254">Wife</text:span><text:span text:style-name="T253"> of </text:span><text:span text:style-name="T255">the </text:span><text:span text:style-name="T253">Cities,</text:span></text:p>
      <text:p text:style-name="P71">[and] was doing <text:span text:style-name="T58">(7)</text:span><text:span text:style-name="T262"> </text:span><text:span text:style-name="T256">the rit</text:span><text:span text:style-name="T257">e</text:span><text:span text:style-name="T256">s </text:span><text:span text:style-name="T281">[F 177] </text:span><text:span text:style-name="T257">for </text:span><text:span text:style-name="T258">his father [</text:span><text:span text:style-name="T217">f</text:span><text:span text:style-name="T258"> for both </text:span><text:span text:style-name="T217">it</text:span><text:span text:style-name="T258"> and </text:span><text:span text:style-name="T217">=f</text:span><text:span text:style-name="T258">?], </text:span><text:span text:style-name="T259">Amun-Re, </text:span><text:span text:style-name="T260">Lord </text:span><text:span text:style-name="T261">of Thrones of the Two Lands [TLA 26200],</text:span></text:p>
      <text:p text:style-name="P72">in his fine feast <text:span text:style-name="T263">of Luxor</text:span><text:span text:style-name="T263"><text:note text:id="ftn4" text:note-class="footnote"><text:note-citation>4</text:note-citation><text:note-body><text:p text:style-name="P143"><text:span text:style-name="T209">Ip</text:span><text:span text:style-name="T218">(.t)</text:span> = Ipet = “The Adyton”.</text:p></text:note-body></text:note></text:span><text:span text:style-name="T263"> </text:span><text:span text:style-name="T277">[F 16]</text:span><text:span text:style-name="T263">, </text:span><text:span text:style-name="T264">his heart’s place [direct genitive] </text:span><text:span text:style-name="T265">since [“from”] the </text:span><text:span text:style-name="T278">beginning of time [“foremost</text:span><text:span text:style-name="T265"> time”</text:span><text:span text:style-name="T264">]</text:span><text:span text:style-name="T265">,</text:span></text:p>
      <text:p text:style-name="P73">[when] one came to say to his majesty:</text:p>
      <text:p text:style-name="P74">There <text:span text:style-name="T268">was </text:span><text:span text:style-name="T269">[</text:span><text:span text:style-name="T387">imperfect</text:span><text:span text:style-name="T269"> converter]</text:span> a <text:span text:style-name="T267">messenger</text:span><text:span text:style-name="T266"> [F 17, 60] </text:span><text:span text:style-name="T267">of the chief of Bakhtan </text:span><text:span text:style-name="T280">that</text:span><text:span text:style-name="T279"> came</text:span><text:span text:style-name="T267">, </text:span><text:span text:style-name="T279">with[?]</text:span><text:span text:style-name="T270"> numerous [F 49] presents have come for the queen.</text:span></text:p>
      <text:p text:style-name="P68"/>
      <text:p text:style-name="P65"/>
      <text:p text:style-name="P24"><text:span text:style-name="T119">1</text:span><text:span text:style-name="T91">/</text:span><text:span text:style-name="T174">18</text:span><text:span text:style-name="T91">/2</text:span><text:span text:style-name="T161">6</text:span></text:p>
      <text:p text:style-name="P53"/>
      <text:p text:style-name="P53"/>
      <text:p text:style-name="P122">aHa.n ms<text:span text:style-name="T292">(.w)</text:span><text:span text:style-name="T319">[?]</text:span>=f <text:span text:style-name="T59">(8)</text:span><text:span text:style-name="T282"> m-b</text:span><text:span text:style-name="T293">AH</text:span><text:span text:style-name="T282"> </text:span><text:span text:style-name="T283">Hm=f </text:span><text:span text:style-name="T284">Hna in.w=f</text:span></text:p>
      <text:p text:style-name="P123">Dd=f m <text:span text:style-name="T299">swAS</text:span> Hm=f</text:p>
      <text:p text:style-name="P124">iw n=k <text:span text:style-name="T302">Ra</text:span> n PDt 9 <text:span text:style-name="T303">i</text:span>m<text:span text:style-name="T303">i</text:span> nn anx <text:span text:style-name="T303">x</text:span>r=k</text:p>
      <text:p text:style-name="P125">aHa.n Dd=f sn-<text:span text:style-name="T301">tA</text:span> <text:span text:style-name="T295">m-</text:span>b<text:span text:style-name="T294">A</text:span>H Hm=f <text:span text:style-name="T304">wH</text:span><text:span text:style-name="T285">m=f Dd xr Hm=f</text:span></text:p>
      <text:p text:style-name="P126">ii<text:span text:style-name="T310">=i </text:span>n=k <text:s/>it- <text:span text:style-name="T60">(9)</text:span><text:span text:style-name="T286"> -</text:span>y <text:span text:style-name="T287">nb Hr </text:span><text:span text:style-name="T307">Bn</text:span><text:span text:style-name="T287">t</text:span><text:span text:style-name="T307">rS</text:span><text:span text:style-name="T287"> </text:span><text:span text:style-name="T308">sn</text:span><text:span text:style-name="T287">w.t </text:span><text:span text:style-name="T309">kt n Hm.</text:span><text:span text:style-name="T288">t-nsw Nfr.w-Ra</text:span></text:p>
      <text:p text:style-name="P126"><text:span text:style-name="T288">mn </text:span><text:span text:style-name="T315">Abx(.w)</text:span><text:span text:style-name="T289"> m H</text:span><text:span text:style-name="T315">aw</text:span><text:span text:style-name="T289">=s</text:span></text:p>
      <text:p text:style-name="P50"/>
      <text:p text:style-name="P49"/>
      <text:p text:style-name="P75">Then <text:span text:style-name="T293">he was </text:span><text:span text:style-name="T317">brought </text:span><text:span text:style-name="T293">[</text:span><text:span text:style-name="T324">F 116</text:span><text:span text:style-name="T293">] (8) </text:span><text:span text:style-name="T297">before [“</text:span><text:span text:style-name="T293">into </text:span><text:span text:style-name="T296">the </text:span><text:span text:style-name="T298">potency</text:span><text:span text:style-name="T296"> of”</text:span><text:span text:style-name="T297">] </text:span><text:span text:style-name="T341">[F 77–78]</text:span><text:span text:style-name="T296"> his majesty, with </text:span><text:span text:style-name="T299">his gifts,</text:span></text:p>
      <text:p text:style-name="P76">[and] he said, <text:span text:style-name="T300">in praising [F 216] his majesty,</text:span></text:p>
      <text:p text:style-name="P77"><text:soft-page-break/>Hail to you, Re of the Nine Bows! Give us life from you!</text:p>
      <text:p text:style-name="P78">Then he <text:span text:style-name="T305">spoke </text:span><text:span text:style-name="T306">[tribute]</text:span><text:span text:style-name="T305">, </text:span><text:span text:style-name="T321">kissin</text:span><text:span text:style-name="T305">g the </text:span>earth <text:span text:style-name="T322">[TLA 888530] </text:span><text:span text:style-name="T311">[typo for </text:span><text:span text:style-name="T219">tA</text:span><text:span text:style-name="T311"> in De Buck?] </text:span>before his majesty, <text:span text:style-name="T306">[and] he continued, saying to his majesty:</text:span></text:p>
      <text:p text:style-name="P79">I have come to <text:span text:style-name="T312">you, sovereign, lord, on [account of] Bentresh, </text:span><text:span text:style-name="T313">the younger [“other”] daughter </text:span><text:span text:style-name="T314">of the king’s wife Neferure.</text:span></text:p>
      <text:p text:style-name="P80">Illness has seized [F 2] her body.</text:p>
      <text:p text:style-name="P69"/>
      <text:p text:style-name="P66"/>
      <text:p text:style-name="P25"><text:span text:style-name="T196">2</text:span><text:span text:style-name="T91">/</text:span><text:span text:style-name="T196">1</text:span><text:span text:style-name="T91">/2</text:span><text:span text:style-name="T161">6</text:span></text:p>
      <text:p text:style-name="P54"/>
      <text:p text:style-name="P54"/>
      <text:p text:style-name="P127">i<text:span text:style-name="T327">m</text:span><text:span text:style-name="T320">{</text:span><text:span text:style-name="T316">t</text:span><text:span text:style-name="T320">}</text:span><text:span text:style-name="T318">[?]</text:span><text:span text:style-name="T316"> wD</text:span><text:span text:style-name="T290"> Hm=k rx-</text:span><text:span text:style-name="T325">(</text:span><text:span text:style-name="T316">i</text:span><text:span text:style-name="T325">)</text:span><text:span text:style-name="T290">x.t r mA=s</text:span></text:p>
      <text:p text:style-name="P128">aHa Dd.n Hm=f</text:p>
      <text:p text:style-name="P130">in <text:span text:style-name="T329">n=i</text:span> T<text:span text:style-name="T331">t(iw)</text:span> nt pr-anx <text:span text:style-name="T332">qnb.(w)t</text:span> <text:span text:style-name="T62">(10)</text:span><text:span text:style-name="T291"> n</text:span><text:span text:style-name="T332">T</text:span><text:span text:style-name="T291"> Tnw</text:span></text:p>
      <text:p text:style-name="P130"><text:span text:style-name="T337">s</text:span><text:span text:style-name="T342">TA.</text:span><text:span text:style-name="T336">n=f </text:span><text:span text:style-name="T337">H</text:span><text:span text:style-name="T342">r-</text:span><text:span text:style-name="T337">a</text:span><text:span text:style-name="T342">(wy)</text:span></text:p>
      <text:p text:style-name="P129">Dd Hm=f</text:p>
      <text:p text:style-name="P131"><text:span text:style-name="T344">mt(n)</text:span> <text:span text:style-name="T344">rti </text:span><text:span text:style-name="T347">(tw)</text:span> aS<text:span text:style-name="T346">{t}</text:span>.tw n <text:span text:style-name="T348">{</text:span><text:span text:style-name="T347">t</text:span><text:span text:style-name="T348">}&lt;T&gt;</text:span>n r sDm<text:span text:style-name="T345">=</text:span>tn mdw Tn</text:p>
      <text:p text:style-name="P132">isk in <text:span text:style-name="T350">n</text:span>=i <text:span text:style-name="T349">Hm</text:span>w.t m ib=f sS m <text:span text:style-name="T352">Dbaw</text:span><text:span text:style-name="T338">=f m q</text:span><text:span text:style-name="T356">(A)</text:span><text:span text:style-name="T338">b=tn</text:span></text:p>
      <text:p text:style-name="P133">ii pw &lt;i<text:span text:style-name="T366">r</text:span>&gt; n sS <text:span text:style-name="T55">(11)</text:span> <text:span text:style-name="T357">n</text:span>sw tn +<text:span text:style-name="T358">H</text:span>wt<text:span text:style-name="T358">y-</text:span>m-<text:span text:style-name="T359">@b</text:span><text:span text:style-name="T339"> m-b</text:span><text:span text:style-name="T340">A</text:span><text:span text:style-name="T339">H Hm=f</text:span></text:p>
      <text:p text:style-name="P134"><text:span text:style-name="T363">w</text:span>D.n Hm=f Smy=f r Bxtn Hna wp.<text:span text:style-name="T365">(wt)</text:span> pn</text:p>
      <text:p text:style-name="P135">spr pw ir n <text:span text:style-name="T290">rx-</text:span><text:span text:style-name="T325">(</text:span><text:span text:style-name="T316">i</text:span><text:span text:style-name="T325">)</text:span><text:span text:style-name="T290">x.t </text:span>r Bxtn</text:p>
      <text:p text:style-name="P136"><text:span text:style-name="T369">gm</text:span>.n=f <text:span text:style-name="T370">B</text:span>nt<text:span text:style-name="T370">rS</text:span> m sxr <text:span text:style-name="T371">X</text:span>r ax.<text:span text:style-name="T372">yw</text:span></text:p>
      <text:p text:style-name="P129"/>
      <text:p text:style-name="P144"/>
      <text:p text:style-name="P149">O<text:span text:style-name="T323"> [that] your majesty </text:span><text:span text:style-name="T327">[would] </text:span><text:span text:style-name="T323">command a wise man [</text:span><text:span text:style-name="T326">missing determinative? F 151</text:span><text:span text:style-name="T323">] </text:span><text:span text:style-name="T325">to </text:span><text:span text:style-name="T328">inspect [F 100] her.</text:span></text:p>
      <text:p text:style-name="P150">Then his majesty spoke:</text:p>
      <text:p text:style-name="P151">Bring <text:span text:style-name="T330">to me </text:span><text:span text:style-name="T331">the staff [TLA 177470] of the temple [“house of life”], </text:span><text:span text:style-name="T333">the councils </text:span><text:span text:style-name="T334">[F 280] </text:span><text:span text:style-name="T61">(10)</text:span><text:span text:style-name="T335"> </text:span><text:span text:style-name="T333">of the residence.</text:span></text:p>
      <text:p text:style-name="P154">They were ushered in [F 255] immediately [F 175].</text:p>
      <text:p text:style-name="P155"><text:span text:style-name="T343">Spoke h</text:span>is majesty:</text:p>
      <text:p text:style-name="P156">Look, <text:span text:style-name="T347">it was caused that you were summoned [F 48] </text:span><text:span text:style-name="T348">to this, in order</text:span><text:span text:style-name="T347"> that you </text:span><text:span text:style-name="T348">hear [prospective] these words.</text:span></text:p>
      <text:p text:style-name="P157">Now, bring to me <text:span text:style-name="T351">a </text:span><text:span text:style-name="T353">craftsman </text:span><text:span text:style-name="T351">[F 170] </text:span><text:span text:style-name="T354">in</text:span><text:span text:style-name="T353"> his heart</text:span><text:span text:style-name="T351">, </text:span><text:span text:style-name="T353">a scribe in his fingers, </text:span><text:span text:style-name="T355">[from] within your midst [F 275].</text:span></text:p>
      <text:p text:style-name="P158">There was a coming by a <text:span text:style-name="T359">royal</text:span> <text:span text:style-name="T63">(11)</text:span><text:span text:style-name="T362"> </text:span>scribe, <text:span text:style-name="T359">this </text:span><text:span text:style-name="T360">Thothemheb [</text:span><text:span text:style-name="T220">Hb</text:span><text:span text:style-name="T360"> on F 167], </text:span><text:span text:style-name="T361">before his majesty.</text:span></text:p>
      <text:p text:style-name="P159">His majesty commanded that he go forth to Bakhtan <text:span text:style-name="T364">with this messenger.</text:span></text:p>
      <text:p text:style-name="P160">There was an arrival <text:span text:style-name="T367">by this wise man </text:span><text:span text:style-name="T368">to Bakhtan,</text:span></text:p>
      <text:p text:style-name="P161">[where] he found Bentresh in the state [F 242–243] of [being] upon <text:span text:style-name="T373">spirits </text:span><text:span text:style-name="T374">[F 4],</text:span></text:p>
      <text:p text:style-name="P152"/>
      <text:p text:style-name="P147"/>
      <text:p text:style-name="P26"><text:span text:style-name="T197">4</text:span><text:span text:style-name="T91">/</text:span><text:span text:style-name="T196">1</text:span><text:span text:style-name="T197">9</text:span><text:span text:style-name="T91">/2</text:span><text:span text:style-name="T161">6</text:span></text:p>
      <text:p text:style-name="P55"/>
      <text:p text:style-name="P55"/>
      <text:p text:style-name="P137"><text:span text:style-name="T375">gm</text:span>.n=f <text:span text:style-name="T55">(12)</text:span> sw <text:span text:style-name="T376">xry </text:span><text:span text:style-name="T377">n aHA Hna=f</text:span></text:p>
      <text:p text:style-name="P138">wn wr n Bxtn <text:span text:style-name="T378">wH</text:span><text:span text:style-name="T380">[</text:span><text:span text:style-name="T378">m=f h</text:span><text:span text:style-name="T379">(A)</text:span><text:span text:style-name="T378">b </text:span><text:span text:style-name="T379">m-bAH</text:span><text:span text:style-name="T380">]</text:span><text:span text:style-name="T379"> Hm=f </text:span><text:span text:style-name="T380">m Dd</text:span></text:p>
      <text:p text:style-name="P139">ity nb=i im wD.<text:span text:style-name="T389">{tw}</text:span> Hm=f rdi in.tw nTr[…]</text:p>
      <text:p text:style-name="P139"/>
      <text:p text:style-name="P140"><text:span text:style-name="T65">(13)</text:span><text:span text:style-name="T410"> </text:span>r Hm=f n rnp.t sp 26 Abd <text:span text:style-name="T411">(1)</text:span> Smw sw ifd <text:span text:style-name="T388">H</text:span>b Imn</text:p>
      <text:p text:style-name="P141">iw Hm=f m WAs.t</text:p>
      <text:p text:style-name="P145"><text:soft-page-break/></text:p>
      <text:p text:style-name="P145"/>
      <text:p text:style-name="P162"><text:span text:style-name="T383">[where] h</text:span>e found <text:span text:style-name="T64">(12)</text:span><text:span text:style-name="T381"> </text:span>him<text:span text:style-name="T384">[self]</text:span> an enemy [F 195] <text:span text:style-name="T409">[L 370, 372] </text:span><text:span text:style-name="T377">for fight[ing] with him.</text:span></text:p>
      <text:p text:style-name="P163">There was <text:span text:style-name="T269">[</text:span><text:span text:style-name="T387">imperfect</text:span><text:span text:style-name="T269"> converter] </text:span>a chief of Bakhtan <text:span text:style-name="T382">that [“he”] re</text:span><text:span text:style-name="T385">layed the </text:span><text:span text:style-name="T386">message</text:span><text:span text:style-name="T382"> in the presence of his majesty, saying:</text:span></text:p>
      <text:p text:style-name="P164">Sovereign, my lord, may <text:span text:style-name="T390">your majesty command to cause to be brought a god[</text:span><text:span text:style-name="T392">…]</text:span></text:p>
      <text:p text:style-name="P169"/>
      <text:p text:style-name="P165"><text:span text:style-name="T395">(</text:span><text:span text:style-name="T394">13)</text:span><text:span text:style-name="T391"> </text:span><text:span text:style-name="T397">[to] his majesty in year 26, </text:span><text:span text:style-name="T398">the first month of summer,</text:span><text:span text:style-name="T398"><text:note text:id="ftn5" text:note-class="footnote"><text:note-citation>5</text:note-citation><text:note-body><text:p text:style-name="P167"><text:span text:style-name="T209">Smw</text:span> = Shemu = “Harvest”.</text:p></text:note-body></text:note></text:span><text:span text:style-name="T398"> day four [of] the festival of Amun,</text:span></text:p>
      <text:p text:style-name="P166"><text:span text:style-name="T398">w</text:span><text:span text:style-name="T391">hile his majesty was in Thebes:</text:span></text:p>
      <text:p text:style-name="P153"/>
      <text:p text:style-name="P148"/>
      <text:p text:style-name="P27"><text:span text:style-name="T198">5</text:span><text:span text:style-name="T91">/</text:span><text:span text:style-name="T198">3</text:span><text:span text:style-name="T91">/2</text:span><text:span text:style-name="T161">6</text:span></text:p>
      <text:p text:style-name="P56"/>
      <text:p text:style-name="P56"/>
      <text:p text:style-name="P170"><text:span text:style-name="T393">a</text:span><text:span text:style-name="T391">Ha.n wHm.n Hm=f </text:span><text:span text:style-name="T399">m-b(AH) </text:span><text:span text:style-name="T401">#</text:span><text:span text:style-name="T399">nsw-m-W</text:span><text:span text:style-name="T404">A</text:span><text:span text:style-name="T399">s.t </text:span><text:span text:style-name="T402">N</text:span><text:span text:style-name="T399">fr-H[tp] m-Dd</text:span></text:p>
      <text:p text:style-name="P170"><text:span text:style-name="T399">pA nb nfr ir</text:span><text:span text:style-name="T400">=i </text:span><text:span text:style-name="T402">wH</text:span><text:span text:style-name="T400">m m-b(AH)=k Hr sA.t n pA wr n Bx- </text:span><text:span text:style-name="T396">(14)</text:span><text:span text:style-name="T400"> -tn</text:span></text:p>
      <text:p text:style-name="P172"><text:span text:style-name="T391">aHa.n </text:span><text:span text:style-name="T402">s</text:span><text:span text:style-name="T403">t</text:span><text:span text:style-name="T402">A.</text:span><text:span text:style-name="T391">n </text:span><text:span text:style-name="T401">#</text:span><text:span text:style-name="T391">nsw-m-W</text:span><text:span text:style-name="T404">A</text:span><text:span text:style-name="T391">s.t </text:span><text:span text:style-name="T402">N</text:span><text:span text:style-name="T391">fr-Htp r </text:span><text:span text:style-name="T404">#</text:span><text:span text:style-name="T391">nsw-</text:span><text:span text:style-name="T404">pA-ir-sxr </text:span><text:span text:style-name="T391">nTr </text:span><text:span text:style-name="T405">aA </text:span><text:span text:style-name="T391">sHr</text:span><text:span text:style-name="T406">(i)</text:span><text:span text:style-name="T391"> </text:span><text:span text:style-name="T401">SmA.w</text:span></text:p>
      <text:p text:style-name="P174"><text:span text:style-name="T391">aHa.n Dd.n </text:span><text:span text:style-name="T407">H</text:span><text:span text:style-name="T391">m=f m-b(AH) #nsw-</text:span><text:span text:style-name="T404">m-WAs.t Nfr-Htp</text:span></text:p>
      <text:p text:style-name="P146"/>
      <text:p text:style-name="P146"/>
      <text:p text:style-name="P175">Then his majesty relayed <text:span text:style-name="T412">in the presence </text:span><text:span text:style-name="T413">of Khonsu-of-Thebes Neferhotep, saying:</text:span></text:p>
      <text:p text:style-name="P176">The good lord, I make a report in your presence about [“upon”] [the] daughter of the chief of Bakh- (14) -tan.</text:p>
      <text:p text:style-name="P176"><text:span text:style-name="T417">T</text:span>hen Khonsu-of-Thebes Neferhotep brought [“pulled”] [F 255, <text:span text:style-name="T50">cf.</text:span><text:span text:style-name="T415"> 253</text:span>] <text:span text:style-name="T414">to </text:span>Khonsu-<text:span text:style-name="T414">the-Provider, </text:span><text:span text:style-name="T416">great god that dispels [F 238] disease-demons.</text:span></text:p>
      <text:p text:style-name="P177">Then his majesty said, <text:span text:style-name="T412">in the presence </text:span><text:span text:style-name="T413">of Khonsu-of-Thebes Neferhotep:</text:span></text:p>
      <text:p text:style-name="P177"/>
      <text:p text:style-name="P177"/>
      <text:p text:style-name="P180"><text:span text:style-name="T198">5</text:span><text:span text:style-name="T91">/</text:span><text:span text:style-name="T198">17</text:span><text:span text:style-name="T91">/2</text:span><text:span text:style-name="T161">6</text:span></text:p>
      <text:p text:style-name="P181"/>
      <text:p text:style-name="P181"/>
      <text:p text:style-name="P171"><text:span text:style-name="T408">pA nb nfr iw ir a=k</text:span></text:p>
      <text:p text:style-name="P178"/>
      <text:p text:style-name="P178"/>
      <text:p text:style-name="P179">The good lord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7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1084</meta:editing-cycles>
    <meta:print-date>2025-02-09T21:44:00</meta:print-date>
    <meta:creation-date>2025-01-12T21:03:00</meta:creation-date>
    <dc:date>2026-05-03T16:56:58.670237310</dc:date>
    <meta:editing-duration>P5DT9H16M6S</meta:editing-duration>
    <meta:generator>LibreOffice/7.3.7.2$Linux_X86_64 LibreOffice_project/30$Build-2</meta:generator>
    <meta:document-statistic meta:table-count="1" meta:image-count="0" meta:object-count="0" meta:page-count="7" meta:paragraph-count="171" meta:word-count="1669" meta:character-count="9340" meta:non-whitespace-character-count="7835"/>
    <meta:user-defined meta:name="AppVersion">16.0000</meta:user-defined>
    <meta:template xlink:type="simple" xlink:actuate="onRequest" xlink:title="Normal" xlink:href=""/>
  </office:meta>
</office:document-meta>
</file>