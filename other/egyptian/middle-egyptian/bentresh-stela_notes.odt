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ansliteration" svg:font-family="Transliteration" style:font-pitch="variable"/>
    <style:font-face style:name="Transliteration1" svg:font-family="Transliteration" style:font-family-generic="roman" style:font-pitch="variable"/>
  </office:font-face-decls>
  <office:automatic-styles>
    <style:style style:name="P1" style:family="paragraph" style:parent-style-name="Header">
      <style:text-properties officeooo:paragraph-rsid="00232ec2"/>
    </style:style>
    <style:style style:name="P2" style:family="paragraph" style:parent-style-name="Header">
      <style:paragraph-properties fo:text-align="center" style:justify-single-word="false"/>
      <style:text-properties style:font-name="Arial" fo:font-size="10pt" fo:font-style="normal" fo:font-weight="normal" officeooo:rsid="019ca9fd" officeooo:paragraph-rsid="019ca9f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" style:family="paragraph" style:parent-style-name="Header">
      <style:paragraph-properties fo:text-align="end" style:justify-single-word="false"/>
      <style:text-properties officeooo:paragraph-rsid="00232ec2"/>
    </style:style>
    <style:style style:name="P4" style:family="paragraph" style:parent-style-name="Heading_20_2">
      <style:paragraph-properties fo:text-align="justify" style:justify-single-word="false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style:font-name-complex="Times New Roman2" style:font-size-complex="12pt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officeooo:paragraph-rsid="01c7abc7" style:font-name-complex="Times New Roman2" style:font-size-complex="12pt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officeooo:rsid="01a7f0ad" officeooo:paragraph-rsid="01a7f0ad" style:font-name-complex="Times New Roman2" style:font-size-complex="12pt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officeooo:rsid="01c261d7" officeooo:paragraph-rsid="01c261d7" style:font-name-complex="Times New Roman2" style:font-size-complex="12pt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officeooo:rsid="01c261d7" officeooo:paragraph-rsid="01d04563" style:font-name-complex="Times New Roman2" style:font-size-complex="12pt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officeooo:rsid="01c26810" officeooo:paragraph-rsid="01ce8284" style:font-name-complex="Times New Roman2" style:font-size-complex="12pt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officeooo:rsid="01c26810" officeooo:paragraph-rsid="01c26810" style:font-name-complex="Times New Roman2" style:font-size-complex="12pt"/>
    </style:style>
    <style:style style:name="P12" style:family="paragraph" style:parent-style-name="Standard">
      <style:paragraph-properties fo:margin-top="0in" fo:margin-bottom="0in" style:contextual-spacing="false" fo:line-height="100%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officeooo:paragraph-rsid="019ca9fd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officeooo:paragraph-rsid="01a55361"/>
    </style:style>
    <style:style style:name="P15" style:family="paragraph" style:parent-style-name="Standard">
      <style:paragraph-properties fo:margin-top="0in" fo:margin-bottom="0in" style:contextual-spacing="false" fo:line-height="100%"/>
      <style:text-properties officeooo:paragraph-rsid="01c261d7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officeooo:paragraph-rsid="01c7abc7"/>
    </style:style>
    <style:style style:name="P17" style:family="paragraph" style:parent-style-name="Standard">
      <style:paragraph-properties fo:margin-top="0in" fo:margin-bottom="0in" style:contextual-spacing="false" fo:line-height="100%"/>
      <style:text-properties officeooo:paragraph-rsid="01c854a0"/>
    </style:style>
    <style:style style:name="P18" style:family="paragraph" style:parent-style-name="Standard">
      <style:paragraph-properties fo:margin-top="0in" fo:margin-bottom="0in" style:contextual-spacing="false" fo:line-height="100%"/>
      <style:text-properties fo:font-style="italic" style:font-style-asian="italic" style:font-name-complex="Times New Roman2" style:font-size-complex="12pt" style:font-style-complex="italic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fo:font-style="italic" officeooo:rsid="01b48c9c" officeooo:paragraph-rsid="01b48c9c" style:font-style-asian="italic" style:font-name-complex="Times New Roman2" style:font-size-complex="12pt" style:font-style-complex="italic"/>
    </style:style>
    <style:style style:name="P20" style:family="paragraph" style:parent-style-name="Standard">
      <style:paragraph-properties fo:margin-top="0in" fo:margin-bottom="0in" style:contextual-spacing="false" fo:line-height="100%"/>
      <style:text-properties fo:font-weight="bold" style:font-weight-asian="bold" style:font-name-complex="Times New Roman2" style:font-size-complex="12pt" style:font-weight-complex="bold"/>
    </style:style>
    <style:style style:name="P21" style:family="paragraph" style:parent-style-name="Standard">
      <style:paragraph-properties fo:margin-top="0in" fo:margin-bottom="0in" style:contextual-spacing="false" fo:line-height="100%" fo:break-before="page"/>
      <style:text-properties fo:font-weight="bold" style:font-weight-asian="bold" style:font-name-complex="Times New Roman2" style:font-size-complex="12pt" style:font-weight-complex="bold"/>
    </style:style>
    <style:style style:name="P22" style:family="paragraph" style:parent-style-name="Standard">
      <style:paragraph-properties fo:margin-top="0in" fo:margin-bottom="0in" style:contextual-spacing="false" fo:line-height="100%"/>
      <style:text-properties fo:font-weight="bold" officeooo:rsid="02213c42" officeooo:paragraph-rsid="02213c42" style:font-weight-asian="bold" style:font-weight-complex="bold"/>
    </style:style>
    <style:style style:name="P23" style:family="paragraph" style:parent-style-name="Standard">
      <style:paragraph-properties fo:margin-top="0in" fo:margin-bottom="0in" style:contextual-spacing="false" fo:line-height="100%"/>
      <style:text-properties fo:font-weight="bold" officeooo:rsid="02213c42" officeooo:paragraph-rsid="02791e41" style:font-weight-asian="bold" style:font-weight-complex="bold"/>
    </style:style>
    <style:style style:name="P24" style:family="paragraph" style:parent-style-name="Standard">
      <style:paragraph-properties fo:margin-top="0in" fo:margin-bottom="0in" style:contextual-spacing="false" fo:line-height="100%"/>
      <style:text-properties fo:font-weight="bold" officeooo:rsid="02213c42" officeooo:paragraph-rsid="028c33c7" style:font-weight-asian="bold" style:font-weight-complex="bold"/>
    </style:style>
    <style:style style:name="P25" style:family="paragraph" style:parent-style-name="Standard">
      <style:paragraph-properties fo:margin-top="0in" fo:margin-bottom="0in" style:contextual-spacing="false" fo:line-height="100%"/>
      <style:text-properties fo:font-weight="bold" officeooo:rsid="02213c42" officeooo:paragraph-rsid="03084a2a" style:font-weight-asian="bold" style:font-weight-complex="bold"/>
    </style:style>
    <style:style style:name="P26" style:family="paragraph" style:parent-style-name="Standard">
      <style:paragraph-properties fo:margin-top="0in" fo:margin-bottom="0in" style:contextual-spacing="false" fo:line-height="100%"/>
      <style:text-properties fo:font-weight="bold" officeooo:rsid="02213c42" officeooo:paragraph-rsid="030b386a" style:font-weight-asian="bold" style:font-weight-complex="bold"/>
    </style:style>
    <style:style style:name="P27" style:family="paragraph" style:parent-style-name="Standard">
      <style:paragraph-properties fo:margin-top="0in" fo:margin-bottom="0in" style:contextual-spacing="false" fo:line-height="100%"/>
      <style:text-properties fo:font-weight="bold" officeooo:rsid="02213c42" officeooo:paragraph-rsid="03881bde" style:font-weight-asian="bold" style:font-weight-complex="bold"/>
    </style:style>
    <style:style style:name="P28" style:family="paragraph" style:parent-style-name="Standard">
      <style:paragraph-properties fo:margin-top="0in" fo:margin-bottom="0in" style:contextual-spacing="false" fo:line-height="100%"/>
      <style:text-properties fo:font-weight="bold" officeooo:rsid="02213c42" officeooo:paragraph-rsid="039ead77" style:font-weight-asian="bold" style:font-weight-complex="bold"/>
    </style:style>
    <style:style style:name="P29" style:family="paragraph" style:parent-style-name="Standard">
      <style:paragraph-properties fo:margin-top="0in" fo:margin-bottom="0in" style:contextual-spacing="false" fo:line-height="100%"/>
      <style:text-properties style:font-name="Transliteration1" style:font-name-complex="Times New Roman2" style:font-size-complex="12pt"/>
    </style:style>
    <style:style style:name="P30" style:family="paragraph" style:parent-style-name="Standard">
      <style:paragraph-properties fo:margin-top="0in" fo:margin-bottom="0in" style:contextual-spacing="false" fo:line-height="100%"/>
      <style:text-properties style:font-name="Transliteration1" officeooo:rsid="01c3673a" officeooo:paragraph-rsid="01c3673a" style:font-name-complex="Times New Roman2" style:font-size-complex="12pt"/>
    </style:style>
    <style:style style:name="P31" style:family="paragraph" style:parent-style-name="Standard">
      <style:paragraph-properties fo:margin-top="0in" fo:margin-bottom="0in" style:contextual-spacing="false" fo:line-height="100%"/>
      <style:text-properties style:font-name="Transliteration1" officeooo:rsid="01c3673a" officeooo:paragraph-rsid="01d2748f" style:font-name-complex="Times New Roman2" style:font-size-complex="12pt"/>
    </style:style>
    <style:style style:name="P32" style:family="paragraph" style:parent-style-name="Standard">
      <style:paragraph-properties fo:margin-top="0in" fo:margin-bottom="0in" style:contextual-spacing="false" fo:line-height="100%"/>
      <style:text-properties style:font-name="Transliteration1" officeooo:rsid="01c5b85c" officeooo:paragraph-rsid="01c5b85c" style:font-name-complex="Times New Roman2" style:font-size-complex="12pt"/>
    </style:style>
    <style:style style:name="P33" style:family="paragraph" style:parent-style-name="Standard">
      <style:paragraph-properties fo:margin-top="0in" fo:margin-bottom="0in" style:contextual-spacing="false" fo:line-height="100%"/>
      <style:text-properties style:font-name="Transliteration1" officeooo:rsid="01c5b85c" officeooo:paragraph-rsid="01e9dda9" style:font-name-complex="Times New Roman2" style:font-size-complex="12pt"/>
    </style:style>
    <style:style style:name="P34" style:family="paragraph" style:parent-style-name="Standard">
      <style:paragraph-properties fo:margin-top="0in" fo:margin-bottom="0in" style:contextual-spacing="false" fo:line-height="100%"/>
      <style:text-properties style:font-name="Transliteration1" officeooo:rsid="01bb6611" officeooo:paragraph-rsid="01c261d7" style:font-name-complex="Times New Roman2" style:font-size-complex="12pt"/>
    </style:style>
    <style:style style:name="P35" style:family="paragraph" style:parent-style-name="Standard">
      <style:paragraph-properties fo:margin-top="0in" fo:margin-bottom="0in" style:contextual-spacing="false" fo:line-height="100%"/>
      <style:text-properties style:font-name="Transliteration1" officeooo:rsid="01c854a0" officeooo:paragraph-rsid="01c854a0" style:font-name-complex="Times New Roman2" style:font-size-complex="12pt"/>
    </style:style>
    <style:style style:name="P36" style:family="paragraph" style:parent-style-name="Standard">
      <style:paragraph-properties fo:margin-top="0in" fo:margin-bottom="0in" style:contextual-spacing="false" fo:line-height="100%"/>
      <style:text-properties style:font-name="Transliteration1" officeooo:rsid="01cbb55b" officeooo:paragraph-rsid="01c3673a" style:font-name-complex="Times New Roman2" style:font-size-complex="12pt"/>
    </style:style>
    <style:style style:name="P37" style:family="paragraph" style:parent-style-name="Standard">
      <style:paragraph-properties fo:margin-top="0in" fo:margin-bottom="0in" style:contextual-spacing="false" fo:line-height="100%"/>
      <style:text-properties officeooo:rsid="01a7f0ad" officeooo:paragraph-rsid="01a7f0ad"/>
    </style:style>
    <style:style style:name="P38" style:family="paragraph" style:parent-style-name="Standard">
      <style:paragraph-properties fo:margin-top="0in" fo:margin-bottom="0in" style:contextual-spacing="false" fo:line-height="100%"/>
      <style:text-properties fo:font-style="normal" officeooo:rsid="019cf784" officeooo:paragraph-rsid="019ca9fd" style:font-style-asian="normal" style:font-name-complex="Times New Roman2" style:font-size-complex="12pt" style:font-style-complex="normal"/>
    </style:style>
    <style:style style:name="P39" style:family="paragraph" style:parent-style-name="Standard">
      <style:paragraph-properties fo:margin-top="0in" fo:margin-bottom="0in" style:contextual-spacing="false" fo:line-height="100%"/>
      <style:text-properties fo:font-style="normal" officeooo:rsid="019fff59" officeooo:paragraph-rsid="019fff59" style:font-style-asian="normal" style:font-name-complex="Times New Roman2" style:font-size-complex="12pt" style:font-style-complex="normal"/>
    </style:style>
    <style:style style:name="P40" style:family="paragraph" style:parent-style-name="Standard">
      <style:paragraph-properties fo:margin-top="0in" fo:margin-bottom="0in" style:contextual-spacing="false" fo:line-height="100%"/>
      <style:text-properties fo:font-style="normal" officeooo:rsid="01b186c7" officeooo:paragraph-rsid="019fff59" style:font-style-asian="normal" style:font-name-complex="Times New Roman2" style:font-size-complex="12pt" style:font-style-complex="normal"/>
    </style:style>
    <style:style style:name="P41" style:family="paragraph" style:parent-style-name="Standard">
      <style:paragraph-properties fo:margin-top="0in" fo:margin-bottom="0in" style:contextual-spacing="false" fo:line-height="100%"/>
      <style:text-properties fo:font-style="normal" officeooo:rsid="01b186c7" officeooo:paragraph-rsid="01c7abc7" style:font-style-asian="normal" style:font-name-complex="Times New Roman2" style:font-size-complex="12pt" style:font-style-complex="normal"/>
    </style:style>
    <style:style style:name="P42" style:family="paragraph" style:parent-style-name="Standard">
      <style:paragraph-properties fo:margin-top="0in" fo:margin-bottom="0in" style:contextual-spacing="false" fo:line-height="100%"/>
      <style:text-properties fo:font-style="normal" fo:font-weight="bold" officeooo:rsid="01a55361" officeooo:paragraph-rsid="01ef44e0" style:font-style-asian="normal" style:font-weight-asian="bold" style:font-name-complex="Times New Roman2" style:font-size-complex="12pt" style:font-style-complex="normal" style:font-weight-complex="bold"/>
    </style:style>
    <style:style style:name="P43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1e9dda9" officeooo:paragraph-rsid="01ef44e0" style:font-style-asian="normal" style:font-weight-asian="normal" style:font-name-complex="Times New Roman2" style:font-size-complex="12pt" style:font-style-complex="normal" style:font-weight-complex="normal"/>
    </style:style>
    <style:style style:name="P44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1f05479" officeooo:paragraph-rsid="01f05479" style:font-style-asian="normal" style:font-weight-asian="normal" style:font-name-complex="Times New Roman2" style:font-size-complex="12pt" style:font-style-complex="normal" style:font-weight-complex="normal"/>
    </style:style>
    <style:style style:name="P45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1f1d686" officeooo:paragraph-rsid="01f1d686" style:font-style-asian="normal" style:font-weight-asian="normal" style:font-name-complex="Times New Roman2" style:font-size-complex="12pt" style:font-style-complex="normal" style:font-weight-complex="normal"/>
    </style:style>
    <style:style style:name="P46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1f1d686" officeooo:paragraph-rsid="021bc77b" style:font-style-asian="normal" style:font-weight-asian="normal" style:font-name-complex="Times New Roman2" style:font-size-complex="12pt" style:font-style-complex="normal" style:font-weight-complex="normal"/>
    </style:style>
    <style:style style:name="P47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1ffa615" officeooo:paragraph-rsid="01ff79e8" style:font-style-asian="normal" style:font-weight-asian="normal" style:font-name-complex="Times New Roman2" style:font-size-complex="12pt" style:font-style-complex="normal" style:font-weight-complex="normal"/>
    </style:style>
    <style:style style:name="P48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0f9533" officeooo:paragraph-rsid="020bb4cf" style:font-style-asian="normal" style:font-weight-asian="normal" style:font-name-complex="Times New Roman2" style:font-size-complex="12pt" style:font-style-complex="normal" style:font-weight-complex="normal"/>
    </style:style>
    <style:style style:name="P49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0f9533" officeooo:paragraph-rsid="02791e41" style:font-style-asian="normal" style:font-weight-asian="normal" style:font-name-complex="Times New Roman2" style:font-size-complex="12pt" style:font-style-complex="normal" style:font-weight-complex="normal"/>
    </style:style>
    <style:style style:name="P50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0f9533" officeooo:paragraph-rsid="028d42e0" style:font-style-asian="normal" style:font-weight-asian="normal" style:font-name-complex="Times New Roman2" style:font-size-complex="12pt" style:font-style-complex="normal" style:font-weight-complex="normal"/>
    </style:style>
    <style:style style:name="P51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0f9533" officeooo:paragraph-rsid="02e13cf5" style:font-style-asian="normal" style:font-weight-asian="normal" style:font-name-complex="Times New Roman2" style:font-size-complex="12pt" style:font-style-complex="normal" style:font-weight-complex="normal"/>
    </style:style>
    <style:style style:name="P52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213c42" officeooo:paragraph-rsid="02213c42" style:font-style-asian="normal" style:font-weight-asian="normal" style:font-name-complex="Times New Roman2" style:font-size-complex="12pt" style:font-style-complex="normal" style:font-weight-complex="normal"/>
    </style:style>
    <style:style style:name="P53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213c42" officeooo:paragraph-rsid="02791e41" style:font-style-asian="normal" style:font-weight-asian="normal" style:font-name-complex="Times New Roman2" style:font-size-complex="12pt" style:font-style-complex="normal" style:font-weight-complex="normal"/>
    </style:style>
    <style:style style:name="P54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213c42" officeooo:paragraph-rsid="028c33c7" style:font-style-asian="normal" style:font-weight-asian="normal" style:font-name-complex="Times New Roman2" style:font-size-complex="12pt" style:font-style-complex="normal" style:font-weight-complex="normal"/>
    </style:style>
    <style:style style:name="P55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213c42" officeooo:paragraph-rsid="03084a2a" style:font-style-asian="normal" style:font-weight-asian="normal" style:font-name-complex="Times New Roman2" style:font-size-complex="12pt" style:font-style-complex="normal" style:font-weight-complex="normal"/>
    </style:style>
    <style:style style:name="P56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213c42" officeooo:paragraph-rsid="030b386a" style:font-style-asian="normal" style:font-weight-asian="normal" style:font-name-complex="Times New Roman2" style:font-size-complex="12pt" style:font-style-complex="normal" style:font-weight-complex="normal"/>
    </style:style>
    <style:style style:name="P57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213c42" officeooo:paragraph-rsid="03881bde" style:font-style-asian="normal" style:font-weight-asian="normal" style:font-name-complex="Times New Roman2" style:font-size-complex="12pt" style:font-style-complex="normal" style:font-weight-complex="normal"/>
    </style:style>
    <style:style style:name="P58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213c42" officeooo:paragraph-rsid="039ead77" style:font-style-asian="normal" style:font-weight-asian="normal" style:font-name-complex="Times New Roman2" style:font-size-complex="12pt" style:font-style-complex="normal" style:font-weight-complex="normal"/>
    </style:style>
    <style:style style:name="P59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434945" officeooo:paragraph-rsid="02434945" style:font-style-asian="normal" style:font-weight-asian="normal" style:font-name-complex="Times New Roman2" style:font-size-complex="12pt" style:font-style-complex="normal" style:font-weight-complex="normal"/>
    </style:style>
    <style:style style:name="P60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47238f" officeooo:paragraph-rsid="0247238f" style:font-style-asian="normal" style:font-weight-asian="normal" style:font-name-complex="Times New Roman2" style:font-size-complex="12pt" style:font-style-complex="normal" style:font-weight-complex="normal"/>
    </style:style>
    <style:style style:name="P61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5081b2" officeooo:paragraph-rsid="025081b2" style:font-style-asian="normal" style:font-weight-asian="normal" style:font-name-complex="Times New Roman2" style:font-size-complex="12pt" style:font-style-complex="normal" style:font-weight-complex="normal"/>
    </style:style>
    <style:style style:name="P62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5434b1" officeooo:paragraph-rsid="025434b1" style:font-style-asian="normal" style:font-weight-asian="normal" style:font-name-complex="Times New Roman2" style:font-size-complex="12pt" style:font-style-complex="normal" style:font-weight-complex="normal"/>
    </style:style>
    <style:style style:name="P63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56b750" officeooo:paragraph-rsid="0256b750" style:font-style-asian="normal" style:font-weight-asian="normal" style:font-name-complex="Times New Roman2" style:font-size-complex="12pt" style:font-style-complex="normal" style:font-weight-complex="normal"/>
    </style:style>
    <style:style style:name="P64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6e7f85" officeooo:paragraph-rsid="02801060" style:font-style-asian="normal" style:font-weight-asian="normal" style:font-name-complex="Times New Roman2" style:font-size-complex="12pt" style:font-style-complex="normal" style:font-weight-complex="normal"/>
    </style:style>
    <style:style style:name="P65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76fbb7" officeooo:paragraph-rsid="0276fbb7" style:font-style-asian="normal" style:font-weight-asian="normal" style:font-name-complex="Times New Roman2" style:font-size-complex="12pt" style:font-style-complex="normal" style:font-weight-complex="normal"/>
    </style:style>
    <style:style style:name="P66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76fbb7" officeooo:paragraph-rsid="0260f33f" style:font-style-asian="normal" style:font-weight-asian="normal" style:font-name-complex="Times New Roman2" style:font-size-complex="12pt" style:font-style-complex="normal" style:font-weight-complex="normal"/>
    </style:style>
    <style:style style:name="P67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76fbb7" officeooo:paragraph-rsid="028c33c7" style:font-style-asian="normal" style:font-weight-asian="normal" style:font-name-complex="Times New Roman2" style:font-size-complex="12pt" style:font-style-complex="normal" style:font-weight-complex="normal"/>
    </style:style>
    <style:style style:name="P68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76fbb7" officeooo:paragraph-rsid="03084a2a" style:font-style-asian="normal" style:font-weight-asian="normal" style:font-name-complex="Times New Roman2" style:font-size-complex="12pt" style:font-style-complex="normal" style:font-weight-complex="normal"/>
    </style:style>
    <style:style style:name="P69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60f33f" officeooo:paragraph-rsid="02801060" style:font-style-asian="normal" style:font-weight-asian="normal" style:font-name-complex="Times New Roman2" style:font-size-complex="12pt" style:font-style-complex="normal" style:font-weight-complex="normal"/>
    </style:style>
    <style:style style:name="P70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791e41" officeooo:paragraph-rsid="02801060" style:font-style-asian="normal" style:font-weight-asian="normal" style:font-name-complex="Times New Roman2" style:font-size-complex="12pt" style:font-style-complex="normal" style:font-weight-complex="normal"/>
    </style:style>
    <style:style style:name="P71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791e41" officeooo:paragraph-rsid="0307faf8" style:font-style-asian="normal" style:font-weight-asian="normal" style:font-name-complex="Times New Roman2" style:font-size-complex="12pt" style:font-style-complex="normal" style:font-weight-complex="normal"/>
    </style:style>
    <style:style style:name="P72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929b7c" officeooo:paragraph-rsid="02929b7c" style:font-style-asian="normal" style:font-weight-asian="normal" style:font-name-complex="Times New Roman2" style:font-size-complex="12pt" style:font-style-complex="normal" style:font-weight-complex="normal"/>
    </style:style>
    <style:style style:name="P73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99d1de" officeooo:paragraph-rsid="0299d1de" style:font-style-asian="normal" style:font-weight-asian="normal" style:font-name-complex="Times New Roman2" style:font-size-complex="12pt" style:font-style-complex="normal" style:font-weight-complex="normal"/>
    </style:style>
    <style:style style:name="P74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a824fe" officeooo:paragraph-rsid="02c5cfef" style:font-style-asian="normal" style:font-weight-asian="normal" style:font-name-complex="Times New Roman2" style:font-size-complex="12pt" style:font-style-complex="normal" style:font-weight-complex="normal"/>
    </style:style>
    <style:style style:name="P75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ab4c69" officeooo:paragraph-rsid="02ab4c69" style:font-style-asian="normal" style:font-weight-asian="normal" style:font-name-complex="Times New Roman2" style:font-size-complex="12pt" style:font-style-complex="normal" style:font-weight-complex="normal"/>
    </style:style>
    <style:style style:name="P76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ad1744" officeooo:paragraph-rsid="02b2008c" style:font-style-asian="normal" style:font-weight-asian="normal" style:font-name-complex="Times New Roman2" style:font-size-complex="12pt" style:font-style-complex="normal" style:font-weight-complex="normal"/>
    </style:style>
    <style:style style:name="P77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c9c867" officeooo:paragraph-rsid="02c9c867" style:font-style-asian="normal" style:font-weight-asian="normal" style:font-name-complex="Times New Roman2" style:font-size-complex="12pt" style:font-style-complex="normal" style:font-weight-complex="normal"/>
    </style:style>
    <style:style style:name="P78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efcf31" officeooo:paragraph-rsid="02efcf31" style:font-style-asian="normal" style:font-weight-asian="normal" style:font-name-complex="Times New Roman2" style:font-size-complex="12pt" style:font-style-complex="normal" style:font-weight-complex="normal"/>
    </style:style>
    <style:style style:name="P79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f6ffc2" officeooo:paragraph-rsid="02f6ffc2" style:font-style-asian="normal" style:font-weight-asian="normal" style:font-name-complex="Times New Roman2" style:font-size-complex="12pt" style:font-style-complex="normal" style:font-weight-complex="normal"/>
    </style:style>
    <style:style style:name="P80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f8fadd" officeooo:paragraph-rsid="02f8fadd" style:font-style-asian="normal" style:font-weight-asian="normal" style:font-name-complex="Times New Roman2" style:font-size-complex="12pt" style:font-style-complex="normal" style:font-weight-complex="normal"/>
    </style:style>
    <style:style style:name="P81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fb55ec" officeooo:paragraph-rsid="02fb55ec" style:font-style-asian="normal" style:font-weight-asian="normal" style:font-name-complex="Times New Roman2" style:font-size-complex="12pt" style:font-style-complex="normal" style:font-weight-complex="normal"/>
    </style:style>
    <style:style style:name="P82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307faf8" officeooo:paragraph-rsid="0307faf8" style:font-style-asian="normal" style:font-weight-asian="normal" style:font-name-complex="Times New Roman2" style:font-size-complex="12pt" style:font-style-complex="normal" style:font-weight-complex="normal"/>
    </style:style>
    <style:style style:name="P83" style:family="paragraph" style:parent-style-name="Standard">
      <style:paragraph-properties fo:margin-top="0in" fo:margin-bottom="0in" style:contextual-spacing="false" fo:line-height="100%"/>
      <style:text-properties officeooo:rsid="01b48c9c" officeooo:paragraph-rsid="01b4f3c6"/>
    </style:style>
    <style:style style:name="P84" style:family="paragraph" style:parent-style-name="Footnote">
      <style:text-properties officeooo:rsid="0203bf40" officeooo:paragraph-rsid="0203bf40"/>
    </style:style>
    <style:style style:name="P85" style:family="paragraph" style:parent-style-name="Footnote">
      <style:text-properties officeooo:rsid="020418e5" officeooo:paragraph-rsid="020418e5"/>
    </style:style>
    <style:style style:name="P86" style:family="paragraph" style:parent-style-name="Standard">
      <style:paragraph-properties fo:margin-top="0in" fo:margin-bottom="0in" style:contextual-spacing="false" fo:line-height="100%"/>
      <style:text-properties officeooo:rsid="01c261d7" officeooo:paragraph-rsid="01c261d7"/>
    </style:style>
    <style:style style:name="P87" style:family="paragraph" style:parent-style-name="Standard">
      <style:paragraph-properties fo:margin-top="0in" fo:margin-bottom="0in" style:contextual-spacing="false" fo:line-height="100%"/>
      <style:text-properties officeooo:rsid="01c261d7" officeooo:paragraph-rsid="01ce8284"/>
    </style:style>
    <style:style style:name="P88" style:family="paragraph" style:parent-style-name="Standard">
      <style:paragraph-properties fo:margin-top="0in" fo:margin-bottom="0in" style:contextual-spacing="false" fo:line-height="100%"/>
      <style:text-properties officeooo:rsid="01c261d7" officeooo:paragraph-rsid="01d04563"/>
    </style:style>
    <style:style style:name="P89" style:family="paragraph" style:parent-style-name="Standard">
      <style:paragraph-properties fo:margin-top="0in" fo:margin-bottom="0in" style:contextual-spacing="false" fo:line-height="100%"/>
      <style:text-properties officeooo:rsid="01c3673a" officeooo:paragraph-rsid="01c3673a"/>
    </style:style>
    <style:style style:name="P90" style:family="paragraph" style:parent-style-name="Standard">
      <style:paragraph-properties fo:margin-top="0in" fo:margin-bottom="0in" style:contextual-spacing="false" fo:line-height="100%"/>
      <style:text-properties officeooo:rsid="01c3673a" officeooo:paragraph-rsid="01d04563"/>
    </style:style>
    <style:style style:name="P91" style:family="paragraph" style:parent-style-name="Standard">
      <style:paragraph-properties fo:margin-top="0in" fo:margin-bottom="0in" style:contextual-spacing="false" fo:line-height="100%"/>
      <style:text-properties officeooo:rsid="01c3673a" officeooo:paragraph-rsid="01d2748f"/>
    </style:style>
    <style:style style:name="P92" style:family="paragraph" style:parent-style-name="Standard">
      <style:paragraph-properties fo:margin-top="0in" fo:margin-bottom="0in" style:contextual-spacing="false" fo:line-height="100%"/>
      <style:text-properties officeooo:rsid="01c4d4c4" officeooo:paragraph-rsid="01c4d4c4"/>
    </style:style>
    <style:style style:name="P93" style:family="paragraph" style:parent-style-name="Standard">
      <style:paragraph-properties fo:margin-top="0in" fo:margin-bottom="0in" style:contextual-spacing="false" fo:line-height="100%"/>
      <style:text-properties officeooo:rsid="019fff59" officeooo:paragraph-rsid="019fff59"/>
    </style:style>
    <style:style style:name="P94" style:family="paragraph" style:parent-style-name="Standard">
      <style:paragraph-properties fo:margin-top="0in" fo:margin-bottom="0in" style:contextual-spacing="false" fo:line-height="100%"/>
      <style:text-properties officeooo:rsid="019fff59" officeooo:paragraph-rsid="01c7abc7"/>
    </style:style>
    <style:style style:name="P95" style:family="paragraph" style:parent-style-name="Standard">
      <style:paragraph-properties fo:margin-top="0in" fo:margin-bottom="0in" style:contextual-spacing="false" fo:line-height="100%"/>
      <style:text-properties officeooo:rsid="01c854a0" officeooo:paragraph-rsid="01c972dc"/>
    </style:style>
    <style:style style:name="P96" style:family="paragraph" style:parent-style-name="Standard">
      <style:paragraph-properties fo:margin-top="0in" fo:margin-bottom="0in" style:contextual-spacing="false" fo:line-height="100%"/>
      <style:text-properties officeooo:rsid="01db2508" officeooo:paragraph-rsid="01db2508"/>
    </style:style>
    <style:style style:name="P97" style:family="paragraph" style:parent-style-name="Standard">
      <style:paragraph-properties fo:margin-top="0in" fo:margin-bottom="0in" style:contextual-spacing="false" fo:line-height="100%"/>
      <style:text-properties officeooo:rsid="01e0946c" officeooo:paragraph-rsid="01e0946c"/>
    </style:style>
    <style:style style:name="P98" style:family="paragraph" style:parent-style-name="Standard">
      <style:paragraph-properties fo:margin-top="0in" fo:margin-bottom="0in" style:contextual-spacing="false" fo:line-height="100%"/>
      <style:text-properties officeooo:rsid="01e3e1e7" officeooo:paragraph-rsid="01e9dda9"/>
    </style:style>
    <style:style style:name="P99" style:family="paragraph" style:parent-style-name="Standard">
      <style:paragraph-properties fo:margin-top="0in" fo:margin-bottom="0in" style:contextual-spacing="false" fo:line-height="100%"/>
      <style:text-properties officeooo:rsid="01e9dda9" officeooo:paragraph-rsid="01e9dda9"/>
    </style:style>
    <style:style style:name="P100" style:family="paragraph" style:parent-style-name="Standard">
      <style:paragraph-properties fo:margin-top="0in" fo:margin-bottom="0in" style:contextual-spacing="false" fo:line-height="100%"/>
      <style:text-properties officeooo:rsid="01e9dda9" officeooo:paragraph-rsid="01ef44e0"/>
    </style:style>
    <style:style style:name="P101" style:family="paragraph" style:parent-style-name="Standard">
      <style:paragraph-properties fo:margin-top="0in" fo:margin-bottom="0in" style:contextual-spacing="false" fo:line-height="100%"/>
      <style:text-properties fo:font-weight="normal" officeooo:rsid="01f1d686" officeooo:paragraph-rsid="01fe77c8" style:font-weight-asian="normal" style:font-weight-complex="normal"/>
    </style:style>
    <style:style style:name="P102" style:family="paragraph" style:parent-style-name="Standard">
      <style:paragraph-properties fo:margin-top="0in" fo:margin-bottom="0in" style:contextual-spacing="false" fo:line-height="100%"/>
      <style:text-properties fo:font-weight="normal" officeooo:rsid="01fe2848" officeooo:paragraph-rsid="01fe2848" style:font-weight-asian="normal" style:font-weight-complex="normal"/>
    </style:style>
    <style:style style:name="P103" style:family="paragraph" style:parent-style-name="Standard">
      <style:paragraph-properties fo:margin-top="0in" fo:margin-bottom="0in" style:contextual-spacing="false" fo:line-height="100%"/>
      <style:text-properties fo:font-weight="normal" officeooo:rsid="01fe77c8" officeooo:paragraph-rsid="01ff79e8" style:font-weight-asian="normal" style:font-weight-complex="normal"/>
    </style:style>
    <style:style style:name="P104" style:family="paragraph" style:parent-style-name="Standard">
      <style:paragraph-properties fo:margin-top="0in" fo:margin-bottom="0in" style:contextual-spacing="false" fo:line-height="100%"/>
      <style:text-properties fo:font-weight="normal" officeooo:rsid="020bb4cf" officeooo:paragraph-rsid="020bb4cf" style:font-weight-asian="normal" style:font-weight-complex="normal"/>
    </style:style>
    <style:style style:name="P105" style:family="paragraph" style:parent-style-name="Standard">
      <style:paragraph-properties fo:margin-top="0in" fo:margin-bottom="0in" style:contextual-spacing="false" fo:line-height="100%"/>
      <style:text-properties fo:font-weight="normal" officeooo:rsid="0221e33b" officeooo:paragraph-rsid="0221e33b" style:font-weight-asian="normal" style:font-weight-complex="normal"/>
    </style:style>
    <style:style style:name="P106" style:family="paragraph" style:parent-style-name="Standard">
      <style:paragraph-properties fo:margin-top="0in" fo:margin-bottom="0in" style:contextual-spacing="false" fo:line-height="100%"/>
      <style:text-properties fo:font-weight="normal" officeooo:rsid="022f394e" officeooo:paragraph-rsid="027daf88" style:font-weight-asian="normal" style:font-weight-complex="normal"/>
    </style:style>
    <style:style style:name="P107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1f1d686" officeooo:paragraph-rsid="01f1d686" style:font-weight-asian="normal" style:font-weight-complex="normal"/>
    </style:style>
    <style:style style:name="P108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1f2f136" officeooo:paragraph-rsid="01f2f136" style:font-weight-asian="normal" style:font-weight-complex="normal"/>
    </style:style>
    <style:style style:name="P109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1f3155d" officeooo:paragraph-rsid="01f3155d" style:font-weight-asian="normal" style:font-weight-complex="normal"/>
    </style:style>
    <style:style style:name="P110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05d3b7" officeooo:paragraph-rsid="020f9533" style:font-weight-asian="normal" style:font-weight-complex="normal"/>
    </style:style>
    <style:style style:name="P111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1a2de0" officeooo:paragraph-rsid="021a2de0" style:font-weight-asian="normal" style:font-weight-complex="normal"/>
    </style:style>
    <style:style style:name="P112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1a2de0" officeooo:paragraph-rsid="02213c42" style:font-weight-asian="normal" style:font-weight-complex="normal"/>
    </style:style>
    <style:style style:name="P113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392e16" officeooo:paragraph-rsid="02392e16" style:font-weight-asian="normal" style:font-weight-complex="normal"/>
    </style:style>
    <style:style style:name="P114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3cc759" officeooo:paragraph-rsid="024dd552" style:font-weight-asian="normal" style:font-weight-complex="normal"/>
    </style:style>
    <style:style style:name="P115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3de31a" officeooo:paragraph-rsid="025248c6" style:font-weight-asian="normal" style:font-weight-complex="normal"/>
    </style:style>
    <style:style style:name="P116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3e9dd4" officeooo:paragraph-rsid="02801060" style:font-weight-asian="normal" style:font-weight-complex="normal"/>
    </style:style>
    <style:style style:name="P117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791e41" officeooo:paragraph-rsid="02801060" style:font-weight-asian="normal" style:font-weight-complex="normal"/>
    </style:style>
    <style:style style:name="P118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856ba3" officeooo:paragraph-rsid="02856ba3" style:font-weight-asian="normal" style:font-weight-complex="normal"/>
    </style:style>
    <style:style style:name="P119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869178" officeooo:paragraph-rsid="02869178" style:font-weight-asian="normal" style:font-weight-complex="normal"/>
    </style:style>
    <style:style style:name="P120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887cfd" officeooo:paragraph-rsid="02887cfd" style:font-weight-asian="normal" style:font-weight-complex="normal"/>
    </style:style>
    <style:style style:name="P121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8c33c7" officeooo:paragraph-rsid="028c33c7" style:font-weight-asian="normal" style:font-weight-complex="normal"/>
    </style:style>
    <style:style style:name="P122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1f3155d" officeooo:paragraph-rsid="01f3155d" style:font-style-asian="normal" style:font-weight-asian="normal" style:font-name-complex="Times New Roman2" style:font-size-complex="12pt" style:font-style-complex="normal" style:font-weight-complex="normal"/>
    </style:style>
    <style:style style:name="P123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24299bb" officeooo:paragraph-rsid="02801060" style:font-style-asian="normal" style:font-weight-asian="normal" style:font-name-complex="Times New Roman2" style:font-size-complex="12pt" style:font-style-complex="normal" style:font-weight-complex="normal"/>
    </style:style>
    <style:style style:name="P124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2213c42" officeooo:paragraph-rsid="028c33c7" style:font-style-asian="normal" style:font-weight-asian="normal" style:font-name-complex="Times New Roman2" style:font-size-complex="12pt" style:font-style-complex="normal" style:font-weight-complex="normal"/>
    </style:style>
    <style:style style:name="P125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2d93565" officeooo:paragraph-rsid="02d93565" style:font-style-asian="normal" style:font-weight-asian="normal" style:font-name-complex="Times New Roman2" style:font-size-complex="12pt" style:font-style-complex="normal" style:font-weight-complex="normal"/>
    </style:style>
    <style:style style:name="P126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2db2328" officeooo:paragraph-rsid="02db2328" style:font-style-asian="normal" style:font-weight-asian="normal" style:font-name-complex="Times New Roman2" style:font-size-complex="12pt" style:font-style-complex="normal" style:font-weight-complex="normal"/>
    </style:style>
    <style:style style:name="P127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2db2328" officeooo:paragraph-rsid="02f8fadd" style:font-style-asian="normal" style:font-weight-asian="normal" style:font-name-complex="Times New Roman2" style:font-size-complex="12pt" style:font-style-complex="normal" style:font-weight-complex="normal"/>
    </style:style>
    <style:style style:name="P128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2dc8184" officeooo:paragraph-rsid="03064108" style:font-style-asian="normal" style:font-weight-asian="normal" style:font-name-complex="Times New Roman2" style:font-size-complex="12pt" style:font-style-complex="normal" style:font-weight-complex="normal"/>
    </style:style>
    <style:style style:name="P129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2e13cf5" officeooo:paragraph-rsid="03107b0d" style:font-style-asian="normal" style:font-weight-asian="normal" style:font-name-complex="Times New Roman2" style:font-size-complex="12pt" style:font-style-complex="normal" style:font-weight-complex="normal"/>
    </style:style>
    <style:style style:name="P130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2e39e0f" officeooo:paragraph-rsid="03107b0d" style:font-style-asian="normal" style:font-weight-asian="normal" style:font-name-complex="Times New Roman2" style:font-size-complex="12pt" style:font-style-complex="normal" style:font-weight-complex="normal"/>
    </style:style>
    <style:style style:name="P131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2d69bf" officeooo:paragraph-rsid="032d69bf" style:font-style-asian="normal" style:font-weight-asian="normal" style:font-name-complex="Times New Roman2" style:font-size-complex="12pt" style:font-style-complex="normal" style:font-weight-complex="normal"/>
    </style:style>
    <style:style style:name="P132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2e50ca6" officeooo:paragraph-rsid="032d69bf" style:font-style-asian="normal" style:font-weight-asian="normal" style:font-name-complex="Times New Roman2" style:font-size-complex="12pt" style:font-style-complex="normal" style:font-weight-complex="normal"/>
    </style:style>
    <style:style style:name="P133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2eab97" officeooo:paragraph-rsid="032eab97" style:font-style-asian="normal" style:font-weight-asian="normal" style:font-name-complex="Times New Roman2" style:font-size-complex="12pt" style:font-style-complex="normal" style:font-weight-complex="normal"/>
    </style:style>
    <style:style style:name="P134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308866" officeooo:paragraph-rsid="03308866" style:font-style-asian="normal" style:font-weight-asian="normal" style:font-name-complex="Times New Roman2" style:font-size-complex="12pt" style:font-style-complex="normal" style:font-weight-complex="normal"/>
    </style:style>
    <style:style style:name="P135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3158a2" officeooo:paragraph-rsid="033158a2" style:font-style-asian="normal" style:font-weight-asian="normal" style:font-name-complex="Times New Roman2" style:font-size-complex="12pt" style:font-style-complex="normal" style:font-weight-complex="normal"/>
    </style:style>
    <style:style style:name="P136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369c0c" officeooo:paragraph-rsid="03369c0c" style:font-style-asian="normal" style:font-weight-asian="normal" style:font-name-complex="Times New Roman2" style:font-size-complex="12pt" style:font-style-complex="normal" style:font-weight-complex="normal"/>
    </style:style>
    <style:style style:name="P137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3785ad" officeooo:paragraph-rsid="03605a2b" style:font-style-asian="normal" style:font-weight-asian="normal" style:font-name-complex="Times New Roman2" style:font-size-complex="12pt" style:font-style-complex="normal" style:font-weight-complex="normal"/>
    </style:style>
    <style:style style:name="P138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395c7f" officeooo:paragraph-rsid="03395c7f" style:font-style-asian="normal" style:font-weight-asian="normal" style:font-name-complex="Times New Roman2" style:font-size-complex="12pt" style:font-style-complex="normal" style:font-weight-complex="normal"/>
    </style:style>
    <style:style style:name="P139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39ad32" officeooo:paragraph-rsid="036042c5" style:font-style-asian="normal" style:font-weight-asian="normal" style:font-name-complex="Times New Roman2" style:font-size-complex="12pt" style:font-style-complex="normal" style:font-weight-complex="normal"/>
    </style:style>
    <style:style style:name="P140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6ef9e4" officeooo:paragraph-rsid="036ef9e4" style:font-style-asian="normal" style:font-weight-asian="normal" style:font-name-complex="Times New Roman2" style:font-size-complex="12pt" style:font-style-complex="normal" style:font-weight-complex="normal"/>
    </style:style>
    <style:style style:name="P141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7e04f9" officeooo:paragraph-rsid="037e04f9" style:font-style-asian="normal" style:font-weight-asian="normal" style:font-name-complex="Times New Roman2" style:font-size-complex="12pt" style:font-style-complex="normal" style:font-weight-complex="normal"/>
    </style:style>
    <style:style style:name="P142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7f484d" officeooo:paragraph-rsid="037f484d" style:font-style-asian="normal" style:font-weight-asian="normal" style:font-name-complex="Times New Roman2" style:font-size-complex="12pt" style:font-style-complex="normal" style:font-weight-complex="normal"/>
    </style:style>
    <style:style style:name="P143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8b4acf" officeooo:paragraph-rsid="038b4acf" style:font-style-asian="normal" style:font-weight-asian="normal" style:font-name-complex="Times New Roman2" style:font-size-complex="12pt" style:font-style-complex="normal" style:font-weight-complex="normal"/>
    </style:style>
    <style:style style:name="P144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8fae10" officeooo:paragraph-rsid="0396cd3d" style:font-style-asian="normal" style:font-weight-asian="normal" style:font-name-complex="Times New Roman2" style:font-size-complex="12pt" style:font-style-complex="normal" style:font-weight-complex="normal"/>
    </style:style>
    <style:style style:name="P145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96cd3d" officeooo:paragraph-rsid="0396cd3d" style:font-style-asian="normal" style:font-weight-asian="normal" style:font-name-complex="Times New Roman2" style:font-size-complex="12pt" style:font-style-complex="normal" style:font-weight-complex="normal"/>
    </style:style>
    <style:style style:name="P146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97786a" officeooo:paragraph-rsid="0397786a" style:font-style-asian="normal" style:font-weight-asian="normal" style:font-name-complex="Times New Roman2" style:font-size-complex="12pt" style:font-style-complex="normal" style:font-weight-complex="normal"/>
    </style:style>
    <style:style style:name="P147" style:family="paragraph" style:parent-style-name="Standard">
      <style:paragraph-properties fo:margin-top="0in" fo:margin-bottom="0in" style:contextual-spacing="false" fo:line-height="100%"/>
      <style:text-properties officeooo:rsid="021771c9" officeooo:paragraph-rsid="021771c9"/>
    </style:style>
    <style:style style:name="P148" style:family="paragraph" style:parent-style-name="Footnote">
      <style:text-properties officeooo:rsid="02bbbc96" officeooo:paragraph-rsid="02bbbc96"/>
    </style:style>
    <style:style style:name="P149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20f9533" officeooo:paragraph-rsid="03097544" style:font-style-asian="normal" style:font-weight-asian="normal" style:font-name-complex="Times New Roman2" style:font-size-complex="12pt" style:font-style-complex="normal" style:font-weight-complex="normal"/>
    </style:style>
    <style:style style:name="P150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20f9533" officeooo:paragraph-rsid="030b386a" style:font-style-asian="normal" style:font-weight-asian="normal" style:font-name-complex="Times New Roman2" style:font-size-complex="12pt" style:font-style-complex="normal" style:font-weight-complex="normal"/>
    </style:style>
    <style:style style:name="P151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20f9533" officeooo:paragraph-rsid="038fae10" style:font-style-asian="normal" style:font-weight-asian="normal" style:font-name-complex="Times New Roman2" style:font-size-complex="12pt" style:font-style-complex="normal" style:font-weight-complex="normal"/>
    </style:style>
    <style:style style:name="P152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20f9533" officeooo:paragraph-rsid="039ead77" style:font-style-asian="normal" style:font-weight-asian="normal" style:font-name-complex="Times New Roman2" style:font-size-complex="12pt" style:font-style-complex="normal" style:font-weight-complex="normal"/>
    </style:style>
    <style:style style:name="P153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2c9c867" officeooo:paragraph-rsid="03097544" style:font-style-asian="normal" style:font-weight-asian="normal" style:font-name-complex="Times New Roman2" style:font-size-complex="12pt" style:font-style-complex="normal" style:font-weight-complex="normal"/>
    </style:style>
    <style:style style:name="P154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2c9c867" officeooo:paragraph-rsid="03881bde" style:font-style-asian="normal" style:font-weight-asian="normal" style:font-name-complex="Times New Roman2" style:font-size-complex="12pt" style:font-style-complex="normal" style:font-weight-complex="normal"/>
    </style:style>
    <style:style style:name="P155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163ce8" officeooo:paragraph-rsid="03163ce8" style:font-style-asian="normal" style:font-weight-asian="normal" style:font-name-complex="Times New Roman2" style:font-size-complex="12pt" style:font-style-complex="normal" style:font-weight-complex="normal"/>
    </style:style>
    <style:style style:name="P156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1cd793" officeooo:paragraph-rsid="031cd793" style:font-style-asian="normal" style:font-weight-asian="normal" style:font-name-complex="Times New Roman2" style:font-size-complex="12pt" style:font-style-complex="normal" style:font-weight-complex="normal"/>
    </style:style>
    <style:style style:name="P157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2317d7" officeooo:paragraph-rsid="032317d7" style:font-style-asian="normal" style:font-weight-asian="normal" style:font-name-complex="Times New Roman2" style:font-size-complex="12pt" style:font-style-complex="normal" style:font-weight-complex="normal"/>
    </style:style>
    <style:style style:name="P158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2317d7" officeooo:paragraph-rsid="03605a2b" style:font-style-asian="normal" style:font-weight-asian="normal" style:font-name-complex="Times New Roman2" style:font-size-complex="12pt" style:font-style-complex="normal" style:font-weight-complex="normal"/>
    </style:style>
    <style:style style:name="P159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2317d7" officeooo:paragraph-rsid="03881bde" style:font-style-asian="normal" style:font-weight-asian="normal" style:font-name-complex="Times New Roman2" style:font-size-complex="12pt" style:font-style-complex="normal" style:font-weight-complex="normal"/>
    </style:style>
    <style:style style:name="P160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3b4b47" officeooo:paragraph-rsid="033b4b47" style:font-style-asian="normal" style:font-weight-asian="normal" style:font-name-complex="Times New Roman2" style:font-size-complex="12pt" style:font-style-complex="normal" style:font-weight-complex="normal"/>
    </style:style>
    <style:style style:name="P161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3c7175" officeooo:paragraph-rsid="033c7175" style:font-style-asian="normal" style:font-weight-asian="normal" style:font-name-complex="Times New Roman2" style:font-size-complex="12pt" style:font-style-complex="normal" style:font-weight-complex="normal"/>
    </style:style>
    <style:style style:name="P162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3dea4f" officeooo:paragraph-rsid="033dea4f" style:font-style-asian="normal" style:font-weight-asian="normal" style:font-name-complex="Times New Roman2" style:font-size-complex="12pt" style:font-style-complex="normal" style:font-weight-complex="normal"/>
    </style:style>
    <style:style style:name="P163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4aa78b" officeooo:paragraph-rsid="034aa78b" style:font-style-asian="normal" style:font-weight-asian="normal" style:font-name-complex="Times New Roman2" style:font-size-complex="12pt" style:font-style-complex="normal" style:font-weight-complex="normal"/>
    </style:style>
    <style:style style:name="P164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542469" officeooo:paragraph-rsid="03542469" style:font-style-asian="normal" style:font-weight-asian="normal" style:font-name-complex="Times New Roman2" style:font-size-complex="12pt" style:font-style-complex="normal" style:font-weight-complex="normal"/>
    </style:style>
    <style:style style:name="P165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5b4de8" officeooo:paragraph-rsid="035b4de8" style:font-style-asian="normal" style:font-weight-asian="normal" style:font-name-complex="Times New Roman2" style:font-size-complex="12pt" style:font-style-complex="normal" style:font-weight-complex="normal"/>
    </style:style>
    <style:style style:name="P166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605a2b" officeooo:paragraph-rsid="03605a2b" style:font-style-asian="normal" style:font-weight-asian="normal" style:font-name-complex="Times New Roman2" style:font-size-complex="12pt" style:font-style-complex="normal" style:font-weight-complex="normal"/>
    </style:style>
    <style:style style:name="P167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6667c8" officeooo:paragraph-rsid="036667c8" style:font-style-asian="normal" style:font-weight-asian="normal" style:font-name-complex="Times New Roman2" style:font-size-complex="12pt" style:font-style-complex="normal" style:font-weight-complex="normal"/>
    </style:style>
    <style:style style:name="P168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6c28de" officeooo:paragraph-rsid="036c28de" style:font-style-asian="normal" style:font-weight-asian="normal" style:font-name-complex="Times New Roman2" style:font-size-complex="12pt" style:font-style-complex="normal" style:font-weight-complex="normal"/>
    </style:style>
    <style:style style:name="P169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768f31" officeooo:paragraph-rsid="037d0e1e" style:font-style-asian="normal" style:font-weight-asian="normal" style:font-name-complex="Times New Roman2" style:font-size-complex="12pt" style:font-style-complex="normal" style:font-weight-complex="normal"/>
    </style:style>
    <style:style style:name="P170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81a53c" officeooo:paragraph-rsid="0381a53c" style:font-style-asian="normal" style:font-weight-asian="normal" style:font-name-complex="Times New Roman2" style:font-size-complex="12pt" style:font-style-complex="normal" style:font-weight-complex="normal"/>
    </style:style>
    <style:style style:name="P171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8560c0" officeooo:paragraph-rsid="038560c0" style:font-style-asian="normal" style:font-weight-asian="normal" style:font-name-complex="Times New Roman2" style:font-size-complex="12pt" style:font-style-complex="normal" style:font-weight-complex="normal"/>
    </style:style>
    <style:style style:name="P172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8b69e0" officeooo:paragraph-rsid="038b69e0" style:font-style-asian="normal" style:font-weight-asian="normal" style:font-name-complex="Times New Roman2" style:font-size-complex="12pt" style:font-style-complex="normal" style:font-weight-complex="normal"/>
    </style:style>
    <style:style style:name="P173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8fae10" officeooo:paragraph-rsid="038fae10" style:font-style-asian="normal" style:font-weight-asian="normal" style:font-name-complex="Times New Roman2" style:font-size-complex="12pt" style:font-style-complex="normal" style:font-weight-complex="normal"/>
    </style:style>
    <style:style style:name="P174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980688" officeooo:paragraph-rsid="03980688" style:font-style-asian="normal" style:font-weight-asian="normal" style:font-name-complex="Times New Roman2" style:font-size-complex="12pt" style:font-style-complex="normal" style:font-weight-complex="normal"/>
    </style:style>
    <style:style style:name="P175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9d49a3" officeooo:paragraph-rsid="039d49a3" style:font-style-asian="normal" style:font-weight-asian="normal" style:font-name-complex="Times New Roman2" style:font-size-complex="12pt" style:font-style-complex="normal" style:font-weight-complex="normal"/>
    </style:style>
    <style:style style:name="P176" style:family="paragraph" style:parent-style-name="Footnote">
      <style:text-properties officeooo:rsid="039136cd" officeooo:paragraph-rsid="039136cd"/>
    </style:style>
    <style:style style:name="P177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imes New Roman" fo:letter-spacing="normal" fo:font-style="normal" fo:font-weight="normal" officeooo:rsid="038348e6" officeooo:paragraph-rsid="0381a53c" style:font-style-asian="normal" style:font-weight-asian="normal" style:font-name-complex="Times New Roman2" style:font-size-complex="12pt" style:font-style-complex="normal" style:font-weight-complex="normal"/>
    </style:style>
    <style:style style:name="P178" style:family="paragraph" style:parent-style-name="Heading_20_1" style:master-page-name="First_20_Page">
      <style:paragraph-properties style:page-number="auto"/>
    </style:style>
    <style:style style:name="P179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3a00168" officeooo:paragraph-rsid="03b1e0de" style:font-style-asian="normal" style:font-weight-asian="normal" style:font-name-complex="Times New Roman2" style:font-size-complex="12pt" style:font-style-complex="normal" style:font-weight-complex="normal"/>
    </style:style>
    <style:style style:name="P180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3a3cc6e" officeooo:paragraph-rsid="03a3cc6e" style:font-style-asian="normal" style:font-weight-asian="normal" style:font-name-complex="Times New Roman2" style:font-size-complex="12pt" style:font-style-complex="normal" style:font-weight-complex="normal"/>
    </style:style>
    <style:style style:name="P181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3a55b8d" officeooo:paragraph-rsid="03a55b8d" style:font-style-asian="normal" style:font-weight-asian="normal" style:font-name-complex="Times New Roman2" style:font-size-complex="12pt" style:font-style-complex="normal" style:font-weight-complex="normal"/>
    </style:style>
    <style:style style:name="P182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3a74945" officeooo:paragraph-rsid="03a74945" style:font-style-asian="normal" style:font-weight-asian="normal" style:font-name-complex="Times New Roman2" style:font-size-complex="12pt" style:font-style-complex="normal" style:font-weight-complex="normal"/>
    </style:style>
    <style:style style:name="P183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3beae98" officeooo:paragraph-rsid="03c61ee7" style:font-style-asian="normal" style:font-weight-asian="normal" style:font-name-complex="Times New Roman2" style:font-size-complex="12pt" style:font-style-complex="normal" style:font-weight-complex="normal"/>
    </style:style>
    <style:style style:name="P184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404040" loext:opacity="100%" style:font-name="Transliteration" fo:letter-spacing="normal" fo:font-style="normal" fo:font-weight="normal" officeooo:rsid="03c75b06" officeooo:paragraph-rsid="03c75b06" style:font-style-asian="normal" style:font-weight-asian="normal" style:font-name-complex="Times New Roman2" style:font-size-complex="12pt" style:font-style-complex="normal" style:font-weight-complex="normal"/>
    </style:style>
    <style:style style:name="P185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a1aaa9" officeooo:paragraph-rsid="03a1aaa9" style:font-style-asian="normal" style:font-weight-asian="normal" style:font-name-complex="Times New Roman2" style:font-size-complex="12pt" style:font-style-complex="normal" style:font-weight-complex="normal"/>
    </style:style>
    <style:style style:name="P186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b450e1" officeooo:paragraph-rsid="03b450e1" style:font-style-asian="normal" style:font-weight-asian="normal" style:font-name-complex="Times New Roman2" style:font-size-complex="12pt" style:font-style-complex="normal" style:font-weight-complex="normal"/>
    </style:style>
    <style:style style:name="P187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b4c2c9" officeooo:paragraph-rsid="03b4c2c9" style:font-style-asian="normal" style:font-weight-asian="normal" style:font-name-complex="Times New Roman2" style:font-size-complex="12pt" style:font-style-complex="normal" style:font-weight-complex="normal"/>
    </style:style>
    <style:style style:name="P188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b63608" officeooo:paragraph-rsid="03b63608" style:font-style-asian="normal" style:font-weight-asian="normal" style:font-name-complex="Times New Roman2" style:font-size-complex="12pt" style:font-style-complex="normal" style:font-weight-complex="normal"/>
    </style:style>
    <style:style style:name="P189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b8331a" officeooo:paragraph-rsid="03b8331a" style:font-style-asian="normal" style:font-weight-asian="normal" style:font-name-complex="Times New Roman2" style:font-size-complex="12pt" style:font-style-complex="normal" style:font-weight-complex="normal"/>
    </style:style>
    <style:style style:name="P190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bb4c90" officeooo:paragraph-rsid="03bb4c90" style:font-style-asian="normal" style:font-weight-asian="normal" style:font-name-complex="Times New Roman2" style:font-size-complex="12pt" style:font-style-complex="normal" style:font-weight-complex="normal"/>
    </style:style>
    <style:style style:name="P191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9d49a3" officeooo:paragraph-rsid="03bd2d16" style:font-style-asian="normal" style:font-weight-asian="normal" style:font-name-complex="Times New Roman2" style:font-size-complex="12pt" style:font-style-complex="normal" style:font-weight-complex="normal"/>
    </style:style>
    <style:style style:name="P192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20f9533" officeooo:paragraph-rsid="03bd2d16" style:font-style-asian="normal" style:font-weight-asian="normal" style:font-name-complex="Times New Roman2" style:font-size-complex="12pt" style:font-style-complex="normal" style:font-weight-complex="normal"/>
    </style:style>
    <style:style style:name="P193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c04bd4" officeooo:paragraph-rsid="03c631b4" style:font-style-asian="normal" style:font-weight-asian="normal" style:font-name-complex="Times New Roman2" style:font-size-complex="12pt" style:font-style-complex="normal" style:font-weight-complex="normal"/>
    </style:style>
    <style:style style:name="P194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c935fd" officeooo:paragraph-rsid="03c935fd" style:font-style-asian="normal" style:font-weight-asian="normal" style:font-name-complex="Times New Roman2" style:font-size-complex="12pt" style:font-style-complex="normal" style:font-weight-complex="normal"/>
    </style:style>
    <style:style style:name="P195" style:family="paragraph" style:parent-style-name="Standard">
      <style:paragraph-properties fo:margin-top="0in" fo:margin-bottom="0in" style:contextual-spacing="false" fo:line-height="100%"/>
      <style:text-properties fo:font-weight="bold" officeooo:rsid="02213c42" officeooo:paragraph-rsid="03bd2d16" style:font-weight-asian="bold" style:font-weight-complex="bold"/>
    </style:style>
    <style:style style:name="P196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213c42" officeooo:paragraph-rsid="03bd2d16" style:font-style-asian="normal" style:font-weight-asian="normal" style:font-name-complex="Times New Roman2" style:font-size-complex="12pt" style:font-style-complex="normal" style:font-weight-complex="normal"/>
    </style:style>
    <style:style style:name="T1" style:family="text">
      <style:text-properties style:font-name="Arial" fo:font-size="10pt" style:font-size-asian="10pt" style:font-name-complex="Arial1" style:font-size-complex="10pt"/>
    </style:style>
    <style:style style:name="T2" style:family="text">
      <style:text-properties style:font-name="Arial" fo:font-size="10pt" officeooo:rsid="00232ec2" style:font-size-asian="10pt" style:font-name-complex="Arial1" style:font-size-complex="10pt"/>
    </style:style>
    <style:style style:name="T3" style:family="text">
      <style:text-properties style:font-name-complex="Times New Roman2" style:font-size-complex="12pt"/>
    </style:style>
    <style:style style:name="T4" style:family="text">
      <style:text-properties officeooo:rsid="019ca9fd" style:font-name-complex="Times New Roman2" style:font-size-complex="12pt"/>
    </style:style>
    <style:style style:name="T5" style:family="text">
      <style:text-properties officeooo:rsid="019cf784" style:font-name-complex="Times New Roman2" style:font-size-complex="12pt"/>
    </style:style>
    <style:style style:name="T6" style:family="text">
      <style:text-properties officeooo:rsid="019e3d05" style:font-name-complex="Times New Roman2" style:font-size-complex="12pt"/>
    </style:style>
    <style:style style:name="T7" style:family="text">
      <style:text-properties officeooo:rsid="01a088d6" style:font-name-complex="Times New Roman2" style:font-size-complex="12pt"/>
    </style:style>
    <style:style style:name="T8" style:family="text">
      <style:text-properties officeooo:rsid="01a398f9" style:font-name-complex="Times New Roman2" style:font-size-complex="12pt"/>
    </style:style>
    <style:style style:name="T9" style:family="text">
      <style:text-properties officeooo:rsid="01a51333" style:font-name-complex="Times New Roman2" style:font-size-complex="12pt"/>
    </style:style>
    <style:style style:name="T10" style:family="text">
      <style:text-properties officeooo:rsid="01aad25c" style:font-name-complex="Times New Roman2" style:font-size-complex="12pt"/>
    </style:style>
    <style:style style:name="T11" style:family="text">
      <style:text-properties officeooo:rsid="01af8865" style:font-name-complex="Times New Roman2" style:font-size-complex="12pt"/>
    </style:style>
    <style:style style:name="T12" style:family="text">
      <style:text-properties officeooo:rsid="01bb9526" style:font-name-complex="Times New Roman2" style:font-size-complex="12pt"/>
    </style:style>
    <style:style style:name="T13" style:family="text">
      <style:text-properties officeooo:rsid="01bd9025" style:font-name-complex="Times New Roman2" style:font-size-complex="12pt"/>
    </style:style>
    <style:style style:name="T14" style:family="text">
      <style:text-properties officeooo:rsid="01bf10ab" style:font-name-complex="Times New Roman2" style:font-size-complex="12pt"/>
    </style:style>
    <style:style style:name="T15" style:family="text">
      <style:text-properties officeooo:rsid="01c199d9" style:font-name-complex="Times New Roman2" style:font-size-complex="12pt"/>
    </style:style>
    <style:style style:name="T16" style:family="text">
      <style:text-properties officeooo:rsid="01c261d7" style:font-name-complex="Times New Roman2" style:font-size-complex="12pt"/>
    </style:style>
    <style:style style:name="T17" style:family="text">
      <style:text-properties officeooo:rsid="01c26810" style:font-name-complex="Times New Roman2" style:font-size-complex="12pt"/>
    </style:style>
    <style:style style:name="T18" style:family="text">
      <style:text-properties officeooo:rsid="01c4d4c4" style:font-name-complex="Times New Roman2" style:font-size-complex="12pt"/>
    </style:style>
    <style:style style:name="T19" style:family="text">
      <style:text-properties officeooo:rsid="01c972dc" style:font-name-complex="Times New Roman2" style:font-size-complex="12pt"/>
    </style:style>
    <style:style style:name="T20" style:family="text">
      <style:text-properties officeooo:rsid="01cad4a6" style:font-name-complex="Times New Roman2" style:font-size-complex="12pt"/>
    </style:style>
    <style:style style:name="T21" style:family="text">
      <style:text-properties officeooo:rsid="01ce2d0b" style:font-name-complex="Times New Roman2" style:font-size-complex="12pt"/>
    </style:style>
    <style:style style:name="T22" style:family="text">
      <style:text-properties officeooo:rsid="01d02338" style:font-name-complex="Times New Roman2" style:font-size-complex="12pt"/>
    </style:style>
    <style:style style:name="T23" style:family="text">
      <style:text-properties officeooo:rsid="01d35e4c" style:font-name-complex="Times New Roman2" style:font-size-complex="12pt"/>
    </style:style>
    <style:style style:name="T24" style:family="text">
      <style:text-properties officeooo:rsid="01d77a9b" style:font-name-complex="Times New Roman2" style:font-size-complex="12pt"/>
    </style:style>
    <style:style style:name="T25" style:family="text">
      <style:text-properties officeooo:rsid="01d89107" style:font-name-complex="Times New Roman2" style:font-size-complex="12pt"/>
    </style:style>
    <style:style style:name="T26" style:family="text">
      <style:text-properties officeooo:rsid="01d99096" style:font-name-complex="Times New Roman2" style:font-size-complex="12pt"/>
    </style:style>
    <style:style style:name="T27" style:family="text">
      <style:text-properties officeooo:rsid="01db2508" style:font-name-complex="Times New Roman2" style:font-size-complex="12pt"/>
    </style:style>
    <style:style style:name="T28" style:family="text">
      <style:text-properties officeooo:rsid="01de14a5" style:font-name-complex="Times New Roman2" style:font-size-complex="12pt"/>
    </style:style>
    <style:style style:name="T29" style:family="text">
      <style:text-properties officeooo:rsid="01df020f" style:font-name-complex="Times New Roman2" style:font-size-complex="12pt"/>
    </style:style>
    <style:style style:name="T30" style:family="text">
      <style:text-properties officeooo:rsid="01e0946c" style:font-name-complex="Times New Roman2" style:font-size-complex="12pt"/>
    </style:style>
    <style:style style:name="T31" style:family="text">
      <style:text-properties officeooo:rsid="01e0dc23" style:font-name-complex="Times New Roman2" style:font-size-complex="12pt"/>
    </style:style>
    <style:style style:name="T32" style:family="text">
      <style:text-properties officeooo:rsid="01e17e96" style:font-name-complex="Times New Roman2" style:font-size-complex="12pt"/>
    </style:style>
    <style:style style:name="T33" style:family="text">
      <style:text-properties officeooo:rsid="01e4cfcf" style:font-name-complex="Times New Roman2" style:font-size-complex="12pt"/>
    </style:style>
    <style:style style:name="T34" style:family="text">
      <style:text-properties officeooo:rsid="01e5305c" style:font-name-complex="Times New Roman2" style:font-size-complex="12pt"/>
    </style:style>
    <style:style style:name="T35" style:family="text">
      <style:text-properties officeooo:rsid="01e6e7fb" style:font-name-complex="Times New Roman2" style:font-size-complex="12pt"/>
    </style:style>
    <style:style style:name="T36" style:family="text">
      <style:text-properties officeooo:rsid="01e8d8ca" style:font-name-complex="Times New Roman2" style:font-size-complex="12pt"/>
    </style:style>
    <style:style style:name="T37" style:family="text">
      <style:text-properties officeooo:rsid="01fa8789" style:font-name-complex="Times New Roman2" style:font-size-complex="12pt"/>
    </style:style>
    <style:style style:name="T38" style:family="text">
      <style:text-properties officeooo:rsid="01fc3525" style:font-name-complex="Times New Roman2" style:font-size-complex="12pt"/>
    </style:style>
    <style:style style:name="T39" style:family="text">
      <style:text-properties officeooo:rsid="02a02062" style:font-name-complex="Times New Roman2" style:font-size-complex="12pt"/>
    </style:style>
    <style:style style:name="T40" style:family="text">
      <style:text-properties officeooo:rsid="02a347f3" style:font-name-complex="Times New Roman2" style:font-size-complex="12pt"/>
    </style:style>
    <style:style style:name="T41" style:family="text">
      <style:text-properties officeooo:rsid="02a4a20e" style:font-name-complex="Times New Roman2" style:font-size-complex="12pt"/>
    </style:style>
    <style:style style:name="T42" style:family="text">
      <style:text-properties officeooo:rsid="031f6ebc" style:font-name-complex="Times New Roman2" style:font-size-complex="12pt"/>
    </style:style>
    <style:style style:name="T43" style:family="text">
      <style:text-properties fo:font-style="italic" style:font-style-asian="italic" style:font-name-complex="Times New Roman2" style:font-size-complex="12pt" style:font-style-complex="italic"/>
    </style:style>
    <style:style style:name="T44" style:family="text">
      <style:text-properties fo:font-style="italic" officeooo:rsid="019cf784" style:font-style-asian="italic" style:font-name-complex="Times New Roman2" style:font-size-complex="12pt" style:font-style-complex="italic"/>
    </style:style>
    <style:style style:name="T45" style:family="text">
      <style:text-properties fo:font-style="italic" officeooo:rsid="01b4caa9" style:font-style-asian="italic" style:font-name-complex="Times New Roman2" style:font-size-complex="12pt" style:font-style-complex="italic"/>
    </style:style>
    <style:style style:name="T46" style:family="text">
      <style:text-properties fo:font-style="italic" officeooo:rsid="01b186c7" style:font-style-asian="italic" style:font-name-complex="Times New Roman2" style:font-size-complex="12pt" style:font-style-complex="italic"/>
    </style:style>
    <style:style style:name="T47" style:family="text">
      <style:text-properties fo:font-style="italic" officeooo:rsid="01d89107" style:font-style-asian="italic" style:font-name-complex="Times New Roman2" style:font-size-complex="12pt" style:font-style-complex="italic"/>
    </style:style>
    <style:style style:name="T48" style:family="text">
      <style:text-properties fo:font-style="italic" officeooo:rsid="02150457" style:font-style-asian="italic" style:font-name-complex="Times New Roman2" style:font-size-complex="12pt" style:font-style-complex="italic"/>
    </style:style>
    <style:style style:name="T49" style:family="text">
      <style:text-properties fo:font-style="italic" officeooo:rsid="02a02062" style:font-style-asian="italic" style:font-name-complex="Times New Roman2" style:font-size-complex="12pt" style:font-style-complex="italic"/>
    </style:style>
    <style:style style:name="T50" style:family="text">
      <style:text-properties fo:font-style="italic" officeooo:rsid="039a861e" style:font-style-asian="italic" style:font-style-complex="italic"/>
    </style:style>
    <style:style style:name="T51" style:family="text">
      <style:text-properties fo:font-weight="bold" style:font-weight-asian="bold" style:font-name-complex="Times New Roman2" style:font-size-complex="12pt" style:font-weight-complex="bold"/>
    </style:style>
    <style:style style:name="T52" style:family="text">
      <style:text-properties fo:font-weight="bold" officeooo:rsid="01aed673" style:font-weight-asian="bold" style:font-name-complex="Times New Roman2" style:font-size-complex="12pt" style:font-weight-complex="bold"/>
    </style:style>
    <style:style style:name="T53" style:family="text">
      <style:text-properties fo:font-weight="bold" officeooo:rsid="01e0946c" style:font-weight-asian="bold" style:font-name-complex="Times New Roman2" style:font-size-complex="12pt" style:font-weight-complex="bold"/>
    </style:style>
    <style:style style:name="T54" style:family="text">
      <style:text-properties fo:font-weight="bold" officeooo:rsid="01e0dc23" style:font-weight-asian="bold" style:font-name-complex="Times New Roman2" style:font-size-complex="12pt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officeooo:rsid="01de14a5" style:font-weight-asian="bold" style:font-weight-complex="bold"/>
    </style:style>
    <style:style style:name="T57" style:family="text">
      <style:text-properties fo:font-weight="bold" officeooo:rsid="025f4ee2" style:font-weight-asian="bold" style:font-weight-complex="bold"/>
    </style:style>
    <style:style style:name="T58" style:family="text">
      <style:text-properties fo:font-weight="bold" officeooo:rsid="02a7088a" style:font-weight-asian="bold" style:font-weight-complex="bold"/>
    </style:style>
    <style:style style:name="T59" style:family="text">
      <style:text-properties fo:font-weight="bold" officeooo:rsid="02d6eabc" style:font-weight-asian="bold" style:font-weight-complex="bold"/>
    </style:style>
    <style:style style:name="T60" style:family="text">
      <style:text-properties fo:font-weight="bold" officeooo:rsid="02dc920d" style:font-weight-asian="bold" style:font-weight-complex="bold"/>
    </style:style>
    <style:style style:name="T61" style:family="text">
      <style:text-properties fo:font-weight="bold" officeooo:rsid="032943d9" style:font-weight-asian="bold" style:font-weight-complex="bold"/>
    </style:style>
    <style:style style:name="T62" style:family="text">
      <style:text-properties fo:font-weight="bold" officeooo:rsid="02e52838" style:font-weight-asian="bold" style:font-weight-complex="bold"/>
    </style:style>
    <style:style style:name="T63" style:family="text">
      <style:text-properties fo:font-weight="bold" officeooo:rsid="03598608" style:font-weight-asian="bold" style:font-weight-complex="bold"/>
    </style:style>
    <style:style style:name="T64" style:family="text">
      <style:text-properties fo:font-weight="bold" officeooo:rsid="03768f31" style:font-weight-asian="bold" style:font-weight-complex="bold"/>
    </style:style>
    <style:style style:name="T65" style:family="text">
      <style:text-properties fo:font-weight="bold" officeooo:rsid="038716e0" style:font-weight-asian="bold" style:font-weight-complex="bold"/>
    </style:style>
    <style:style style:name="T66" style:family="text">
      <style:text-properties fo:font-weight="bold" officeooo:rsid="03a337f2" style:font-weight-asian="bold" style:font-weight-complex="bold"/>
    </style:style>
    <style:style style:name="T67" style:family="text">
      <style:text-properties fo:font-weight="bold" officeooo:rsid="03ae6e70" style:font-weight-asian="bold" style:font-weight-complex="bold"/>
    </style:style>
    <style:style style:name="T68" style:family="text">
      <style:text-properties style:font-name="Transliteration1" style:font-name-complex="Times New Roman2" style:font-size-complex="12pt"/>
    </style:style>
    <style:style style:name="T69" style:family="text">
      <style:text-properties style:font-name="Transliteration1" officeooo:rsid="01af8865" style:font-name-complex="Times New Roman2" style:font-size-complex="12pt"/>
    </style:style>
    <style:style style:name="T70" style:family="text">
      <style:text-properties style:font-name="Transliteration1" officeooo:rsid="01b6a868" style:font-name-complex="Times New Roman2" style:font-size-complex="12pt"/>
    </style:style>
    <style:style style:name="T71" style:family="text">
      <style:text-properties style:font-name="Transliteration1" officeooo:rsid="01b824db" style:font-name-complex="Times New Roman2" style:font-size-complex="12pt"/>
    </style:style>
    <style:style style:name="T72" style:family="text">
      <style:text-properties style:font-name="Transliteration1" officeooo:rsid="01b903ad" style:font-name-complex="Times New Roman2" style:font-size-complex="12pt"/>
    </style:style>
    <style:style style:name="T73" style:family="text">
      <style:text-properties style:font-name="Transliteration1" officeooo:rsid="01b9d1b8" style:font-name-complex="Times New Roman2" style:font-size-complex="12pt"/>
    </style:style>
    <style:style style:name="T74" style:family="text">
      <style:text-properties style:font-name="Transliteration1" officeooo:rsid="01ba7b25" style:font-name-complex="Times New Roman2" style:font-size-complex="12pt"/>
    </style:style>
    <style:style style:name="T75" style:family="text">
      <style:text-properties style:font-name="Transliteration1" officeooo:rsid="01bb6611" style:font-name-complex="Times New Roman2" style:font-size-complex="12pt"/>
    </style:style>
    <style:style style:name="T76" style:family="text">
      <style:text-properties style:font-name="Transliteration1" officeooo:rsid="01bd9025" style:font-name-complex="Times New Roman2" style:font-size-complex="12pt"/>
    </style:style>
    <style:style style:name="T77" style:family="text">
      <style:text-properties style:font-name="Transliteration1" officeooo:rsid="01bf10ab" style:font-name-complex="Times New Roman2" style:font-size-complex="12pt"/>
    </style:style>
    <style:style style:name="T78" style:family="text">
      <style:text-properties style:font-name="Transliteration1" officeooo:rsid="01c261d7" style:font-name-complex="Times New Roman2" style:font-size-complex="12pt"/>
    </style:style>
    <style:style style:name="T79" style:family="text">
      <style:text-properties style:font-name="Transliteration1" officeooo:rsid="01c3673a" style:font-name-complex="Times New Roman2" style:font-size-complex="12pt"/>
    </style:style>
    <style:style style:name="T80" style:family="text">
      <style:text-properties style:font-name="Transliteration1" officeooo:rsid="01c3b4d7" style:font-name-complex="Times New Roman2" style:font-size-complex="12pt"/>
    </style:style>
    <style:style style:name="T81" style:family="text">
      <style:text-properties style:font-name="Transliteration1" officeooo:rsid="01c854a0" style:font-name-complex="Times New Roman2" style:font-size-complex="12pt"/>
    </style:style>
    <style:style style:name="T82" style:family="text">
      <style:text-properties style:font-name="Transliteration1" officeooo:rsid="01c972dc" style:font-name-complex="Times New Roman2" style:font-size-complex="12pt"/>
    </style:style>
    <style:style style:name="T83" style:family="text">
      <style:text-properties style:font-name="Transliteration1" officeooo:rsid="01cad4a6" style:font-name-complex="Times New Roman2" style:font-size-complex="12pt"/>
    </style:style>
    <style:style style:name="T84" style:family="text">
      <style:text-properties style:font-name="Transliteration1" officeooo:rsid="01cbb55b" style:font-name-complex="Times New Roman2" style:font-size-complex="12pt"/>
    </style:style>
    <style:style style:name="T85" style:family="text">
      <style:text-properties style:font-name="Transliteration1" officeooo:rsid="01cc98b2" style:font-name-complex="Times New Roman2" style:font-size-complex="12pt"/>
    </style:style>
    <style:style style:name="T86" style:family="text">
      <style:text-properties style:font-name="Transliteration1" officeooo:rsid="01ce2d0b" style:font-name-complex="Times New Roman2" style:font-size-complex="12pt"/>
    </style:style>
    <style:style style:name="T87" style:family="text">
      <style:text-properties style:font-name="Transliteration1" officeooo:rsid="01d35e4c" style:font-name-complex="Times New Roman2" style:font-size-complex="12pt"/>
    </style:style>
    <style:style style:name="T88" style:family="text">
      <style:text-properties style:font-name="Transliteration1" officeooo:rsid="01d77a9b" style:font-name-complex="Times New Roman2" style:font-size-complex="12pt"/>
    </style:style>
    <style:style style:name="T89" style:family="text">
      <style:text-properties style:font-name="Transliteration1" officeooo:rsid="01de14a5" style:font-name-complex="Times New Roman2" style:font-size-complex="12pt"/>
    </style:style>
    <style:style style:name="T90" style:family="text">
      <style:text-properties style:font-name="Transliteration1" officeooo:rsid="02a0c07d" style:font-name-complex="Times New Roman2" style:font-size-complex="12pt"/>
    </style:style>
    <style:style style:name="T91" style:family="text">
      <style:text-properties style:font-name="Transliteration1" fo:font-weight="bold" style:font-weight-asian="bold" style:font-name-complex="Times New Roman2" style:font-size-complex="12pt" style:font-weight-complex="bold"/>
    </style:style>
    <style:style style:name="T92" style:family="text">
      <style:text-properties style:font-name="Transliteration1" fo:font-weight="bold" officeooo:rsid="01de14a5" style:font-weight-asian="bold" style:font-name-complex="Times New Roman2" style:font-size-complex="12pt" style:font-weight-complex="bold"/>
    </style:style>
    <style:style style:name="T93" style:family="text">
      <style:text-properties fo:font-style="normal" style:font-style-asian="normal" style:font-name-complex="Times New Roman2" style:font-size-complex="12pt" style:font-style-complex="normal"/>
    </style:style>
    <style:style style:name="T94" style:family="text">
      <style:text-properties fo:font-style="normal" officeooo:rsid="019cf784" style:font-style-asian="normal" style:font-name-complex="Times New Roman2" style:font-size-complex="12pt" style:font-style-complex="normal"/>
    </style:style>
    <style:style style:name="T95" style:family="text">
      <style:text-properties fo:font-style="normal" officeooo:rsid="019df45c" style:font-style-asian="normal" style:font-name-complex="Times New Roman2" style:font-size-complex="12pt" style:font-style-complex="normal"/>
    </style:style>
    <style:style style:name="T96" style:family="text">
      <style:text-properties fo:font-style="normal" officeooo:rsid="01a069bf" style:font-style-asian="normal" style:font-name-complex="Times New Roman2" style:font-size-complex="12pt" style:font-style-complex="normal"/>
    </style:style>
    <style:style style:name="T97" style:family="text">
      <style:text-properties fo:font-style="normal" officeooo:rsid="01a55361" style:font-style-asian="normal" style:font-name-complex="Times New Roman2" style:font-size-complex="12pt" style:font-style-complex="normal"/>
    </style:style>
    <style:style style:name="T98" style:family="text">
      <style:text-properties fo:font-style="normal" officeooo:rsid="01b186c7" style:font-style-asian="normal" style:font-name-complex="Times New Roman2" style:font-size-complex="12pt" style:font-style-complex="normal"/>
    </style:style>
    <style:style style:name="T99" style:family="text">
      <style:text-properties fo:font-style="normal" officeooo:rsid="01b48c9c" style:font-style-asian="normal" style:font-name-complex="Times New Roman2" style:font-size-complex="12pt" style:font-style-complex="normal"/>
    </style:style>
    <style:style style:name="T100" style:family="text">
      <style:text-properties fo:font-style="normal" officeooo:rsid="01b4f3c6" style:font-style-asian="normal" style:font-name-complex="Times New Roman2" style:font-size-complex="12pt" style:font-style-complex="normal"/>
    </style:style>
    <style:style style:name="T101" style:family="text">
      <style:text-properties fo:font-style="normal" officeooo:rsid="01bf10ab" style:font-style-asian="normal" style:font-name-complex="Times New Roman2" style:font-size-complex="12pt" style:font-style-complex="normal"/>
    </style:style>
    <style:style style:name="T102" style:family="text">
      <style:text-properties fo:font-style="normal" officeooo:rsid="01eb821a" style:font-style-asian="normal" style:font-name-complex="Times New Roman2" style:font-size-complex="12pt" style:font-style-complex="normal"/>
    </style:style>
    <style:style style:name="T103" style:family="text">
      <style:text-properties fo:font-style="normal" officeooo:rsid="01ed694c" style:font-style-asian="normal" style:font-name-complex="Times New Roman2" style:font-size-complex="12pt" style:font-style-complex="normal"/>
    </style:style>
    <style:style style:name="T104" style:family="text">
      <style:text-properties fo:font-style="normal" officeooo:rsid="01f2f136" style:font-style-asian="normal" style:font-name-complex="Times New Roman2" style:font-size-complex="12pt" style:font-style-complex="normal"/>
    </style:style>
    <style:style style:name="T105" style:family="text">
      <style:text-properties fo:font-style="normal" officeooo:rsid="01f4cf35" style:font-style-asian="normal" style:font-name-complex="Times New Roman2" style:font-size-complex="12pt" style:font-style-complex="normal"/>
    </style:style>
    <style:style style:name="T106" style:family="text">
      <style:text-properties fo:font-style="normal" officeooo:rsid="01f68f8c" style:font-style-asian="normal" style:font-name-complex="Times New Roman2" style:font-size-complex="12pt" style:font-style-complex="normal"/>
    </style:style>
    <style:style style:name="T107" style:family="text">
      <style:text-properties fo:font-style="normal" officeooo:rsid="01f847c5" style:font-style-asian="normal" style:font-name-complex="Times New Roman2" style:font-size-complex="12pt" style:font-style-complex="normal"/>
    </style:style>
    <style:style style:name="T108" style:family="text">
      <style:text-properties fo:font-style="normal" officeooo:rsid="01fc48be" style:font-style-asian="normal" style:font-name-complex="Times New Roman2" style:font-size-complex="12pt" style:font-style-complex="normal"/>
    </style:style>
    <style:style style:name="T109" style:family="text">
      <style:text-properties fo:font-style="normal" officeooo:rsid="01fcfda0" style:font-style-asian="normal" style:font-name-complex="Times New Roman2" style:font-size-complex="12pt" style:font-style-complex="normal"/>
    </style:style>
    <style:style style:name="T110" style:family="text">
      <style:text-properties fo:font-style="normal" officeooo:rsid="01fe2848" style:font-style-asian="normal" style:font-name-complex="Times New Roman2" style:font-size-complex="12pt" style:font-style-complex="normal"/>
    </style:style>
    <style:style style:name="T111" style:family="text">
      <style:text-properties fo:font-style="normal" officeooo:rsid="01fe77c8" style:font-style-asian="normal" style:font-name-complex="Times New Roman2" style:font-size-complex="12pt" style:font-style-complex="normal"/>
    </style:style>
    <style:style style:name="T112" style:family="text">
      <style:text-properties fo:font-style="normal" officeooo:rsid="01ff79e8" style:font-style-asian="normal" style:font-name-complex="Times New Roman2" style:font-size-complex="12pt" style:font-style-complex="normal"/>
    </style:style>
    <style:style style:name="T113" style:family="text">
      <style:text-properties fo:font-style="normal" officeooo:rsid="01ff9b42" style:font-style-asian="normal" style:font-name-complex="Times New Roman2" style:font-size-complex="12pt" style:font-style-complex="normal"/>
    </style:style>
    <style:style style:name="T114" style:family="text">
      <style:text-properties fo:font-style="normal" officeooo:rsid="01ffa615" style:font-style-asian="normal" style:font-name-complex="Times New Roman2" style:font-size-complex="12pt" style:font-style-complex="normal"/>
    </style:style>
    <style:style style:name="T115" style:family="text">
      <style:text-properties fo:font-style="normal" officeooo:rsid="0201e0c5" style:font-style-asian="normal" style:font-name-complex="Times New Roman2" style:font-size-complex="12pt" style:font-style-complex="normal"/>
    </style:style>
    <style:style style:name="T116" style:family="text">
      <style:text-properties fo:font-style="normal" officeooo:rsid="020734ac" style:font-style-asian="normal" style:font-name-complex="Times New Roman2" style:font-size-complex="12pt" style:font-style-complex="normal"/>
    </style:style>
    <style:style style:name="T117" style:family="text">
      <style:text-properties fo:font-style="normal" officeooo:rsid="02089ad0" style:font-style-asian="normal" style:font-name-complex="Times New Roman2" style:font-size-complex="12pt" style:font-style-complex="normal"/>
    </style:style>
    <style:style style:name="T118" style:family="text">
      <style:text-properties fo:font-style="normal" officeooo:rsid="020b713c" style:font-style-asian="normal" style:font-name-complex="Times New Roman2" style:font-size-complex="12pt" style:font-style-complex="normal"/>
    </style:style>
    <style:style style:name="T119" style:family="text">
      <style:text-properties fo:font-style="normal" officeooo:rsid="020c63a9" style:font-style-asian="normal" style:font-name-complex="Times New Roman2" style:font-size-complex="12pt" style:font-style-complex="normal"/>
    </style:style>
    <style:style style:name="T120" style:family="text">
      <style:text-properties fo:font-style="normal" officeooo:rsid="020f0044" style:font-style-asian="normal" style:font-name-complex="Times New Roman2" style:font-size-complex="12pt" style:font-style-complex="normal"/>
    </style:style>
    <style:style style:name="T121" style:family="text">
      <style:text-properties fo:font-style="normal" officeooo:rsid="020f9533" style:font-style-asian="normal" style:font-name-complex="Times New Roman2" style:font-size-complex="12pt" style:font-style-complex="normal"/>
    </style:style>
    <style:style style:name="T122" style:family="text">
      <style:text-properties fo:font-style="normal" officeooo:rsid="021035de" style:font-style-asian="normal" style:font-name-complex="Times New Roman2" style:font-size-complex="12pt" style:font-style-complex="normal"/>
    </style:style>
    <style:style style:name="T123" style:family="text">
      <style:text-properties fo:font-style="normal" officeooo:rsid="021082cc" style:font-style-asian="normal" style:font-name-complex="Times New Roman2" style:font-size-complex="12pt" style:font-style-complex="normal"/>
    </style:style>
    <style:style style:name="T124" style:family="text">
      <style:text-properties fo:font-style="normal" officeooo:rsid="021259d4" style:font-style-asian="normal" style:font-name-complex="Times New Roman2" style:font-size-complex="12pt" style:font-style-complex="normal"/>
    </style:style>
    <style:style style:name="T125" style:family="text">
      <style:text-properties fo:font-style="normal" officeooo:rsid="02131ed7" style:font-style-asian="normal" style:font-name-complex="Times New Roman2" style:font-size-complex="12pt" style:font-style-complex="normal"/>
    </style:style>
    <style:style style:name="T126" style:family="text">
      <style:text-properties fo:font-style="normal" officeooo:rsid="02150457" style:font-style-asian="normal" style:font-name-complex="Times New Roman2" style:font-size-complex="12pt" style:font-style-complex="normal"/>
    </style:style>
    <style:style style:name="T127" style:family="text">
      <style:text-properties fo:font-style="normal" officeooo:rsid="0217c8cd" style:font-style-asian="normal" style:font-name-complex="Times New Roman2" style:font-size-complex="12pt" style:font-style-complex="normal"/>
    </style:style>
    <style:style style:name="T128" style:family="text">
      <style:text-properties fo:font-style="normal" officeooo:rsid="0219cd2e" style:font-style-asian="normal" style:font-name-complex="Times New Roman2" style:font-size-complex="12pt" style:font-style-complex="normal"/>
    </style:style>
    <style:style style:name="T129" style:family="text">
      <style:text-properties fo:font-style="normal" officeooo:rsid="021bc77b" style:font-style-asian="normal" style:font-name-complex="Times New Roman2" style:font-size-complex="12pt" style:font-style-complex="normal"/>
    </style:style>
    <style:style style:name="T130" style:family="text">
      <style:text-properties fo:font-style="normal" officeooo:rsid="021c068b" style:font-style-asian="normal" style:font-name-complex="Times New Roman2" style:font-size-complex="12pt" style:font-style-complex="normal"/>
    </style:style>
    <style:style style:name="T131" style:family="text">
      <style:text-properties fo:font-style="normal" officeooo:rsid="021f1dfe" style:font-style-asian="normal" style:font-name-complex="Times New Roman2" style:font-size-complex="12pt" style:font-style-complex="normal"/>
    </style:style>
    <style:style style:name="T132" style:family="text">
      <style:text-properties fo:font-style="normal" officeooo:rsid="0221e33b" style:font-style-asian="normal" style:font-name-complex="Times New Roman2" style:font-size-complex="12pt" style:font-style-complex="normal"/>
    </style:style>
    <style:style style:name="T133" style:family="text">
      <style:text-properties fo:font-style="normal" officeooo:rsid="0223d530" style:font-style-asian="normal" style:font-name-complex="Times New Roman2" style:font-size-complex="12pt" style:font-style-complex="normal"/>
    </style:style>
    <style:style style:name="T134" style:family="text">
      <style:text-properties fo:font-style="normal" officeooo:rsid="0225a1eb" style:font-style-asian="normal" style:font-name-complex="Times New Roman2" style:font-size-complex="12pt" style:font-style-complex="normal"/>
    </style:style>
    <style:style style:name="T135" style:family="text">
      <style:text-properties fo:font-style="normal" officeooo:rsid="0225b4b1" style:font-style-asian="normal" style:font-name-complex="Times New Roman2" style:font-size-complex="12pt" style:font-style-complex="normal"/>
    </style:style>
    <style:style style:name="T136" style:family="text">
      <style:text-properties fo:font-style="normal" officeooo:rsid="02282f6e" style:font-style-asian="normal" style:font-name-complex="Times New Roman2" style:font-size-complex="12pt" style:font-style-complex="normal"/>
    </style:style>
    <style:style style:name="T137" style:family="text">
      <style:text-properties fo:font-style="normal" officeooo:rsid="02283307" style:font-style-asian="normal" style:font-name-complex="Times New Roman2" style:font-size-complex="12pt" style:font-style-complex="normal"/>
    </style:style>
    <style:style style:name="T138" style:family="text">
      <style:text-properties fo:font-style="normal" officeooo:rsid="022a0121" style:font-style-asian="normal" style:font-name-complex="Times New Roman2" style:font-size-complex="12pt" style:font-style-complex="normal"/>
    </style:style>
    <style:style style:name="T139" style:family="text">
      <style:text-properties fo:font-style="normal" officeooo:rsid="022bdcbe" style:font-style-asian="normal" style:font-name-complex="Times New Roman2" style:font-size-complex="12pt" style:font-style-complex="normal"/>
    </style:style>
    <style:style style:name="T140" style:family="text">
      <style:text-properties fo:font-style="normal" officeooo:rsid="022dba80" style:font-style-asian="normal" style:font-name-complex="Times New Roman2" style:font-size-complex="12pt" style:font-style-complex="normal"/>
    </style:style>
    <style:style style:name="T141" style:family="text">
      <style:text-properties fo:font-style="normal" officeooo:rsid="022f4d2b" style:font-style-asian="normal" style:font-name-complex="Times New Roman2" style:font-size-complex="12pt" style:font-style-complex="normal"/>
    </style:style>
    <style:style style:name="T142" style:family="text">
      <style:text-properties fo:font-style="normal" officeooo:rsid="0230b0d1" style:font-style-asian="normal" style:font-name-complex="Times New Roman2" style:font-size-complex="12pt" style:font-style-complex="normal"/>
    </style:style>
    <style:style style:name="T143" style:family="text">
      <style:text-properties fo:font-style="normal" officeooo:rsid="023288c2" style:font-style-asian="normal" style:font-name-complex="Times New Roman2" style:font-size-complex="12pt" style:font-style-complex="normal"/>
    </style:style>
    <style:style style:name="T144" style:family="text">
      <style:text-properties fo:font-style="normal" officeooo:rsid="0236c895" style:font-style-asian="normal" style:font-name-complex="Times New Roman2" style:font-size-complex="12pt" style:font-style-complex="normal"/>
    </style:style>
    <style:style style:name="T145" style:family="text">
      <style:text-properties fo:font-style="normal" officeooo:rsid="0239acf3" style:font-style-asian="normal" style:font-name-complex="Times New Roman2" style:font-size-complex="12pt" style:font-style-complex="normal"/>
    </style:style>
    <style:style style:name="T146" style:family="text">
      <style:text-properties fo:font-style="normal" officeooo:rsid="023b3ed9" style:font-style-asian="normal" style:font-name-complex="Times New Roman2" style:font-size-complex="12pt" style:font-style-complex="normal"/>
    </style:style>
    <style:style style:name="T147" style:family="text">
      <style:text-properties fo:font-style="normal" officeooo:rsid="023d718b" style:font-style-asian="normal" style:font-name-complex="Times New Roman2" style:font-size-complex="12pt" style:font-style-complex="normal"/>
    </style:style>
    <style:style style:name="T148" style:family="text">
      <style:text-properties fo:font-style="normal" officeooo:rsid="023f4f98" style:font-style-asian="normal" style:font-name-complex="Times New Roman2" style:font-size-complex="12pt" style:font-style-complex="normal"/>
    </style:style>
    <style:style style:name="T149" style:family="text">
      <style:text-properties fo:font-style="normal" officeooo:rsid="0241aac8" style:font-style-asian="normal" style:font-name-complex="Times New Roman2" style:font-size-complex="12pt" style:font-style-complex="normal"/>
    </style:style>
    <style:style style:name="T150" style:family="text">
      <style:text-properties fo:font-style="normal" officeooo:rsid="024370d7" style:font-style-asian="normal" style:font-name-complex="Times New Roman2" style:font-size-complex="12pt" style:font-style-complex="normal"/>
    </style:style>
    <style:style style:name="T151" style:family="text">
      <style:text-properties fo:font-style="normal" officeooo:rsid="0247238f" style:font-style-asian="normal" style:font-name-complex="Times New Roman2" style:font-size-complex="12pt" style:font-style-complex="normal"/>
    </style:style>
    <style:style style:name="T152" style:family="text">
      <style:text-properties fo:font-style="normal" officeooo:rsid="024f73e6" style:font-style-asian="normal" style:font-name-complex="Times New Roman2" style:font-size-complex="12pt" style:font-style-complex="normal"/>
    </style:style>
    <style:style style:name="T153" style:family="text">
      <style:text-properties fo:font-style="normal" officeooo:rsid="025248c6" style:font-style-asian="normal" style:font-name-complex="Times New Roman2" style:font-size-complex="12pt" style:font-style-complex="normal"/>
    </style:style>
    <style:style style:name="T154" style:family="text">
      <style:text-properties fo:font-style="normal" officeooo:rsid="0254f833" style:font-style-asian="normal" style:font-name-complex="Times New Roman2" style:font-size-complex="12pt" style:font-style-complex="normal"/>
    </style:style>
    <style:style style:name="T155" style:family="text">
      <style:text-properties fo:font-style="normal" officeooo:rsid="02597a9a" style:font-style-asian="normal" style:font-name-complex="Times New Roman2" style:font-size-complex="12pt" style:font-style-complex="normal"/>
    </style:style>
    <style:style style:name="T156" style:family="text">
      <style:text-properties fo:font-style="normal" officeooo:rsid="02614468" style:font-style-asian="normal" style:font-name-complex="Times New Roman2" style:font-size-complex="12pt" style:font-style-complex="normal"/>
    </style:style>
    <style:style style:name="T157" style:family="text">
      <style:text-properties fo:font-style="normal" officeooo:rsid="026513d5" style:font-style-asian="normal" style:font-name-complex="Times New Roman2" style:font-size-complex="12pt" style:font-style-complex="normal"/>
    </style:style>
    <style:style style:name="T158" style:family="text">
      <style:text-properties fo:font-style="normal" officeooo:rsid="026752f3" style:font-style-asian="normal" style:font-name-complex="Times New Roman2" style:font-size-complex="12pt" style:font-style-complex="normal"/>
    </style:style>
    <style:style style:name="T159" style:family="text">
      <style:text-properties fo:font-style="normal" officeooo:rsid="026a8f37" style:font-style-asian="normal" style:font-name-complex="Times New Roman2" style:font-size-complex="12pt" style:font-style-complex="normal"/>
    </style:style>
    <style:style style:name="T160" style:family="text">
      <style:text-properties fo:font-style="normal" officeooo:rsid="026c21f0" style:font-style-asian="normal" style:font-name-complex="Times New Roman2" style:font-size-complex="12pt" style:font-style-complex="normal"/>
    </style:style>
    <style:style style:name="T161" style:family="text">
      <style:text-properties fo:font-style="normal" officeooo:rsid="02728767" style:font-style-asian="normal" style:font-name-complex="Times New Roman2" style:font-size-complex="12pt" style:font-style-complex="normal"/>
    </style:style>
    <style:style style:name="T162" style:family="text">
      <style:text-properties fo:font-style="normal" officeooo:rsid="0275c59c" style:font-style-asian="normal" style:font-name-complex="Times New Roman2" style:font-size-complex="12pt" style:font-style-complex="normal"/>
    </style:style>
    <style:style style:name="T163" style:family="text">
      <style:text-properties fo:font-style="normal" officeooo:rsid="02791e41" style:font-style-asian="normal" style:font-name-complex="Times New Roman2" style:font-size-complex="12pt" style:font-style-complex="normal"/>
    </style:style>
    <style:style style:name="T164" style:family="text">
      <style:text-properties fo:font-style="normal" officeooo:rsid="027daf88" style:font-style-asian="normal" style:font-name-complex="Times New Roman2" style:font-size-complex="12pt" style:font-style-complex="normal"/>
    </style:style>
    <style:style style:name="T165" style:family="text">
      <style:text-properties fo:font-style="normal" officeooo:rsid="0232dd69" style:font-style-asian="normal" style:font-name-complex="Times New Roman2" style:font-size-complex="12pt" style:font-style-complex="normal"/>
    </style:style>
    <style:style style:name="T166" style:family="text">
      <style:text-properties fo:font-style="normal" officeooo:rsid="02359ee0" style:font-style-asian="normal" style:font-name-complex="Times New Roman2" style:font-size-complex="12pt" style:font-style-complex="normal"/>
    </style:style>
    <style:style style:name="T167" style:family="text">
      <style:text-properties fo:font-style="normal" officeooo:rsid="0234280f" style:font-style-asian="normal" style:font-name-complex="Times New Roman2" style:font-size-complex="12pt" style:font-style-complex="normal"/>
    </style:style>
    <style:style style:name="T168" style:family="text">
      <style:text-properties fo:font-style="normal" officeooo:rsid="027eb9e1" style:font-style-asian="normal" style:font-name-complex="Times New Roman2" style:font-size-complex="12pt" style:font-style-complex="normal"/>
    </style:style>
    <style:style style:name="T169" style:family="text">
      <style:text-properties fo:font-style="normal" officeooo:rsid="024299bb" style:font-style-asian="normal" style:font-name-complex="Times New Roman2" style:font-size-complex="12pt" style:font-style-complex="normal"/>
    </style:style>
    <style:style style:name="T170" style:family="text">
      <style:text-properties fo:font-style="normal" officeooo:rsid="0282bd2b" style:font-style-asian="normal" style:font-name-complex="Times New Roman2" style:font-size-complex="12pt" style:font-style-complex="normal"/>
    </style:style>
    <style:style style:name="T171" style:family="text">
      <style:text-properties fo:font-style="normal" officeooo:rsid="02842c5d" style:font-style-asian="normal" style:font-name-complex="Times New Roman2" style:font-size-complex="12pt" style:font-style-complex="normal"/>
    </style:style>
    <style:style style:name="T172" style:family="text">
      <style:text-properties fo:font-style="normal" officeooo:rsid="0285c1f9" style:font-style-asian="normal" style:font-name-complex="Times New Roman2" style:font-size-complex="12pt" style:font-style-complex="normal"/>
    </style:style>
    <style:style style:name="T173" style:family="text">
      <style:text-properties fo:font-style="normal" officeooo:rsid="02869178" style:font-style-asian="normal" style:font-name-complex="Times New Roman2" style:font-size-complex="12pt" style:font-style-complex="normal"/>
    </style:style>
    <style:style style:name="T174" style:family="text">
      <style:text-properties fo:font-style="normal" officeooo:rsid="02869371" style:font-style-asian="normal" style:font-name-complex="Times New Roman2" style:font-size-complex="12pt" style:font-style-complex="normal"/>
    </style:style>
    <style:style style:name="T175" style:family="text">
      <style:text-properties fo:font-style="normal" officeooo:rsid="02887cfd" style:font-style-asian="normal" style:font-name-complex="Times New Roman2" style:font-size-complex="12pt" style:font-style-complex="normal"/>
    </style:style>
    <style:style style:name="T176" style:family="text">
      <style:text-properties fo:font-style="normal" officeooo:rsid="028c33c7" style:font-style-asian="normal" style:font-name-complex="Times New Roman2" style:font-size-complex="12pt" style:font-style-complex="normal"/>
    </style:style>
    <style:style style:name="T177" style:family="text">
      <style:text-properties fo:font-style="normal" officeooo:rsid="02947fdd" style:font-style-asian="normal" style:font-name-complex="Times New Roman2" style:font-size-complex="12pt" style:font-style-complex="normal"/>
    </style:style>
    <style:style style:name="T178" style:family="text">
      <style:text-properties fo:font-style="normal" officeooo:rsid="0294c9da" style:font-style-asian="normal" style:font-name-complex="Times New Roman2" style:font-size-complex="12pt" style:font-style-complex="normal"/>
    </style:style>
    <style:style style:name="T179" style:family="text">
      <style:text-properties fo:font-style="normal" officeooo:rsid="0298d295" style:font-style-asian="normal" style:font-name-complex="Times New Roman2" style:font-size-complex="12pt" style:font-style-complex="normal"/>
    </style:style>
    <style:style style:name="T180" style:family="text">
      <style:text-properties fo:font-style="normal" officeooo:rsid="029d0a25" style:font-style-asian="normal" style:font-name-complex="Times New Roman2" style:font-size-complex="12pt" style:font-style-complex="normal"/>
    </style:style>
    <style:style style:name="T181" style:family="text">
      <style:text-properties fo:font-style="normal" officeooo:rsid="029d71b9" style:font-style-asian="normal" style:font-name-complex="Times New Roman2" style:font-size-complex="12pt" style:font-style-complex="normal"/>
    </style:style>
    <style:style style:name="T182" style:family="text">
      <style:text-properties fo:font-style="normal" officeooo:rsid="029f16e9" style:font-style-asian="normal" style:font-name-complex="Times New Roman2" style:font-size-complex="12pt" style:font-style-complex="normal"/>
    </style:style>
    <style:style style:name="T183" style:family="text">
      <style:text-properties fo:font-style="normal" officeooo:rsid="02a10835" style:font-style-asian="normal" style:font-name-complex="Times New Roman2" style:font-size-complex="12pt" style:font-style-complex="normal"/>
    </style:style>
    <style:style style:name="T184" style:family="text">
      <style:text-properties fo:font-style="normal" officeooo:rsid="02a607fc" style:font-style-asian="normal" style:font-name-complex="Times New Roman2" style:font-size-complex="12pt" style:font-style-complex="normal"/>
    </style:style>
    <style:style style:name="T185" style:family="text">
      <style:text-properties fo:font-style="normal" officeooo:rsid="02a80220" style:font-style-asian="normal" style:font-name-complex="Times New Roman2" style:font-size-complex="12pt" style:font-style-complex="normal"/>
    </style:style>
    <style:style style:name="T186" style:family="text">
      <style:text-properties fo:font-style="normal" officeooo:rsid="02a824fe" style:font-style-asian="normal" style:font-name-complex="Times New Roman2" style:font-size-complex="12pt" style:font-style-complex="normal"/>
    </style:style>
    <style:style style:name="T187" style:family="text">
      <style:text-properties fo:font-style="normal" officeooo:rsid="02a8c64e" style:font-style-asian="normal" style:font-name-complex="Times New Roman2" style:font-size-complex="12pt" style:font-style-complex="normal"/>
    </style:style>
    <style:style style:name="T188" style:family="text">
      <style:text-properties fo:font-style="normal" officeooo:rsid="02a9c9a0" style:font-style-asian="normal" style:font-name-complex="Times New Roman2" style:font-size-complex="12pt" style:font-style-complex="normal"/>
    </style:style>
    <style:style style:name="T189" style:family="text">
      <style:text-properties fo:font-style="normal" officeooo:rsid="02ab4c69" style:font-style-asian="normal" style:font-name-complex="Times New Roman2" style:font-size-complex="12pt" style:font-style-complex="normal"/>
    </style:style>
    <style:style style:name="T190" style:family="text">
      <style:text-properties fo:font-style="normal" officeooo:rsid="02ab94ee" style:font-style-asian="normal" style:font-name-complex="Times New Roman2" style:font-size-complex="12pt" style:font-style-complex="normal"/>
    </style:style>
    <style:style style:name="T191" style:family="text">
      <style:text-properties fo:font-style="normal" officeooo:rsid="02ad1744" style:font-style-asian="normal" style:font-name-complex="Times New Roman2" style:font-size-complex="12pt" style:font-style-complex="normal"/>
    </style:style>
    <style:style style:name="T192" style:family="text">
      <style:text-properties fo:font-style="normal" officeooo:rsid="02aea232" style:font-style-asian="normal" style:font-name-complex="Times New Roman2" style:font-size-complex="12pt" style:font-style-complex="normal"/>
    </style:style>
    <style:style style:name="T193" style:family="text">
      <style:text-properties fo:font-style="normal" officeooo:rsid="02b2f945" style:font-style-asian="normal" style:font-name-complex="Times New Roman2" style:font-size-complex="12pt" style:font-style-complex="normal"/>
    </style:style>
    <style:style style:name="T194" style:family="text">
      <style:text-properties fo:font-style="normal" officeooo:rsid="02caebe4" style:font-style-asian="normal" style:font-name-complex="Times New Roman2" style:font-size-complex="12pt" style:font-style-complex="normal"/>
    </style:style>
    <style:style style:name="T195" style:family="text">
      <style:text-properties fo:font-style="normal" officeooo:rsid="02cb5218" style:font-style-asian="normal" style:font-name-complex="Times New Roman2" style:font-size-complex="12pt" style:font-style-complex="normal"/>
    </style:style>
    <style:style style:name="T196" style:family="text">
      <style:text-properties fo:font-style="normal" officeooo:rsid="02cd4810" style:font-style-asian="normal" style:font-name-complex="Times New Roman2" style:font-size-complex="12pt" style:font-style-complex="normal"/>
    </style:style>
    <style:style style:name="T197" style:family="text">
      <style:text-properties fo:font-style="normal" officeooo:rsid="02d40921" style:font-style-asian="normal" style:font-name-complex="Times New Roman2" style:font-size-complex="12pt" style:font-style-complex="normal"/>
    </style:style>
    <style:style style:name="T198" style:family="text">
      <style:text-properties fo:font-style="normal" officeooo:rsid="03097544" style:font-style-asian="normal" style:font-name-complex="Times New Roman2" style:font-size-complex="12pt" style:font-style-complex="normal"/>
    </style:style>
    <style:style style:name="T199" style:family="text">
      <style:text-properties fo:font-style="normal" officeooo:rsid="0374bbe6" style:font-style-asian="normal" style:font-name-complex="Times New Roman2" style:font-size-complex="12pt" style:font-style-complex="normal"/>
    </style:style>
    <style:style style:name="T200" style:family="text">
      <style:text-properties fo:font-style="normal" officeooo:rsid="039ead77" style:font-style-asian="normal" style:font-name-complex="Times New Roman2" style:font-size-complex="12pt" style:font-style-complex="normal"/>
    </style:style>
    <style:style style:name="T201" style:family="text">
      <style:text-properties fo:font-style="normal" officeooo:rsid="03bd2d16" style:font-style-asian="normal" style:font-name-complex="Times New Roman2" style:font-size-complex="12pt" style:font-style-complex="normal"/>
    </style:style>
    <style:style style:name="T202" style:family="text">
      <style:text-properties fo:font-style="normal" fo:font-weight="bold" style:font-style-asian="normal" style:font-weight-asian="bold" style:font-name-complex="Times New Roman2" style:font-size-complex="12pt" style:font-style-complex="normal" style:font-weight-complex="bold"/>
    </style:style>
    <style:style style:name="T203" style:family="text">
      <style:text-properties fo:font-style="normal" fo:font-weight="bold" officeooo:rsid="01a55361" style:font-style-asian="normal" style:font-weight-asian="bold" style:font-name-complex="Times New Roman2" style:font-size-complex="12pt" style:font-style-complex="normal" style:font-weight-complex="bold"/>
    </style:style>
    <style:style style:name="T204" style:family="text">
      <style:text-properties fo:font-style="normal" fo:font-weight="bold" officeooo:rsid="01ef44e0" style:font-style-asian="normal" style:font-weight-asian="bold" style:font-name-complex="Times New Roman2" style:font-size-complex="12pt" style:font-style-complex="normal" style:font-weight-complex="bold"/>
    </style:style>
    <style:style style:name="T205" style:family="text">
      <style:text-properties fo:font-style="normal" fo:font-weight="bold" officeooo:rsid="0201e0c5" style:font-style-asian="normal" style:font-weight-asian="bold" style:font-name-complex="Times New Roman2" style:font-size-complex="12pt" style:font-style-complex="normal" style:font-weight-complex="bold"/>
    </style:style>
    <style:style style:name="T206" style:family="text">
      <style:text-properties fo:font-style="normal" fo:font-weight="bold" officeooo:rsid="02089ad0" style:font-style-asian="normal" style:font-weight-asian="bold" style:font-name-complex="Times New Roman2" style:font-size-complex="12pt" style:font-style-complex="normal" style:font-weight-complex="bold"/>
    </style:style>
    <style:style style:name="T207" style:family="text">
      <style:text-properties fo:font-style="normal" fo:font-weight="bold" officeooo:rsid="0236c895" style:font-style-asian="normal" style:font-weight-asian="bold" style:font-name-complex="Times New Roman2" style:font-size-complex="12pt" style:font-style-complex="normal" style:font-weight-complex="bold"/>
    </style:style>
    <style:style style:name="T208" style:family="text">
      <style:text-properties fo:font-style="normal" fo:font-weight="bold" officeooo:rsid="0250a71f" style:font-style-asian="normal" style:font-weight-asian="bold" style:font-name-complex="Times New Roman2" style:font-size-complex="12pt" style:font-style-complex="normal" style:font-weight-complex="bold"/>
    </style:style>
    <style:style style:name="T209" style:family="text">
      <style:text-properties fo:font-style="normal" fo:font-weight="bold" officeooo:rsid="02a607fc" style:font-style-asian="normal" style:font-weight-asian="bold" style:font-name-complex="Times New Roman2" style:font-size-complex="12pt" style:font-style-complex="normal" style:font-weight-complex="bold"/>
    </style:style>
    <style:style style:name="T210" style:family="text">
      <style:text-properties officeooo:rsid="019bc138"/>
    </style:style>
    <style:style style:name="T211" style:family="text">
      <style:text-properties officeooo:rsid="01a55361"/>
    </style:style>
    <style:style style:name="T212" style:family="text">
      <style:text-properties style:font-name="Transliteration"/>
    </style:style>
    <style:style style:name="T213" style:family="text">
      <style:text-properties style:font-name="Transliteration" officeooo:rsid="01bf10ab" style:font-name-complex="Times New Roman2" style:font-size-complex="12pt"/>
    </style:style>
    <style:style style:name="T214" style:family="text">
      <style:text-properties style:font-name="Transliteration" officeooo:rsid="01cad4a6" style:font-name-complex="Times New Roman2" style:font-size-complex="12pt"/>
    </style:style>
    <style:style style:name="T215" style:family="text">
      <style:text-properties style:font-name="Transliteration" fo:font-style="normal" officeooo:rsid="01bf10ab" style:font-style-asian="normal" style:font-name-complex="Times New Roman2" style:font-size-complex="12pt" style:font-style-complex="normal"/>
    </style:style>
    <style:style style:name="T216" style:family="text">
      <style:text-properties style:font-name="Transliteration" fo:font-style="normal" officeooo:rsid="01ff9b42" style:font-style-asian="normal" style:font-name-complex="Times New Roman2" style:font-size-complex="12pt" style:font-style-complex="normal"/>
    </style:style>
    <style:style style:name="T217" style:family="text">
      <style:text-properties style:font-name="Transliteration" fo:font-style="normal" officeooo:rsid="0225a1eb" style:font-style-asian="normal" style:font-name-complex="Times New Roman2" style:font-size-complex="12pt" style:font-style-complex="normal"/>
    </style:style>
    <style:style style:name="T218" style:family="text">
      <style:text-properties style:font-name="Transliteration" officeooo:rsid="020418e5"/>
    </style:style>
    <style:style style:name="T219" style:family="text">
      <style:text-properties style:font-name="Transliteration" officeooo:rsid="025745bd"/>
    </style:style>
    <style:style style:name="T220" style:family="text">
      <style:text-properties style:font-name="Transliteration" officeooo:rsid="029f16e9"/>
    </style:style>
    <style:style style:name="T221" style:family="text">
      <style:text-properties style:font-name="Transliteration" officeooo:rsid="02bda874"/>
    </style:style>
    <style:style style:name="T222" style:family="text">
      <style:text-properties style:font-name="Transliteration" officeooo:rsid="030046e2"/>
    </style:style>
    <style:style style:name="T223" style:family="text">
      <style:text-properties style:font-name="Transliteration" officeooo:rsid="0357e92b"/>
    </style:style>
    <style:style style:name="T224" style:family="text">
      <style:text-properties officeooo:rsid="01c3851d"/>
    </style:style>
    <style:style style:name="T225" style:family="text">
      <style:text-properties officeooo:rsid="01c4d4c4"/>
    </style:style>
    <style:style style:name="T226" style:family="text">
      <style:text-properties officeooo:rsid="01d5f246"/>
    </style:style>
    <style:style style:name="T227" style:family="text">
      <style:text-properties officeooo:rsid="01d77a9b"/>
    </style:style>
    <style:style style:name="T228" style:family="text">
      <style:text-properties officeooo:rsid="01db2508"/>
    </style:style>
    <style:style style:name="T229" style:family="text">
      <style:text-properties officeooo:rsid="01de14a5"/>
    </style:style>
    <style:style style:name="T230" style:family="text">
      <style:text-properties officeooo:rsid="01e17e96"/>
    </style:style>
    <style:style style:name="T231" style:family="text">
      <style:text-properties officeooo:rsid="01e3e1e7"/>
    </style:style>
    <style:style style:name="T232" style:family="text">
      <style:text-properties officeooo:rsid="01e5305c"/>
    </style:style>
    <style:style style:name="T233" style:family="text">
      <style:text-properties officeooo:rsid="01e8d8ca"/>
    </style:style>
    <style:style style:name="T234" style:family="text">
      <style:text-properties officeooo:rsid="01ef44e0"/>
    </style:style>
    <style:style style:name="T235" style:family="text">
      <style:text-properties officeooo:rsid="02440f4b"/>
    </style:style>
    <style:style style:name="T236" style:family="text">
      <style:text-properties officeooo:rsid="024a16bb"/>
    </style:style>
    <style:style style:name="T237" style:family="text">
      <style:text-properties officeooo:rsid="024c80cc"/>
    </style:style>
    <style:style style:name="T238" style:family="text">
      <style:text-properties officeooo:rsid="025745bd"/>
    </style:style>
    <style:style style:name="T239" style:family="text">
      <style:text-properties officeooo:rsid="025ad19f"/>
    </style:style>
    <style:style style:name="T240" style:family="text">
      <style:text-properties officeooo:rsid="025bb2fa"/>
    </style:style>
    <style:style style:name="T241" style:family="text">
      <style:text-properties officeooo:rsid="025d0ff2"/>
    </style:style>
    <style:style style:name="T242" style:family="text">
      <style:text-properties officeooo:rsid="0266b04b"/>
    </style:style>
    <style:style style:name="T243" style:family="text">
      <style:text-properties officeooo:rsid="02691be0"/>
    </style:style>
    <style:style style:name="T244" style:family="text">
      <style:text-properties officeooo:rsid="026dc537"/>
    </style:style>
    <style:style style:name="T245" style:family="text">
      <style:text-properties officeooo:rsid="027045c5"/>
    </style:style>
    <style:style style:name="T246" style:family="text">
      <style:text-properties officeooo:rsid="02715978"/>
    </style:style>
    <style:style style:name="T247" style:family="text">
      <style:text-properties officeooo:rsid="0276fbb7"/>
    </style:style>
    <style:style style:name="T248" style:family="text">
      <style:text-properties officeooo:rsid="027887ec"/>
    </style:style>
    <style:style style:name="T249" style:family="text">
      <style:text-properties officeooo:rsid="027eb967"/>
    </style:style>
    <style:style style:name="T250" style:family="text">
      <style:text-properties officeooo:rsid="027eb9e1"/>
    </style:style>
    <style:style style:name="T251" style:family="text">
      <style:text-properties officeooo:rsid="027f1a42"/>
    </style:style>
    <style:style style:name="T252" style:family="text">
      <style:text-properties officeooo:rsid="028ea34d"/>
    </style:style>
    <style:style style:name="T253" style:family="text">
      <style:text-properties officeooo:rsid="028f3e5a"/>
    </style:style>
    <style:style style:name="T254" style:family="text">
      <style:text-properties officeooo:rsid="0293afa3"/>
    </style:style>
    <style:style style:name="T255" style:family="text">
      <style:text-properties officeooo:rsid="02947fdd"/>
    </style:style>
    <style:style style:name="T256" style:family="text">
      <style:text-properties officeooo:rsid="0295c253"/>
    </style:style>
    <style:style style:name="T257" style:family="text">
      <style:text-properties officeooo:rsid="02970406"/>
    </style:style>
    <style:style style:name="T258" style:family="text">
      <style:text-properties officeooo:rsid="0297ec39"/>
    </style:style>
    <style:style style:name="T259" style:family="text">
      <style:text-properties officeooo:rsid="029b59f5"/>
    </style:style>
    <style:style style:name="T260" style:family="text">
      <style:text-properties officeooo:rsid="029d0a25"/>
    </style:style>
    <style:style style:name="T261" style:family="text">
      <style:text-properties officeooo:rsid="029f16e9"/>
    </style:style>
    <style:style style:name="T262" style:family="text">
      <style:text-properties officeooo:rsid="029f95be"/>
    </style:style>
    <style:style style:name="T263" style:family="text">
      <style:text-properties officeooo:rsid="02a02062"/>
    </style:style>
    <style:style style:name="T264" style:family="text">
      <style:text-properties officeooo:rsid="02a2033b"/>
    </style:style>
    <style:style style:name="T265" style:family="text">
      <style:text-properties officeooo:rsid="02a7088a"/>
    </style:style>
    <style:style style:name="T266" style:family="text">
      <style:text-properties officeooo:rsid="02a8c64e"/>
    </style:style>
    <style:style style:name="T267" style:family="text">
      <style:text-properties officeooo:rsid="02a9c9a0"/>
    </style:style>
    <style:style style:name="T268" style:family="text">
      <style:text-properties officeooo:rsid="02aa3e62"/>
    </style:style>
    <style:style style:name="T269" style:family="text">
      <style:text-properties officeooo:rsid="02b0334c"/>
    </style:style>
    <style:style style:name="T270" style:family="text">
      <style:text-properties officeooo:rsid="02b1ff7e"/>
    </style:style>
    <style:style style:name="T271" style:family="text">
      <style:text-properties officeooo:rsid="02b2008c"/>
    </style:style>
    <style:style style:name="T272" style:family="text">
      <style:text-properties officeooo:rsid="0256b750"/>
    </style:style>
    <style:style style:name="T273" style:family="text">
      <style:text-properties officeooo:rsid="02b61928"/>
    </style:style>
    <style:style style:name="T274" style:family="text">
      <style:text-properties officeooo:rsid="02bbbc96"/>
    </style:style>
    <style:style style:name="T275" style:family="text">
      <style:text-properties officeooo:rsid="02bea321"/>
    </style:style>
    <style:style style:name="T276" style:family="text">
      <style:text-properties officeooo:rsid="02c0933e"/>
    </style:style>
    <style:style style:name="T277" style:family="text">
      <style:text-properties officeooo:rsid="02c105d2"/>
    </style:style>
    <style:style style:name="T278" style:family="text">
      <style:text-properties officeooo:rsid="02c22b77"/>
    </style:style>
    <style:style style:name="T279" style:family="text">
      <style:text-properties officeooo:rsid="02c4179b"/>
    </style:style>
    <style:style style:name="T280" style:family="text">
      <style:text-properties officeooo:rsid="02c46c36"/>
    </style:style>
    <style:style style:name="T281" style:family="text">
      <style:text-properties officeooo:rsid="02c77a05"/>
    </style:style>
    <style:style style:name="T282" style:family="text">
      <style:text-properties officeooo:rsid="02caebe4"/>
    </style:style>
    <style:style style:name="T283" style:family="text">
      <style:text-properties officeooo:rsid="02ceda45"/>
    </style:style>
    <style:style style:name="T284" style:family="text">
      <style:text-properties officeooo:rsid="02d184f4"/>
    </style:style>
    <style:style style:name="T285" style:family="text">
      <style:text-properties officeooo:rsid="02d6eabc"/>
    </style:style>
    <style:style style:name="T286" style:family="text">
      <style:text-properties officeooo:rsid="02d87694"/>
    </style:style>
    <style:style style:name="T287" style:family="text">
      <style:text-properties officeooo:rsid="02d93565"/>
    </style:style>
    <style:style style:name="T288" style:family="text">
      <style:text-properties officeooo:rsid="02db814c"/>
    </style:style>
    <style:style style:name="T289" style:family="text">
      <style:text-properties officeooo:rsid="02dc920d"/>
    </style:style>
    <style:style style:name="T290" style:family="text">
      <style:text-properties officeooo:rsid="02dd2b19"/>
    </style:style>
    <style:style style:name="T291" style:family="text">
      <style:text-properties officeooo:rsid="02de82dd"/>
    </style:style>
    <style:style style:name="T292" style:family="text">
      <style:text-properties officeooo:rsid="02e00fd6"/>
    </style:style>
    <style:style style:name="T293" style:family="text">
      <style:text-properties officeooo:rsid="02e20158"/>
    </style:style>
    <style:style style:name="T294" style:family="text">
      <style:text-properties officeooo:rsid="02e52838"/>
    </style:style>
    <style:style style:name="T295" style:family="text">
      <style:text-properties officeooo:rsid="02e5b47d"/>
    </style:style>
    <style:style style:name="T296" style:family="text">
      <style:text-properties officeooo:rsid="02e67a3b"/>
    </style:style>
    <style:style style:name="T297" style:family="text">
      <style:text-properties officeooo:rsid="02e7dd85"/>
    </style:style>
    <style:style style:name="T298" style:family="text">
      <style:text-properties officeooo:rsid="02e9158c"/>
    </style:style>
    <style:style style:name="T299" style:family="text">
      <style:text-properties officeooo:rsid="02eac353"/>
    </style:style>
    <style:style style:name="T300" style:family="text">
      <style:text-properties officeooo:rsid="02ed24ae"/>
    </style:style>
    <style:style style:name="T301" style:family="text">
      <style:text-properties officeooo:rsid="02ee767e"/>
    </style:style>
    <style:style style:name="T302" style:family="text">
      <style:text-properties officeooo:rsid="02efcf31"/>
    </style:style>
    <style:style style:name="T303" style:family="text">
      <style:text-properties officeooo:rsid="02f0c0de"/>
    </style:style>
    <style:style style:name="T304" style:family="text">
      <style:text-properties officeooo:rsid="02f2e21f"/>
    </style:style>
    <style:style style:name="T305" style:family="text">
      <style:text-properties officeooo:rsid="02f3688d"/>
    </style:style>
    <style:style style:name="T306" style:family="text">
      <style:text-properties officeooo:rsid="02f592de"/>
    </style:style>
    <style:style style:name="T307" style:family="text">
      <style:text-properties officeooo:rsid="02f8fadd"/>
    </style:style>
    <style:style style:name="T308" style:family="text">
      <style:text-properties officeooo:rsid="02fab54e"/>
    </style:style>
    <style:style style:name="T309" style:family="text">
      <style:text-properties officeooo:rsid="02fb3f60"/>
    </style:style>
    <style:style style:name="T310" style:family="text">
      <style:text-properties officeooo:rsid="02fcbabe"/>
    </style:style>
    <style:style style:name="T311" style:family="text">
      <style:text-properties officeooo:rsid="02fd969a"/>
    </style:style>
    <style:style style:name="T312" style:family="text">
      <style:text-properties officeooo:rsid="02fe0376"/>
    </style:style>
    <style:style style:name="T313" style:family="text">
      <style:text-properties officeooo:rsid="02ff76fe"/>
    </style:style>
    <style:style style:name="T314" style:family="text">
      <style:text-properties officeooo:rsid="030046e2"/>
    </style:style>
    <style:style style:name="T315" style:family="text">
      <style:text-properties officeooo:rsid="03022d1d"/>
    </style:style>
    <style:style style:name="T316" style:family="text">
      <style:text-properties officeooo:rsid="0303ef5e"/>
    </style:style>
    <style:style style:name="T317" style:family="text">
      <style:text-properties officeooo:rsid="03046fb2"/>
    </style:style>
    <style:style style:name="T318" style:family="text">
      <style:text-properties officeooo:rsid="03064108"/>
    </style:style>
    <style:style style:name="T319" style:family="text">
      <style:text-properties officeooo:rsid="030f8e93"/>
    </style:style>
    <style:style style:name="T320" style:family="text">
      <style:text-properties officeooo:rsid="0310f661"/>
    </style:style>
    <style:style style:name="T321" style:family="text">
      <style:text-properties officeooo:rsid="031277d4"/>
    </style:style>
    <style:style style:name="T322" style:family="text">
      <style:text-properties officeooo:rsid="0312fcc4"/>
    </style:style>
    <style:style style:name="T323" style:family="text">
      <style:text-properties officeooo:rsid="0314c907"/>
    </style:style>
    <style:style style:name="T324" style:family="text">
      <style:text-properties officeooo:rsid="03163ce8"/>
    </style:style>
    <style:style style:name="T325" style:family="text">
      <style:text-properties officeooo:rsid="031819a2"/>
    </style:style>
    <style:style style:name="T326" style:family="text">
      <style:text-properties officeooo:rsid="03188350"/>
    </style:style>
    <style:style style:name="T327" style:family="text">
      <style:text-properties officeooo:rsid="03195f85"/>
    </style:style>
    <style:style style:name="T328" style:family="text">
      <style:text-properties officeooo:rsid="0319edd6"/>
    </style:style>
    <style:style style:name="T329" style:family="text">
      <style:text-properties officeooo:rsid="031bcf75"/>
    </style:style>
    <style:style style:name="T330" style:family="text">
      <style:text-properties officeooo:rsid="031cb3fc"/>
    </style:style>
    <style:style style:name="T331" style:family="text">
      <style:text-properties officeooo:rsid="031cd793"/>
    </style:style>
    <style:style style:name="T332" style:family="text">
      <style:text-properties officeooo:rsid="032080b1"/>
    </style:style>
    <style:style style:name="T333" style:family="text">
      <style:text-properties officeooo:rsid="0324a5dd"/>
    </style:style>
    <style:style style:name="T334" style:family="text">
      <style:text-properties officeooo:rsid="03252e67"/>
    </style:style>
    <style:style style:name="T335" style:family="text">
      <style:text-properties officeooo:rsid="03259599"/>
    </style:style>
    <style:style style:name="T336" style:family="text">
      <style:text-properties officeooo:rsid="0325eac1"/>
    </style:style>
    <style:style style:name="T337" style:family="text">
      <style:text-properties officeooo:rsid="0327bc17"/>
    </style:style>
    <style:style style:name="T338" style:family="text">
      <style:text-properties officeooo:rsid="032943d9"/>
    </style:style>
    <style:style style:name="T339" style:family="text">
      <style:text-properties officeooo:rsid="032c9a73"/>
    </style:style>
    <style:style style:name="T340" style:family="text">
      <style:text-properties officeooo:rsid="032d69bf"/>
    </style:style>
    <style:style style:name="T341" style:family="text">
      <style:text-properties officeooo:rsid="033158a2"/>
    </style:style>
    <style:style style:name="T342" style:family="text">
      <style:text-properties officeooo:rsid="0331da63"/>
    </style:style>
    <style:style style:name="T343" style:family="text">
      <style:text-properties officeooo:rsid="03338d99"/>
    </style:style>
    <style:style style:name="T344" style:family="text">
      <style:text-properties officeooo:rsid="03357423"/>
    </style:style>
    <style:style style:name="T345" style:family="text">
      <style:text-properties officeooo:rsid="033b4b47"/>
    </style:style>
    <style:style style:name="T346" style:family="text">
      <style:text-properties officeooo:rsid="033d6cd5"/>
    </style:style>
    <style:style style:name="T347" style:family="text">
      <style:text-properties officeooo:rsid="033dea4f"/>
    </style:style>
    <style:style style:name="T348" style:family="text">
      <style:text-properties officeooo:rsid="034192ee"/>
    </style:style>
    <style:style style:name="T349" style:family="text">
      <style:text-properties officeooo:rsid="0345faf9"/>
    </style:style>
    <style:style style:name="T350" style:family="text">
      <style:text-properties officeooo:rsid="03475744"/>
    </style:style>
    <style:style style:name="T351" style:family="text">
      <style:text-properties officeooo:rsid="0348e06e"/>
    </style:style>
    <style:style style:name="T352" style:family="text">
      <style:text-properties officeooo:rsid="034a4b42"/>
    </style:style>
    <style:style style:name="T353" style:family="text">
      <style:text-properties officeooo:rsid="034aa78b"/>
    </style:style>
    <style:style style:name="T354" style:family="text">
      <style:text-properties officeooo:rsid="034c25e5"/>
    </style:style>
    <style:style style:name="T355" style:family="text">
      <style:text-properties officeooo:rsid="034e75c0"/>
    </style:style>
    <style:style style:name="T356" style:family="text">
      <style:text-properties officeooo:rsid="034f0e4c"/>
    </style:style>
    <style:style style:name="T357" style:family="text">
      <style:text-properties officeooo:rsid="0350a5b5"/>
    </style:style>
    <style:style style:name="T358" style:family="text">
      <style:text-properties officeooo:rsid="03511110"/>
    </style:style>
    <style:style style:name="T359" style:family="text">
      <style:text-properties officeooo:rsid="0352a33b"/>
    </style:style>
    <style:style style:name="T360" style:family="text">
      <style:text-properties officeooo:rsid="03542469"/>
    </style:style>
    <style:style style:name="T361" style:family="text">
      <style:text-properties officeooo:rsid="0354fed6"/>
    </style:style>
    <style:style style:name="T362" style:family="text">
      <style:text-properties officeooo:rsid="03566a6b"/>
    </style:style>
    <style:style style:name="T363" style:family="text">
      <style:text-properties officeooo:rsid="0357e92b"/>
    </style:style>
    <style:style style:name="T364" style:family="text">
      <style:text-properties officeooo:rsid="0358f4de"/>
    </style:style>
    <style:style style:name="T365" style:family="text">
      <style:text-properties officeooo:rsid="03598608"/>
    </style:style>
    <style:style style:name="T366" style:family="text">
      <style:text-properties officeooo:rsid="035a6ce8"/>
    </style:style>
    <style:style style:name="T367" style:family="text">
      <style:text-properties officeooo:rsid="035d07c8"/>
    </style:style>
    <style:style style:name="T368" style:family="text">
      <style:text-properties officeooo:rsid="035ea621"/>
    </style:style>
    <style:style style:name="T369" style:family="text">
      <style:text-properties officeooo:rsid="03620837"/>
    </style:style>
    <style:style style:name="T370" style:family="text">
      <style:text-properties officeooo:rsid="0362c918"/>
    </style:style>
    <style:style style:name="T371" style:family="text">
      <style:text-properties officeooo:rsid="03633187"/>
    </style:style>
    <style:style style:name="T372" style:family="text">
      <style:text-properties officeooo:rsid="0363feaf"/>
    </style:style>
    <style:style style:name="T373" style:family="text">
      <style:text-properties officeooo:rsid="0364dcde"/>
    </style:style>
    <style:style style:name="T374" style:family="text">
      <style:text-properties officeooo:rsid="0364ebdd"/>
    </style:style>
    <style:style style:name="T375" style:family="text">
      <style:text-properties officeooo:rsid="03682c8f"/>
    </style:style>
    <style:style style:name="T376" style:family="text">
      <style:text-properties officeooo:rsid="0368e650"/>
    </style:style>
    <style:style style:name="T377" style:family="text">
      <style:text-properties officeooo:rsid="0369d67a"/>
    </style:style>
    <style:style style:name="T378" style:family="text">
      <style:text-properties officeooo:rsid="036ae07b"/>
    </style:style>
    <style:style style:name="T379" style:family="text">
      <style:text-properties officeooo:rsid="036c28de"/>
    </style:style>
    <style:style style:name="T380" style:family="text">
      <style:text-properties officeooo:rsid="036d5a91"/>
    </style:style>
    <style:style style:name="T381" style:family="text">
      <style:text-properties officeooo:rsid="036ffe92"/>
    </style:style>
    <style:style style:name="T382" style:family="text">
      <style:text-properties officeooo:rsid="03715fd1"/>
    </style:style>
    <style:style style:name="T383" style:family="text">
      <style:text-properties officeooo:rsid="03722fdc"/>
    </style:style>
    <style:style style:name="T384" style:family="text">
      <style:text-properties officeooo:rsid="03768f31"/>
    </style:style>
    <style:style style:name="T385" style:family="text">
      <style:text-properties officeooo:rsid="0376c958"/>
    </style:style>
    <style:style style:name="T386" style:family="text">
      <style:text-properties officeooo:rsid="0377af81"/>
    </style:style>
    <style:style style:name="T387" style:family="text">
      <style:text-properties officeooo:rsid="03781abe"/>
    </style:style>
    <style:style style:name="T388" style:family="text">
      <style:text-properties officeooo:rsid="037a156a"/>
    </style:style>
    <style:style style:name="T389" style:family="text">
      <style:text-properties officeooo:rsid="037ba93b"/>
    </style:style>
    <style:style style:name="T390" style:family="text">
      <style:text-properties officeooo:rsid="037d0e1e"/>
    </style:style>
    <style:style style:name="T391" style:family="text">
      <style:text-properties officeooo:rsid="037f7bfa"/>
    </style:style>
    <style:style style:name="T392" style:family="text">
      <style:text-properties officeooo:rsid="0381a53c"/>
    </style:style>
    <style:style style:name="T393" style:family="text">
      <style:text-properties officeooo:rsid="038348e6"/>
    </style:style>
    <style:style style:name="T394" style:family="text">
      <style:text-properties fo:font-variant="normal" fo:text-transform="none" fo:color="#404040" loext:opacity="100%" fo:letter-spacing="normal"/>
    </style:style>
    <style:style style:name="T395" style:family="text">
      <style:text-properties fo:font-variant="normal" fo:text-transform="none" fo:color="#404040" loext:opacity="100%" fo:letter-spacing="normal" officeooo:rsid="038348e6"/>
    </style:style>
    <style:style style:name="T396" style:family="text">
      <style:text-properties fo:font-variant="normal" fo:text-transform="none" fo:color="#404040" loext:opacity="100%" fo:letter-spacing="normal" officeooo:rsid="036ae07b"/>
    </style:style>
    <style:style style:name="T397" style:family="text">
      <style:text-properties fo:font-variant="normal" fo:text-transform="none" fo:color="#404040" loext:opacity="100%" fo:letter-spacing="normal" fo:font-weight="bold" style:font-weight-asian="bold" style:font-weight-complex="bold"/>
    </style:style>
    <style:style style:name="T398" style:family="text">
      <style:text-properties fo:font-variant="normal" fo:text-transform="none" fo:color="#404040" loext:opacity="100%" fo:letter-spacing="normal" fo:font-weight="bold" officeooo:rsid="038348e6" style:font-weight-asian="bold" style:font-weight-complex="bold"/>
    </style:style>
    <style:style style:name="T399" style:family="text">
      <style:text-properties fo:font-variant="normal" fo:text-transform="none" fo:color="#404040" loext:opacity="100%" fo:letter-spacing="normal" fo:font-weight="bold" officeooo:rsid="0396cd3d" style:font-weight-asian="bold" style:font-weight-complex="bold"/>
    </style:style>
    <style:style style:name="T400" style:family="text">
      <style:text-properties fo:font-variant="normal" fo:text-transform="none" fo:color="#404040" loext:opacity="100%" fo:letter-spacing="normal" officeooo:rsid="038a0833"/>
    </style:style>
    <style:style style:name="T401" style:family="text">
      <style:text-properties fo:font-variant="normal" fo:text-transform="none" fo:color="#404040" loext:opacity="100%" fo:letter-spacing="normal" officeooo:rsid="038a7561"/>
    </style:style>
    <style:style style:name="T402" style:family="text">
      <style:text-properties fo:font-variant="normal" fo:text-transform="none" fo:color="#404040" loext:opacity="100%" fo:letter-spacing="normal" officeooo:rsid="0396745c"/>
    </style:style>
    <style:style style:name="T403" style:family="text">
      <style:text-properties fo:font-variant="normal" fo:text-transform="none" fo:color="#404040" loext:opacity="100%" fo:letter-spacing="normal" officeooo:rsid="0396cd3d"/>
    </style:style>
    <style:style style:name="T404" style:family="text">
      <style:text-properties fo:font-variant="normal" fo:text-transform="none" fo:color="#404040" loext:opacity="100%" fo:letter-spacing="normal" officeooo:rsid="0397786a"/>
    </style:style>
    <style:style style:name="T405" style:family="text">
      <style:text-properties fo:font-variant="normal" fo:text-transform="none" fo:color="#404040" loext:opacity="100%" fo:letter-spacing="normal" officeooo:rsid="0397f5b4"/>
    </style:style>
    <style:style style:name="T406" style:family="text">
      <style:text-properties fo:font-variant="normal" fo:text-transform="none" fo:color="#404040" loext:opacity="100%" fo:letter-spacing="normal" officeooo:rsid="03980688"/>
    </style:style>
    <style:style style:name="T407" style:family="text">
      <style:text-properties fo:font-variant="normal" fo:text-transform="none" fo:color="#404040" loext:opacity="100%" fo:letter-spacing="normal" officeooo:rsid="0398471c"/>
    </style:style>
    <style:style style:name="T408" style:family="text">
      <style:text-properties fo:font-variant="normal" fo:text-transform="none" fo:color="#404040" loext:opacity="100%" fo:letter-spacing="normal" officeooo:rsid="039bbb72"/>
    </style:style>
    <style:style style:name="T409" style:family="text">
      <style:text-properties fo:font-variant="normal" fo:text-transform="none" fo:color="#404040" loext:opacity="100%" fo:letter-spacing="normal" officeooo:rsid="039c96ba"/>
    </style:style>
    <style:style style:name="T410" style:family="text">
      <style:text-properties fo:font-variant="normal" fo:text-transform="none" fo:color="#404040" loext:opacity="100%" fo:letter-spacing="normal" officeooo:rsid="039d49a3"/>
    </style:style>
    <style:style style:name="T411" style:family="text">
      <style:text-properties officeooo:rsid="03848180"/>
    </style:style>
    <style:style style:name="T412" style:family="text">
      <style:text-properties officeooo:rsid="038716e0"/>
    </style:style>
    <style:style style:name="T413" style:family="text">
      <style:text-properties officeooo:rsid="038a0833"/>
    </style:style>
    <style:style style:name="T414" style:family="text">
      <style:text-properties officeooo:rsid="0397f5b4"/>
    </style:style>
    <style:style style:name="T415" style:family="text">
      <style:text-properties officeooo:rsid="03980688"/>
    </style:style>
    <style:style style:name="T416" style:family="text">
      <style:text-properties officeooo:rsid="03999ab4"/>
    </style:style>
    <style:style style:name="T417" style:family="text">
      <style:text-properties officeooo:rsid="039a861e"/>
    </style:style>
    <style:style style:name="T418" style:family="text">
      <style:text-properties officeooo:rsid="039c96ba"/>
    </style:style>
    <style:style style:name="T419" style:family="text">
      <style:text-properties officeooo:rsid="039d49a3"/>
    </style:style>
    <style:style style:name="T420" style:family="text">
      <style:text-properties officeooo:rsid="03a337f2"/>
    </style:style>
    <style:style style:name="T421" style:family="text">
      <style:text-properties officeooo:rsid="03a34191"/>
    </style:style>
    <style:style style:name="T422" style:family="text">
      <style:text-properties officeooo:rsid="03a74945"/>
    </style:style>
    <style:style style:name="T423" style:family="text">
      <style:text-properties officeooo:rsid="03a7527b"/>
    </style:style>
    <style:style style:name="T424" style:family="text">
      <style:text-properties officeooo:rsid="03a82f38"/>
    </style:style>
    <style:style style:name="T425" style:family="text">
      <style:text-properties officeooo:rsid="03aa03c3"/>
    </style:style>
    <style:style style:name="T426" style:family="text">
      <style:text-properties officeooo:rsid="03ac884b"/>
    </style:style>
    <style:style style:name="T427" style:family="text">
      <style:text-properties style:font-name="Transliteration" officeooo:rsid="03ac884b"/>
    </style:style>
    <style:style style:name="T428" style:family="text">
      <style:text-properties officeooo:rsid="03ae6e70"/>
    </style:style>
    <style:style style:name="T429" style:family="text">
      <style:text-properties officeooo:rsid="03aed037"/>
    </style:style>
    <style:style style:name="T430" style:family="text">
      <style:text-properties officeooo:rsid="03b082ae"/>
    </style:style>
    <style:style style:name="T431" style:family="text">
      <style:text-properties officeooo:rsid="03b1e0de"/>
    </style:style>
    <style:style style:name="T432" style:family="text">
      <style:text-properties officeooo:rsid="03b1eeed"/>
    </style:style>
    <style:style style:name="T433" style:family="text">
      <style:text-properties officeooo:rsid="03b2b877"/>
    </style:style>
    <style:style style:name="T434" style:family="text">
      <style:text-properties officeooo:rsid="03b362cd"/>
    </style:style>
    <style:style style:name="T435" style:family="text">
      <style:text-properties officeooo:rsid="03b63608"/>
    </style:style>
    <style:style style:name="T436" style:family="text">
      <style:text-properties officeooo:rsid="03b8331a"/>
    </style:style>
    <style:style style:name="T437" style:family="text">
      <style:text-properties officeooo:rsid="03b87c44"/>
    </style:style>
    <style:style style:name="T438" style:family="text">
      <style:text-properties officeooo:rsid="03b9a2eb"/>
    </style:style>
    <style:style style:name="T439" style:family="text">
      <style:text-properties officeooo:rsid="03bb4c90"/>
    </style:style>
    <style:style style:name="T440" style:family="text">
      <style:text-properties officeooo:rsid="03bcbd4d"/>
    </style:style>
    <style:style style:name="T441" style:family="text">
      <style:text-properties officeooo:rsid="03c13dfc"/>
    </style:style>
    <style:style style:name="T442" style:family="text">
      <style:text-properties officeooo:rsid="03c2857a"/>
    </style:style>
    <style:style style:name="T443" style:family="text">
      <style:text-properties officeooo:rsid="03c44ca4"/>
    </style:style>
    <style:style style:name="T444" style:family="text">
      <style:text-properties officeooo:rsid="03c5692a"/>
    </style:style>
    <style:style style:name="T445" style:family="text">
      <style:text-properties officeooo:rsid="03c935f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8" text:outline-level="1"><text:span text:style-name="T210">Bentresh Stela</text:span> (<text:span text:style-name="T210">Louvre C 284</text:span>)</text:h>
      <text:h text:style-name="Heading_20_2" text:outline-level="2"/>
      <text:h text:style-name="Heading_20_2" text:outline-level="2"/>
      <text:h text:style-name="P4" text:outline-level="2">Notes by Minh-Tâm Trinh</text:h>
      <text:p text:style-name="P5"/>
      <text:p text:style-name="P5"/>
      <text:p text:style-name="P5">I warmly thank Mary Becker, Galen Goldsmith, Dieter Hoffmann, Rachel McEnroe, Foy Scalf, Dawn Schreiner, and Eric Whitacre for their input.</text:p>
      <text:p text:style-name="P5"/>
      <text:p text:style-name="P5"/>
      <text:p text:style-name="P18">Glossing Conventions</text:p>
      <text:p text:style-name="P5"/>
      <text:p text:style-name="P5">(May not match the conventions in my older notes)</text:p>
      <text:p text:style-name="P5"/>
      <text:p text:style-name="P5">(<text:tab/>)<text:tab/>text omitted by the scribe, but implicitly understood</text:p>
      <text:p text:style-name="P12"><text:span text:style-name="T3">&lt;<text:tab/>&gt;<text:tab/></text:span>addition to fix a scribal<text:span text:style-name="T3"> error</text:span></text:p>
      <text:p text:style-name="P5">{<text:tab/>}<text:tab/>deletion to fix a scribal error</text:p>
      <text:p text:style-name="P5">[<text:tab/>]<text:tab/>addition to fix lacuna, or addition uncertain</text:p>
      <text:p text:style-name="P5"/>
      <text:p text:style-name="P5"/>
      <text:p text:style-name="P19">References</text:p>
      <text:p text:style-name="P5"/>
      <text:p text:style-name="P12"><text:span text:style-name="T3">[</text:span><text:span text:style-name="T5">C 284</text:span><text:span text:style-name="T3">]<text:tab/></text:span><text:span text:style-name="T7">Stèle de Bakhtan </text:span><text:span text:style-name="T10">[</text:span><text:span text:style-name="T7">CM 463 ; BN 50 ; E 13481 ; C 284</text:span><text:span text:style-name="T10">]</text:span><text:span text:style-name="T7">. Département des Antiquités égyptiennes. </text:span><text:span text:style-name="T8">Louvre </text:span><text:span text:style-name="T9">site des collections. https://collections.louvre.fr/en/ark:/53355/cl010029573</text:span></text:p>
      <text:p text:style-name="P18"/>
      <text:p text:style-name="P37"><text:span text:style-name="T3">[B]<text:tab/><text:tab/>M. Broze. </text:span><text:span text:style-name="T43">La princesse de Bakhtan : Essai d’analyse stylistique. </text:span><text:span text:style-name="T93">Monographies Reine Élisabeth. Fondation gÉyptologique Reine Élisabeth. Bruxelles (1989).</text:span></text:p>
      <text:p text:style-name="P7"/>
      <text:p text:style-name="P13"><text:span text:style-name="T3">[</text:span><text:span text:style-name="T4">D</text:span><text:span text:style-name="T3">]<text:tab/><text:tab/></text:span><text:span text:style-name="T4">A. Dollinger</text:span><text:span text:style-name="T3">. “</text:span><text:span text:style-name="T5">The Bentresh Stela.” </text:span><text:span text:style-name="T6">Egyptian Texts of the Late and Ptolemaic Periods, §3.1.</text:span><text:span text:style-name="T5"> </text:span><text:span text:style-name="T44">Attalus</text:span><text:span text:style-name="T94">. </text:span><text:span text:style-name="T95">Last updated August 1, 2020. Accessed October 18, 2025.</text:span><text:span text:style-name="T94"> </text:span><text:a xlink:type="simple" xlink:href="https://www.attalus.org/egypt/bentresh_stela.html" text:style-name="Internet_20_link" text:visited-style-name="Visited_20_Internet_20_Link"><text:span text:style-name="T94">https://www.attalus.org/egypt/bentresh_stela.html</text:span></text:a></text:p>
      <text:p text:style-name="P38"/>
      <text:p text:style-name="P93"><text:span text:style-name="T94">[</text:span><text:span text:style-name="T93">DB]<text:tab/><text:tab/></text:span><text:span text:style-name="T98">A story designed to make propaganda for the cult of Khonsu (The Bentresh-Stela…). </text:span><text:span text:style-name="T99">In</text:span><text:span text:style-name="T98"> </text:span><text:span text:style-name="T43">Egyptian Reading Book, Vol. </text:span><text:span text:style-name="T45">I</text:span><text:span text:style-name="T43">: Exercises and Middle Egyptian Texts</text:span><text:span text:style-name="T93">. Ed. A. De Buck. </text:span><text:span text:style-name="T96">Nederlandsch Archaeologisch-Philologisch Instituut. </text:span><text:span text:style-name="T93">Leyden (1948). </text:span><text:span text:style-name="T98">106–109.</text:span></text:p>
      <text:p text:style-name="P40"/>
      <text:p text:style-name="P16"><text:span text:style-name="T3">[F]<text:tab/><text:tab/>R. O. Faulkner. </text:span><text:span text:style-name="T43">A Concise Dictionary of Middle Egyptian</text:span><text:span text:style-name="T3">. Griffith Institute, Ashmolean Museum, Oxford. Reprinted at the University Press, Oxford (1981).</text:span></text:p>
      <text:p text:style-name="P6"/>
      <text:p text:style-name="P94"><text:span text:style-name="T98">[G]<text:tab/><text:tab/>A. Gardiner. </text:span><text:span text:style-name="T46">Egyptian Grammar: Being an Introduction to the Study of Hieroglyphs</text:span><text:span text:style-name="T98">. 3rd Edition, Revised. Griffith Institute, Ashmolean Museum, Oxford. Printed at the University Press, Cambridge (2007).</text:span></text:p>
      <text:p text:style-name="P41"/>
      <text:p text:style-name="P147"><text:span text:style-name="T98">[</text:span><text:span text:style-name="T93">H]<text:tab/><text:tab/>J. </text:span><text:span text:style-name="T127">E.</text:span><text:span text:style-name="T93"> Hoch. </text:span><text:span text:style-name="T43">Middle Egyptian Grammar</text:span><text:span text:style-name="T93">. </text:span><text:span text:style-name="T127">Benben Publications. Mississauga (1997).</text:span></text:p>
      <text:p text:style-name="P40"/>
      <text:p text:style-name="P83"><text:soft-page-break/><text:span text:style-name="T98">[</text:span><text:span text:style-name="T93">L]<text:tab/><text:tab/>III. Two Pseudepigrapha: The Bentresh Stela. In </text:span><text:span text:style-name="T43">Ancient Egyptian Literature, </text:span><text:span text:style-name="T45">Vol. III: The Late Period. </text:span><text:span text:style-name="T100">Trans. M. Lichtheim. University of California Press. Berkeley (1980). 90</text:span><text:span text:style-name="T98">–</text:span><text:span text:style-name="T100">93.</text:span></text:p>
      <text:p text:style-name="P39"/>
      <text:p text:style-name="P14"><text:span text:style-name="T97">[N]<text:tab/><text:tab/>M.-J. Nederhof. “Bentresh Stela.” Last updated November 4, 2006. </text:span><text:a xlink:type="simple" xlink:href="https://mqtrinh.github.io/other/egyptian/middle-egyptian/bentresh-stela_trans-nederhof.pdf" text:style-name="Internet_20_link" text:visited-style-name="Visited_20_Internet_20_Link"><text:span text:style-name="T97">https://mqtrinh.github.io/other/egyptian/middle-egyptian/bentresh-stela_trans-nederhof.pdf</text:span></text:a></text:p>
      <text:p text:style-name="P5"/>
      <text:p text:style-name="P12"><text:span text:style-name="T3">[TLA]<text:tab/><text:tab/>Thesaurus Linguae Aegyptiae. Version 2.2.0. Union of the German Academies of Sciences and Humanities.</text:span> <text:a xlink:type="simple" xlink:href="https://tla.digital/home" text:style-name="Internet_20_link" text:visited-style-name="Visited_20_Internet_20_Link"><text:span text:style-name="Internet_20_link"><text:span text:style-name="T3">https://tla.digital/home</text:span></text:span></text:a></text:p>
      <text:p text:style-name="P21"><text:span text:style-name="T211">1</text:span><text:span text:style-name="T234">1</text:span>/1<text:span text:style-name="T234">7</text:span>/25</text:p>
      <text:p text:style-name="P20"/>
      <text:p text:style-name="P20"/>
      <text:p text:style-name="P15"><text:span text:style-name="T91">(1)</text:span><text:span text:style-name="T68"> @</text:span><text:span text:style-name="T69">r </text:span><text:span text:style-name="T76">K</text:span><text:span text:style-name="T79">A </text:span><text:span text:style-name="T76">N</text:span><text:span text:style-name="T74">x</text:span><text:span text:style-name="T75">t</text:span></text:p>
      <text:p text:style-name="P15"><text:span text:style-name="T81">t</text:span><text:span text:style-name="T76">wt </text:span><text:span text:style-name="T81">x</text:span><text:span text:style-name="T75">a</text:span><text:span text:style-name="T70">.</text:span><text:span text:style-name="T71">w</text:span></text:p>
      <text:p text:style-name="P15"><text:span text:style-name="T81">D</text:span><text:span text:style-name="T75">d</text:span><text:span text:style-name="T71"> </text:span><text:span text:style-name="T81">n</text:span><text:span text:style-name="T75">s.</text:span><text:span text:style-name="T77">y</text:span><text:span text:style-name="T82">(t)</text:span><text:span text:style-name="T71"> mi </text:span><text:span text:style-name="T82">(I)</text:span><text:span text:style-name="T75">tm</text:span></text:p>
      <text:p text:style-name="P34"/>
      <text:p text:style-name="P17"><text:span text:style-name="T71">@r </text:span><text:span text:style-name="T78">Nbw</text:span></text:p>
      <text:p text:style-name="P17"><text:span text:style-name="T81">ws</text:span><text:span text:style-name="T82">(</text:span><text:span text:style-name="T81">r</text:span><text:span text:style-name="T82">)</text:span><text:span text:style-name="T81"> x</text:span><text:span text:style-name="T71">pS</text:span><text:span text:style-name="T78">w</text:span><text:span text:style-name="T71"> </text:span><text:span text:style-name="T81">d</text:span><text:span text:style-name="T72">r </text:span><text:span text:style-name="T83">P</text:span><text:span text:style-name="T81">Dt</text:span><text:span text:style-name="T72"> </text:span><text:span text:style-name="T81">9</text:span></text:p>
      <text:p text:style-name="P35"/>
      <text:p text:style-name="P15"><text:span text:style-name="T72">Nsw Bity </text:span><text:span text:style-name="T78">N</text:span><text:span text:style-name="T73">b </text:span><text:span text:style-name="T78">&amp;</text:span><text:span text:style-name="T73">A.wy </text:span></text:p>
      <text:p text:style-name="P89"><text:span text:style-name="T73">W</text:span><text:span text:style-name="T68">sr-MaA.t-Ra </text:span><text:span text:style-name="T84">%tp-</text:span><text:span text:style-name="T85">(n)</text:span><text:span text:style-name="T84">-Ra</text:span></text:p>
      <text:p text:style-name="P36"/>
      <text:p text:style-name="P90"><text:span text:style-name="T86">%</text:span><text:span text:style-name="T68">A Ra</text:span></text:p>
      <text:p text:style-name="P91"><text:span text:style-name="T68">xt=f Mri-Imn Ra-</text:span><text:span text:style-name="T80">m</text:span><text:span text:style-name="T68">s-</text:span><text:span text:style-name="T80">s(w)</text:span></text:p>
      <text:p text:style-name="P31"/>
      <text:p text:style-name="P91"><text:span text:style-name="T68">Imn-Ra </text:span><text:span text:style-name="T92">(2)</text:span><text:span text:style-name="T89"> </text:span><text:span text:style-name="T68">Nb </text:span><text:span text:style-name="T90">Nsw.t</text:span><text:span text:style-name="T87"> PsD.t Nb.wt </text:span><text:span text:style-name="T68">WAs.t</text:span></text:p>
      <text:p text:style-name="P30">mri nTr nfr Imn</text:p>
      <text:p text:style-name="P89"><text:span text:style-name="T68">ms.</text:span><text:span text:style-name="T88">[</text:span><text:span text:style-name="T68">ti</text:span><text:span text:style-name="T88">]</text:span><text:span text:style-name="T68">w Ra-@r-Ax.ty</text:span></text:p>
      <text:p text:style-name="P30">pr.<text:span text:style-name="T227">w</text:span> ax n <text:span text:style-name="T225">N</text:span>b <text:span text:style-name="T225">+</text:span>r.<text:span text:style-name="T226">(</text:span>t<text:span text:style-name="T226">)</text:span></text:p>
      <text:p text:style-name="P30">wtt n KA-<text:span text:style-name="T224">Mwt=f</text:span></text:p>
      <text:p text:style-name="P32">nsw.t n Km.t <text:span text:style-name="T228">HqA</text:span> _Sr.wt</text:p>
      <text:p text:style-name="P32">iTy <text:span text:style-name="T56">(3)</text:span><text:span text:style-name="T229"> </text:span><text:span text:style-name="T230">iT</text:span> <text:span text:style-name="T230">PDt</text:span> 9</text:p>
      <text:p text:style-name="P33">pri m <text:span text:style-name="T231">X</text:span>t</text:p>
      <text:p text:style-name="P33">s<text:span text:style-name="T232">r(w) </text:span>n=f nx.tw</text:p>
      <text:p text:style-name="P32"><text:span text:style-name="T233">w</text:span>D n=f pri a m swH.t</text:p>
      <text:p text:style-name="P32"/>
      <text:p text:style-name="P29"/>
      <text:p text:style-name="P15"><text:span text:style-name="T51">(</text:span><text:span text:style-name="T52">1</text:span><text:span text:style-name="T51">) </text:span><text:span text:style-name="T11">Horus, </text:span><text:span text:style-name="T19">M</text:span><text:span text:style-name="T15">ighty</text:span><text:span text:style-name="T12"> Bull,</text:span></text:p>
      <text:p text:style-name="P15"><text:span text:style-name="T19">p</text:span><text:span text:style-name="T13">erfect [F 295] of </text:span><text:span text:style-name="T19">a</text:span><text:span text:style-name="T13">ppearance [F 185] </text:span><text:span text:style-name="T14">[</text:span><text:span text:style-name="T213">nfr Hr</text:span><text:span text:style-name="T14">]</text:span><text:span text:style-name="T13">,</text:span></text:p>
      <text:p text:style-name="P15"><text:span text:style-name="T19">e</text:span><text:span text:style-name="T14">nduring of </text:span><text:span text:style-name="T19">k</text:span><text:span text:style-name="T14">ingship [</text:span><text:span text:style-name="T215">nfr Hr</text:span><text:span text:style-name="T14">], </text:span><text:span text:style-name="T16">like Atum,</text:span></text:p>
      <text:p text:style-name="P8"/>
      <text:p text:style-name="P8">Golden Horus,</text:p>
      <text:p text:style-name="P95"><text:span text:style-name="T16">s</text:span><text:span text:style-name="T3">trong </text:span><text:span text:style-name="T19">[F 68] </text:span><text:span text:style-name="T3">of arm </text:span><text:span text:style-name="T14">[</text:span><text:span text:style-name="T215">nfr Hr</text:span><text:span text:style-name="T14">] </text:span><text:span text:style-name="T20">[who] drives away the Nine Bows [</text:span><text:span text:style-name="T214">pD.t psD.t</text:span><text:span text:style-name="T20">],</text:span></text:p>
      <text:p text:style-name="P8"/>
      <text:p text:style-name="P8">Dual King, Lord of the Two Lands,</text:p>
      <text:p text:style-name="P86"><text:span text:style-name="T3">User</text:span><text:span text:style-name="T21">m</text:span><text:span text:style-name="T3">aat</text:span><text:span text:style-name="T21">r</text:span><text:span text:style-name="T3">e </text:span><text:span text:style-name="T21">Setepenre,</text:span></text:p>
      <text:p text:style-name="P9"/>
      <text:p text:style-name="P9">Son of Re,</text:p>
      <text:p text:style-name="P88"><text:span text:style-name="T22">h</text:span><text:span text:style-name="T3">is </text:span><text:span text:style-name="T42">presence [F 200],</text:span><text:span text:style-name="T3"> Meri</text:span><text:span text:style-name="T21">a</text:span><text:span text:style-name="T3">mun Ra</text:span><text:span text:style-name="T21">m</text:span><text:span text:style-name="T3">eses,</text:span></text:p>
      <text:p text:style-name="P10"/>
      <text:p text:style-name="P87"><text:span text:style-name="T17">Amun-Re, </text:span><text:span text:style-name="T53">(2)</text:span><text:span text:style-name="T30"> </text:span><text:span text:style-name="T17">Lord of </text:span><text:span text:style-name="T39">t</text:span><text:span text:style-name="T23">he Thrones </text:span><text:span text:style-name="T39">[</text:span><text:span text:style-name="T49">cf.</text:span><text:span text:style-name="T39"> </text:span><text:span text:style-name="T41">G 627 and </text:span><text:span text:style-name="T39">TLA 26200</text:span><text:span text:style-name="T40">]</text:span><text:span text:style-name="T39"> </text:span><text:span text:style-name="T23">[of] the Ennead</text:span><text:span text:style-name="T17">, </text:span><text:span text:style-name="T23">of the Ladies of Thebes</text:span><text:span text:style-name="T23"><text:note text:id="ftn1" text:note-class="footnote"><text:note-citation>1</text:note-citation><text:note-body><text:p text:style-name="P84"><text:span text:style-name="T218">W</text:span><text:span text:style-name="T212">As.t </text:span><text:span text:style-name="T218">=</text:span> Waset <text:span text:style-name="T274">=</text:span> “<text:span text:style-name="T274">The Scepter”</text:span>.</text:p></text:note-body></text:note></text:span><text:span text:style-name="T27">,</text:span></text:p>
      <text:p text:style-name="P11">beloved of the good god, Amun,</text:p>
      <text:p text:style-name="P89"><text:span text:style-name="T3">bo</text:span><text:span text:style-name="T24">[</text:span><text:span text:style-name="T3">r</text:span><text:span text:style-name="T24">]</text:span><text:span text:style-name="T3">n of Re-Horakhty,</text:span></text:p>
      <text:p text:style-name="P89"><text:span text:style-name="T25">seed [F 91] of the </text:span><text:span text:style-name="T47">akh</text:span><text:span text:style-name="T29"> </text:span><text:span text:style-name="T25">of</text:span><text:span text:style-name="T18"> the Lord of </text:span><text:span text:style-name="T25">Ancestors[?</text:span><text:span text:style-name="T26"> F 324</text:span><text:span text:style-name="T25">],</text:span></text:p>
      <text:p text:style-name="P92"><text:span text:style-name="T3">begotten of Ka</text:span><text:span text:style-name="T24">m</text:span><text:span text:style-name="T3">u</text:span><text:span text:style-name="T24">t</text:span><text:span text:style-name="T3">ef,</text:span></text:p>
      <text:p text:style-name="P96"><text:span text:style-name="T28">k</text:span><text:span text:style-name="T3">ing of the Black Land</text:span><text:span text:style-name="T3"><text:note text:id="ftn2" text:note-class="footnote"><text:note-citation>2</text:note-citation><text:note-body><text:p text:style-name="P85"><text:span text:style-name="T212">Km.t</text:span> = Kemet.</text:p></text:note-body></text:note></text:span><text:span text:style-name="T3">, </text:span><text:span text:style-name="T36">ruler </text:span><text:span text:style-name="T3">of the Red Land</text:span><text:span text:style-name="T3"><text:note text:id="ftn3" text:note-class="footnote"><text:note-citation>3</text:note-citation><text:note-body><text:p text:style-name="P85"><text:span text:style-name="T212">_Sr.wt</text:span> = Deshrut.</text:p></text:note-body></text:note></text:span><text:span text:style-name="T3">,</text:span></text:p>
      <text:p text:style-name="P97"><text:soft-page-break/><text:span text:style-name="T3">sovereign </text:span><text:span text:style-name="T54">(3)</text:span><text:span text:style-name="T31"> </text:span><text:span text:style-name="T38">[</text:span><text:span text:style-name="T37">who</text:span><text:span text:style-name="T38">]</text:span><text:span text:style-name="T37"> seized </text:span><text:span text:style-name="T32">the Nine Bows,</text:span></text:p>
      <text:p text:style-name="P98"><text:span text:style-name="T32">t</text:span><text:span text:style-name="T3">hat when he came forth from the womb </text:span><text:span text:style-name="T38">[second tense?]</text:span><text:span text:style-name="T3">,</text:span></text:p>
      <text:p text:style-name="P98"><text:span text:style-name="T34">victories </text:span><text:span text:style-name="T35">[F 139] </text:span><text:span text:style-name="T34">were</text:span><text:span text:style-name="T3"> </text:span><text:span text:style-name="T33">foretold </text:span><text:span text:style-name="T35">[passive] </text:span><text:span text:style-name="T33">[F 235] of him,</text:span></text:p>
      <text:p text:style-name="P99"><text:span text:style-name="T3">command [F 73</text:span><text:span text:style-name="T98">–</text:span><text:span text:style-name="T93">74] [</text:span><text:span text:style-name="T102">g</text:span><text:span text:style-name="T103">iven</text:span><text:span text:style-name="T93">] to him [while] active [F 91] in the egg,</text:span></text:p>
      <text:p text:style-name="P42"/>
      <text:p text:style-name="P42"/>
      <text:p text:style-name="P100"><text:span text:style-name="T203">1</text:span><text:span text:style-name="T204">2</text:span><text:span text:style-name="T202">/</text:span><text:span text:style-name="T204">7</text:span><text:span text:style-name="T202">/25</text:span></text:p>
      <text:p text:style-name="P43"/>
      <text:p text:style-name="P44"/>
      <text:p text:style-name="P107"><text:span text:style-name="T93">kA </text:span><text:span text:style-name="T104">mn ib hb=f mtwn</text:span></text:p>
      <text:p text:style-name="P108"><text:span text:style-name="T110">n</text:span><text:span text:style-name="T93">sw.t n nTr pri nx.t mi MnT(w)</text:span></text:p>
      <text:p text:style-name="P109"><text:span text:style-name="T93">wr pH.t</text:span><text:span text:style-name="T105">y</text:span><text:span text:style-name="T93"> </text:span><text:span text:style-name="T205">(4)</text:span><text:span text:style-name="T115"> </text:span><text:span text:style-name="T93">mi sA Nw.t</text:span></text:p>
      <text:p text:style-name="P122"/>
      <text:p text:style-name="P110"><text:span text:style-name="T93">is Hm=f </text:span><text:span text:style-name="T118">m N</text:span><text:span text:style-name="T93">hr</text:span><text:span text:style-name="T118">n</text:span><text:span text:style-name="T93"> </text:span><text:span text:style-name="T118">mi </text:span><text:span text:style-name="T93">n</text:span><text:span text:style-name="T126">(y)</text:span><text:span text:style-name="T93">t-</text:span><text:span text:style-name="T120">a</text:span><text:span text:style-name="T93">=f </text:span><text:span text:style-name="T116">Tnw rnp.t</text:span></text:p>
      <text:p text:style-name="P111"><text:span text:style-name="T116">w</text:span><text:span text:style-name="T93">r.w </text:span><text:span text:style-name="T116">n </text:span><text:span text:style-name="T93">xAs.</text:span><text:span text:style-name="T116">t nb iw&lt;</text:span><text:span text:style-name="T132">=sn&gt;</text:span><text:span text:style-name="T116"> m ks</text:span><text:span text:style-name="T138">.</text:span><text:span text:style-name="T116">w m Htp.</text:span><text:span text:style-name="T131">w</text:span><text:span text:style-name="T116"> n bA.</text:span><text:span text:style-name="T131">w</text:span><text:span text:style-name="T128"> </text:span><text:span text:style-name="T93">n Hm</text:span><text:span text:style-name="T117">=f S</text:span><text:span text:style-name="T93">Aa &lt;</text:span><text:span text:style-name="T139">r&gt;</text:span><text:span text:style-name="T117"> </text:span><text:span text:style-name="T93">pHw.w</text:span></text:p>
      <text:p text:style-name="P46"/>
      <text:p text:style-name="P45"/>
      <text:p text:style-name="P101"><text:span text:style-name="T93">Bull </text:span><text:span text:style-name="T106">firm [F 106] of heart </text:span><text:span text:style-name="T101">[</text:span><text:span text:style-name="T215">nfr Hr</text:span><text:span text:style-name="T101">]</text:span><text:span text:style-name="T106">, </text:span><text:span text:style-name="T107">when he </text:span><text:span text:style-name="T109">trot</text:span><text:span text:style-name="T107">s </text:span><text:span text:style-name="T108">[circumstantial?] </text:span><text:span text:style-name="T109">[F 158] </text:span><text:span text:style-name="T108">[into] the arena [variant spelling, F 121],</text:span></text:p>
      <text:p text:style-name="P102"><text:span text:style-name="T108">d</text:span><text:span text:style-name="T93">ivine king </text:span><text:span text:style-name="T111">[indirect genitive] [who] c</text:span><text:span text:style-name="T122">a</text:span><text:span text:style-name="T111">me </text:span><text:span text:style-name="T122">[</text:span><text:span text:style-name="T123">no gemination, so </text:span><text:span text:style-name="T122">perfect participle] </text:span><text:span text:style-name="T111">[in] might like Montu,</text:span></text:p>
      <text:p text:style-name="P103"><text:span text:style-name="T93">Great of s</text:span><text:span text:style-name="T112">trength </text:span><text:span text:style-name="T113">[playful spelling of dual </text:span><text:span text:style-name="T216">-ty</text:span><text:span text:style-name="T113">] </text:span><text:span text:style-name="T124">[leopard heads?] </text:span><text:span text:style-name="T101">[</text:span><text:span text:style-name="T215">nfr Hr</text:span><text:span text:style-name="T101">] </text:span><text:span text:style-name="T205">(4)</text:span><text:span text:style-name="T101"> </text:span><text:span text:style-name="T114">like the son of Nut:</text:span></text:p>
      <text:p text:style-name="P47"/>
      <text:p text:style-name="P104"><text:span text:style-name="T114">S</text:span><text:span text:style-name="T93">o, his majesty [was] </text:span><text:span text:style-name="T121">in</text:span><text:span text:style-name="T93"> Naharin</text:span><text:span text:style-name="T125">a</text:span><text:span text:style-name="T93"> </text:span><text:span text:style-name="T119">like </text:span><text:span text:style-name="T121">[</text:span><text:span text:style-name="T125">that</text:span><text:span text:style-name="T121">] </text:span><text:span text:style-name="T125">of</text:span><text:span text:style-name="T121"> his custom </text:span><text:span text:style-name="T126">[</text:span><text:span text:style-name="T48">cf.</text:span><text:span text:style-name="T126"> H 248] </text:span><text:span text:style-name="T121">each [F 305] year.</text:span></text:p>
      <text:p text:style-name="P105"><text:span text:style-name="T93">[As for] the princes of every foreign land </text:span><text:span text:style-name="T136">[F 185]</text:span><text:span text:style-name="T93">, they </text:span><text:span text:style-name="T133">came in </text:span><text:span text:style-name="T137">prostration</text:span><text:span text:style-name="T138">s</text:span><text:span text:style-name="T137"> [F 287]</text:span><text:span text:style-name="T133">, in peace [“peaces”], </text:span><text:span text:style-name="T134">to the might [</text:span><text:span text:style-name="T217">bA.w</text:span><text:span text:style-name="T134"> = mass noun?] </text:span><text:span text:style-name="T135">of his majesty, </text:span><text:span text:style-name="T139">as far as </text:span><text:span text:style-name="T140">the far north [F 92, last variant spelling].</text:span></text:p>
      <text:p text:style-name="P48"/>
      <text:p text:style-name="P48"/>
      <text:p text:style-name="P22"><text:span text:style-name="T121">1</text:span><text:span text:style-name="T93">2/21/25</text:span></text:p>
      <text:p text:style-name="P52"/>
      <text:p text:style-name="P52"/>
      <text:p text:style-name="P112"><text:span text:style-name="T117">in</text:span><text:span text:style-name="T93">w=</text:span><text:span text:style-name="T117">sn nbw xsb</text:span><text:span text:style-name="T93">d</text:span><text:span text:style-name="T117"> </text:span><text:span text:style-name="T206">(5)</text:span><text:span text:style-name="T117"> mfk</text:span><text:span text:style-name="T93">A.t</text:span><text:span text:style-name="T117"> x</text:span><text:span text:style-name="T129">A.</text:span><text:span text:style-name="T117">w nb </text:span><text:span text:style-name="T129">tA-</text:span><text:span text:style-name="T117">nTr </text:span><text:span text:style-name="T129">Hr</text:span><text:span text:style-name="T117"> </text:span><text:span text:style-name="T129">psD=</text:span><text:span text:style-name="T117">sn</text:span></text:p>
      <text:p text:style-name="P112"><text:span text:style-name="T117">wa nb </text:span><text:span text:style-name="T130">Hr xrp sn</text:span><text:span text:style-name="T117">w=f</text:span></text:p>
      <text:p text:style-name="P113"><text:span text:style-name="T117">a</text:span><text:span text:style-name="T93">Ha rdi</text:span><text:span text:style-name="T150">{.t}</text:span><text:span text:style-name="T93"> </text:span><text:span text:style-name="T150">pA </text:span><text:span text:style-name="T93">wr n B</text:span><text:span text:style-name="T145">xtn in</text:span><text:span text:style-name="T150">.</text:span><text:span text:style-name="T145">t</text:span><text:span text:style-name="T150">w</text:span><text:span text:style-name="T145"> </text:span><text:span text:style-name="T146">in.</text:span><text:span text:style-name="T150">w</text:span><text:span text:style-name="T146">=f</text:span></text:p>
      <text:p text:style-name="P114"><text:span text:style-name="T146">d</text:span><text:span text:style-name="T93">i.n=f </text:span><text:span text:style-name="T147">sA.t=f wr.t </text:span><text:span text:style-name="T151">HAt </text:span><text:span text:style-name="T147">i</text:span><text:span text:style-name="T168">r.w[?]</text:span></text:p>
      <text:p text:style-name="P114"><text:span text:style-name="T147">Hr swAS</text:span><text:span text:style-name="T152">{y}</text:span><text:span text:style-name="T147"> Hm=f</text:span></text:p>
      <text:p text:style-name="P115"><text:span text:style-name="T147">H</text:span><text:span text:style-name="T93">r dbH [</text:span><text:span text:style-name="T153">anx</text:span><text:span text:style-name="T93">] xr=f</text:span></text:p>
      <text:p text:style-name="P115"><text:span text:style-name="T93">wn </text:span><text:span text:style-name="T208">(</text:span><text:span text:style-name="T202">6</text:span><text:span text:style-name="T208">)</text:span><text:span text:style-name="T93"> st nfr</text:span><text:span text:style-name="T155">(.ti?)</text:span><text:span text:style-name="T93"> r </text:span><text:span text:style-name="T154">aA</text:span><text:span text:style-name="T93"> wr Hr ib Hm=f r xt nb</text:span></text:p>
      <text:p text:style-name="P48"/>
      <text:p text:style-name="P48"/>
      <text:p text:style-name="P106"><text:span text:style-name="T121">[</text:span><text:span text:style-name="T93">As for] their tribute [F 22]: </text:span><text:span text:style-name="T141">gold, lapis lazuli, </text:span><text:span text:style-name="T207">(5)</text:span><text:span text:style-name="T144"> </text:span><text:span text:style-name="T141">turq</text:span><text:span text:style-name="T144">u</text:span><text:span text:style-name="T141">oise [F 106], </text:span><text:span text:style-name="T142">every herb [F 183] from the gods’ land </text:span><text:span text:style-name="T164">[were] </text:span><text:span text:style-name="T142">upon their back</text:span><text:span text:style-name="T143">[s].</text:span></text:p>
      <text:p text:style-name="P106"><text:span text:style-name="T164">E</text:span><text:span text:style-name="T165">ach one </text:span><text:span text:style-name="T164">was</text:span><text:span text:style-name="T165"> </text:span><text:span text:style-name="T166">outdoing </text:span><text:span text:style-name="T165">[F 196, “</text:span><text:span text:style-name="T166">getting ahead of”</text:span><text:span text:style-name="T165">] </text:span><text:span text:style-name="T167">his companion.</text:span></text:p>
      <text:p text:style-name="P59">Then the chief of Bakhtan <text:span text:style-name="T235">caused t</text:span><text:span text:style-name="T249">hat</text:span><text:span text:style-name="T235"> his tribute </text:span><text:span text:style-name="T249">be brought.</text:span></text:p>
      <text:p text:style-name="P60">[and] put his eldest daughter <text:span text:style-name="T236">in front of </text:span><text:span text:style-name="T250">[?]</text:span><text:span text:style-name="T237">,</text:span></text:p>
      <text:p text:style-name="P61">[and] was praising [F 216] his majesty,</text:p>
      <text:p text:style-name="P62">[and] was pleading [F 311] [for] [life] from [“upon”] him.</text:p>
      <text:p text:style-name="P63"><text:soft-page-break/>[<text:span text:style-name="T219">wn</text:span><text:span text:style-name="T238"> as </text:span><text:span text:style-name="T390">imperfect </text:span>converter? TLA 550129] <text:span text:style-name="T238">The </text:span><text:span text:style-name="T57">(6)</text:span> woman <text:span text:style-name="T251">had been</text:span><text:span text:style-name="T239"> pleasing [stative?] t</text:span><text:span text:style-name="T240">o the utmost greatness upon his majesty’s heart, </text:span><text:span text:style-name="T241">than any thing [else].</text:span></text:p>
      <text:p text:style-name="P66"/>
      <text:p text:style-name="P65"/>
      <text:p text:style-name="P23"><text:span text:style-name="T121">1</text:span><text:span text:style-name="T93">/</text:span><text:span text:style-name="T163">4</text:span><text:span text:style-name="T93">/2</text:span><text:span text:style-name="T163">6</text:span></text:p>
      <text:p text:style-name="P53"/>
      <text:p text:style-name="P53"/>
      <text:p text:style-name="P116"><text:span text:style-name="T93">aHa.n wd</text:span><text:span text:style-name="T156">n</text:span><text:span text:style-name="T158">(.w)</text:span><text:span text:style-name="T93"> nxb</text:span><text:span text:style-name="T157">(.t)</text:span><text:span text:style-name="T156">=s</text:span><text:span text:style-name="T93"> </text:span><text:span text:style-name="T159">N</text:span><text:span text:style-name="T93">sw.t </text:span><text:span text:style-name="T159">W</text:span><text:span text:style-name="T93">r.t Nfr.w-</text:span><text:span text:style-name="T159">Ra</text:span></text:p>
      <text:p text:style-name="P116"><text:span text:style-name="T160">spr</text:span><text:span text:style-name="T148"> Hm=f </text:span><text:span text:style-name="T149">r Km.t</text:span></text:p>
      <text:p text:style-name="P117"><text:span text:style-name="T149">i</text:span><text:span text:style-name="T169">r.n=s irty nb </text:span><text:span text:style-name="T161">Hm.</text:span><text:span text:style-name="T162">t</text:span><text:span text:style-name="T161">-</text:span><text:span text:style-name="T169">nsw</text:span></text:p>
      <text:p text:style-name="P123"/>
      <text:p text:style-name="P117"><text:span text:style-name="T117">x</text:span><text:span text:style-name="T93">pr </text:span><text:span text:style-name="T170">Hsb.t 15 Smw </text:span><text:span text:style-name="T171">(2)</text:span><text:span text:style-name="T170"> sw 22</text:span></text:p>
      <text:p text:style-name="P118"><text:span text:style-name="T170">i</text:span><text:span text:style-name="T93">sk Hm=f </text:span><text:span text:style-name="T177">m </text:span><text:span text:style-name="T93">WAs.t Nx.t </text:span><text:span text:style-name="T178">@m</text:span><text:span text:style-name="T172">.t </text:span><text:span text:style-name="T178">N</text:span><text:span text:style-name="T172">i</text:span><text:span text:style-name="T173">w.wt</text:span></text:p>
      <text:p text:style-name="P119"><text:span text:style-name="T93">Hr ir</text:span><text:span text:style-name="T179">{</text:span><text:span text:style-name="T93">y</text:span><text:span text:style-name="T179">}&lt;.t&gt;</text:span><text:span text:style-name="T93"> </text:span><text:span text:style-name="T209">(7)</text:span><text:span text:style-name="T184"> </text:span><text:span text:style-name="T93">Hs</text:span><text:span text:style-name="T197">(ty)</text:span><text:span text:style-name="T93"> n </text:span><text:span text:style-name="T180">(i)</text:span><text:span text:style-name="T174">t</text:span><text:span text:style-name="T182">=f</text:span><text:span text:style-name="T174"> Imn-</text:span><text:span text:style-name="T181">Ra </text:span><text:span text:style-name="T174">Nb </text:span><text:span text:style-name="T183">Nsw.t</text:span><text:span text:style-name="T175"> &amp;A.wy</text:span></text:p>
      <text:p text:style-name="P120"><text:span text:style-name="T185">m </text:span><text:span text:style-name="T93">hb=f nfr </text:span><text:span text:style-name="T186">n</text:span><text:span text:style-name="T93"> </text:span><text:span text:style-name="T187">I</text:span><text:span text:style-name="T93">p</text:span><text:span text:style-name="T187">(.t)</text:span><text:span text:style-name="T93"> </text:span><text:span text:style-name="T188">s.t</text:span><text:span text:style-name="T176"> ib=f nt sp tp</text:span></text:p>
      <text:p text:style-name="P121"><text:span text:style-name="T93">i</text:span><text:span text:style-name="T189">i</text:span><text:span text:style-name="T93">.tw r Dd n Hm=f</text:span></text:p>
      <text:p text:style-name="P121"><text:span text:style-name="T93">wn wp.</text:span><text:span text:style-name="T192">(</text:span><text:span text:style-name="T191">wt)</text:span><text:span text:style-name="T93"> ii.n pA wr n Bxt</text:span><text:span text:style-name="T190">n</text:span><text:span text:style-name="T93"> </text:span><text:span text:style-name="T193">iw</text:span><text:span text:style-name="T93"> Xr </text:span><text:span text:style-name="T194">in.</text:span><text:span text:style-name="T193">w</text:span><text:span text:style-name="T93"> </text:span><text:span text:style-name="T193">aS(A)</text:span><text:span text:style-name="T196">{</text:span><text:span text:style-name="T195">t</text:span><text:span text:style-name="T196">}</text:span><text:span text:style-name="T93"> n nsw.t</text:span></text:p>
      <text:p text:style-name="P49"/>
      <text:p text:style-name="P49"/>
      <text:p text:style-name="P69">Then <text:span text:style-name="T242">her titulary [F 138] </text:span><text:span text:style-name="T243">was recorded [F 73] [past passive]: </text:span><text:span text:style-name="T244">Great Queen Neferure.</text:span></text:p>
      <text:p text:style-name="P64">As the king returned <text:span text:style-name="T247">[second tense?]</text:span> to <text:span text:style-name="T245">the Black Lan</text:span><text:span text:style-name="T246">d</text:span>,</text:p>
      <text:p text:style-name="P70"><text:span text:style-name="T247">so she did every doing </text:span><text:span text:style-name="T275">[</text:span><text:span text:style-name="T276">wh</text:span><text:span text:style-name="T277">ich</text:span><text:span text:style-name="T276"> </text:span><text:span text:style-name="T275">noun </text:span><text:span text:style-name="T276">form?</text:span><text:span text:style-name="T275">] </text:span><text:span text:style-name="T247">of a king’s wife </text:span><text:span text:style-name="T248">[direct genitive]</text:span><text:span text:style-name="T247">.</text:span></text:p>
      <text:p text:style-name="P70"/>
      <text:p text:style-name="P70">It happened <text:span text:style-name="T252">in regnal year 15, month 2 [playful spelling], </text:span><text:span text:style-name="T253">day 22,</text:span></text:p>
      <text:p text:style-name="P72"><text:span text:style-name="T278">lo</text:span> [“non-enclitic” particle, TLA 31760; see also F 30], <text:span text:style-name="T254">his majesty </text:span><text:span text:style-name="T255">[was] in </text:span><text:span text:style-name="T279">Mighty </text:span><text:span text:style-name="T255">Thebes, </text:span><text:span text:style-name="T257">Wife</text:span><text:span text:style-name="T256"> of </text:span><text:span text:style-name="T258">the </text:span><text:span text:style-name="T256">Cities,</text:span></text:p>
      <text:p text:style-name="P73">[and] was doing <text:span text:style-name="T58">(7)</text:span><text:span text:style-name="T265"> </text:span><text:span text:style-name="T259">the rit</text:span><text:span text:style-name="T260">e</text:span><text:span text:style-name="T259">s </text:span><text:span text:style-name="T284">[F 177] </text:span><text:span text:style-name="T260">for </text:span><text:span text:style-name="T261">his father [</text:span><text:span text:style-name="T220">f</text:span><text:span text:style-name="T261"> for both </text:span><text:span text:style-name="T220">it</text:span><text:span text:style-name="T261"> and </text:span><text:span text:style-name="T220">=f</text:span><text:span text:style-name="T261">?], </text:span><text:span text:style-name="T262">Amun-Re, </text:span><text:span text:style-name="T263">Lord </text:span><text:span text:style-name="T264">of Thrones of the Two Lands [TLA 26200],</text:span></text:p>
      <text:p text:style-name="P74">in his fine feast <text:span text:style-name="T266">of Luxor</text:span><text:span text:style-name="T266"><text:note text:id="ftn4" text:note-class="footnote"><text:note-citation>4</text:note-citation><text:note-body><text:p text:style-name="P148"><text:span text:style-name="T212">Ip</text:span><text:span text:style-name="T221">(.t)</text:span> = Ipet = “The Adyton”.</text:p></text:note-body></text:note></text:span><text:span text:style-name="T266"> </text:span><text:span text:style-name="T280">[F 16]</text:span><text:span text:style-name="T266">, </text:span><text:span text:style-name="T267">his heart’s place [direct genitive] </text:span><text:span text:style-name="T268">since [“from”] the </text:span><text:span text:style-name="T281">beginning of time [“foremost</text:span><text:span text:style-name="T268"> time”</text:span><text:span text:style-name="T267">]</text:span><text:span text:style-name="T268">,</text:span></text:p>
      <text:p text:style-name="P75">[when] one came to say to his majesty:</text:p>
      <text:p text:style-name="P76">There <text:span text:style-name="T271">was </text:span><text:span text:style-name="T272">[</text:span><text:span text:style-name="T390">imperfect</text:span><text:span text:style-name="T272"> converter]</text:span> a <text:span text:style-name="T270">messenger</text:span><text:span text:style-name="T269"> [F 17, 60] </text:span><text:span text:style-name="T270">of the chief of Bakhtan </text:span><text:span text:style-name="T283">that</text:span><text:span text:style-name="T282"> came</text:span><text:span text:style-name="T270">, </text:span><text:span text:style-name="T282">with[?]</text:span><text:span text:style-name="T273"> numerous [F 49] presents have come for the queen.</text:span></text:p>
      <text:p text:style-name="P70"/>
      <text:p text:style-name="P67"/>
      <text:p text:style-name="P24"><text:span text:style-name="T121">1</text:span><text:span text:style-name="T93">/</text:span><text:span text:style-name="T176">18</text:span><text:span text:style-name="T93">/2</text:span><text:span text:style-name="T163">6</text:span></text:p>
      <text:p text:style-name="P54"/>
      <text:p text:style-name="P54"/>
      <text:p text:style-name="P124">aHa.n ms<text:span text:style-name="T295">(.w)</text:span><text:span text:style-name="T322">[?]</text:span>=f <text:span text:style-name="T59">(8)</text:span><text:span text:style-name="T285"> m-b</text:span><text:span text:style-name="T296">AH</text:span><text:span text:style-name="T285"> </text:span><text:span text:style-name="T286">Hm=f </text:span><text:span text:style-name="T287">Hna in.w=f</text:span></text:p>
      <text:p text:style-name="P125">Dd=f m <text:span text:style-name="T302">swAS</text:span> Hm=f</text:p>
      <text:p text:style-name="P126">iw n=k <text:span text:style-name="T305">Ra</text:span> n PDt 9 <text:span text:style-name="T306">i</text:span>m<text:span text:style-name="T306">i</text:span> nn anx <text:span text:style-name="T306">x</text:span>r=k</text:p>
      <text:p text:style-name="P127">aHa.n Dd=f sn-<text:span text:style-name="T304">tA</text:span> <text:span text:style-name="T298">m-</text:span>b<text:span text:style-name="T297">A</text:span>H Hm=f <text:span text:style-name="T307">wH</text:span><text:span text:style-name="T288">m=f Dd xr Hm=f</text:span></text:p>
      <text:p text:style-name="P128">ii<text:span text:style-name="T313">=i </text:span>n=k <text:s/>it- <text:span text:style-name="T60">(9)</text:span><text:span text:style-name="T289"> -</text:span>y <text:span text:style-name="T290">nb Hr </text:span><text:span text:style-name="T310">Bn</text:span><text:span text:style-name="T290">t</text:span><text:span text:style-name="T310">rS</text:span><text:span text:style-name="T290"> </text:span><text:span text:style-name="T311">sn</text:span><text:span text:style-name="T290">w.t </text:span><text:span text:style-name="T312">kt n Hm.</text:span><text:span text:style-name="T291">t-nsw Nfr.w-Ra</text:span></text:p>
      <text:p text:style-name="P128"><text:span text:style-name="T291">mn </text:span><text:span text:style-name="T318">Abx(.w)</text:span><text:span text:style-name="T292"> m H</text:span><text:span text:style-name="T318">aw</text:span><text:span text:style-name="T292">=s</text:span></text:p>
      <text:p text:style-name="P51"/>
      <text:p text:style-name="P50"/>
      <text:p text:style-name="P77">Then <text:span text:style-name="T296">he was </text:span><text:span text:style-name="T320">brought </text:span><text:span text:style-name="T296">[</text:span><text:span text:style-name="T327">F 116</text:span><text:span text:style-name="T296">] (8) </text:span><text:span text:style-name="T300">before [“</text:span><text:span text:style-name="T296">into </text:span><text:span text:style-name="T299">the </text:span><text:span text:style-name="T301">potency</text:span><text:span text:style-name="T299"> of”</text:span><text:span text:style-name="T300">] </text:span><text:span text:style-name="T344">[F 77–78]</text:span><text:span text:style-name="T299"> his majesty, with </text:span><text:span text:style-name="T302">his gifts,</text:span></text:p>
      <text:p text:style-name="P78">[and] he said, <text:span text:style-name="T303">in praising [F 216] his majesty,</text:span></text:p>
      <text:p text:style-name="P79"><text:soft-page-break/>Hail to you, Re of the Nine Bows! Give us life from you!</text:p>
      <text:p text:style-name="P80">Then he <text:span text:style-name="T308">spoke </text:span><text:span text:style-name="T309">[tribute]</text:span><text:span text:style-name="T308">, </text:span><text:span text:style-name="T324">kissin</text:span><text:span text:style-name="T308">g the </text:span>earth <text:span text:style-name="T325">[TLA 888530] </text:span><text:span text:style-name="T314">[typo for </text:span><text:span text:style-name="T222">tA</text:span><text:span text:style-name="T314"> in De Buck?] </text:span>before his majesty, <text:span text:style-name="T309">[and] he continued, saying to his majesty:</text:span></text:p>
      <text:p text:style-name="P81">I have come to <text:span text:style-name="T315">you, sovereign, lord, on [account of] Bentresh, </text:span><text:span text:style-name="T316">the younger [“other”] daughter </text:span><text:span text:style-name="T317">of the king’s wife Neferure.</text:span></text:p>
      <text:p text:style-name="P82">Illness has seized [F 2] her body.</text:p>
      <text:p text:style-name="P71"/>
      <text:p text:style-name="P68"/>
      <text:p text:style-name="P25"><text:span text:style-name="T198">2</text:span><text:span text:style-name="T93">/</text:span><text:span text:style-name="T198">1</text:span><text:span text:style-name="T93">/2</text:span><text:span text:style-name="T163">6</text:span></text:p>
      <text:p text:style-name="P55"/>
      <text:p text:style-name="P55"/>
      <text:p text:style-name="P129">i<text:span text:style-name="T330">m</text:span><text:span text:style-name="T323">{</text:span><text:span text:style-name="T319">t</text:span><text:span text:style-name="T323">}</text:span><text:span text:style-name="T321">[?]</text:span><text:span text:style-name="T319"> wD</text:span><text:span text:style-name="T293"> Hm=k rx-</text:span><text:span text:style-name="T328">(</text:span><text:span text:style-name="T319">i</text:span><text:span text:style-name="T328">)</text:span><text:span text:style-name="T293">x.t r mA=s</text:span></text:p>
      <text:p text:style-name="P130">aHa Dd.n Hm=f</text:p>
      <text:p text:style-name="P132">in <text:span text:style-name="T332">n=i</text:span> T<text:span text:style-name="T334">t(iw)</text:span> nt pr-anx <text:span text:style-name="T335">qnb.(w)t</text:span> <text:span text:style-name="T62">(10)</text:span><text:span text:style-name="T294"> n</text:span><text:span text:style-name="T335">T</text:span><text:span text:style-name="T294"> Tnw</text:span></text:p>
      <text:p text:style-name="P132"><text:span text:style-name="T340">s</text:span><text:span text:style-name="T345">TA.</text:span><text:span text:style-name="T339">n=f </text:span><text:span text:style-name="T340">H</text:span><text:span text:style-name="T345">r-</text:span><text:span text:style-name="T340">a</text:span><text:span text:style-name="T345">(wy)</text:span></text:p>
      <text:p text:style-name="P131">Dd Hm=f</text:p>
      <text:p text:style-name="P133"><text:span text:style-name="T347">mt(n)</text:span> <text:span text:style-name="T347">rti </text:span><text:span text:style-name="T350">(tw)</text:span> aS<text:span text:style-name="T349">{t}</text:span>.tw n <text:span text:style-name="T351">{</text:span><text:span text:style-name="T350">t</text:span><text:span text:style-name="T351">}&lt;T&gt;</text:span>n r sDm<text:span text:style-name="T348">=</text:span>tn mdw Tn</text:p>
      <text:p text:style-name="P134">isk in <text:span text:style-name="T353">n</text:span>=i <text:span text:style-name="T352">Hm</text:span>w.t m ib=f sS m <text:span text:style-name="T355">Dbaw</text:span><text:span text:style-name="T341">=f m q</text:span><text:span text:style-name="T359">(A)</text:span><text:span text:style-name="T341">b=tn</text:span></text:p>
      <text:p text:style-name="P135">ii pw &lt;i<text:span text:style-name="T369">r</text:span>&gt; n sS <text:span text:style-name="T55">(11)</text:span> <text:span text:style-name="T360">n</text:span>sw tn +<text:span text:style-name="T361">H</text:span>wt<text:span text:style-name="T361">y-</text:span>m-<text:span text:style-name="T362">@b</text:span><text:span text:style-name="T342"> m-b</text:span><text:span text:style-name="T343">A</text:span><text:span text:style-name="T342">H Hm=f</text:span></text:p>
      <text:p text:style-name="P136"><text:span text:style-name="T366">w</text:span>D.n Hm=f Smy=f r Bxtn Hna wp.<text:span text:style-name="T368">(wt)</text:span> pn</text:p>
      <text:p text:style-name="P137">spr pw ir n <text:span text:style-name="T293">rx-</text:span><text:span text:style-name="T328">(</text:span><text:span text:style-name="T319">i</text:span><text:span text:style-name="T328">)</text:span><text:span text:style-name="T293">x.t </text:span>r Bxtn</text:p>
      <text:p text:style-name="P138"><text:span text:style-name="T372">gm</text:span>.n=f <text:span text:style-name="T373">B</text:span>nt<text:span text:style-name="T373">rS</text:span> m sxr <text:span text:style-name="T374">X</text:span>r ax.<text:span text:style-name="T375">yw</text:span></text:p>
      <text:p text:style-name="P131"/>
      <text:p text:style-name="P149"/>
      <text:p text:style-name="P155">O<text:span text:style-name="T326"> [that] your majesty </text:span><text:span text:style-name="T330">[would] </text:span><text:span text:style-name="T326">command a wise man [</text:span><text:span text:style-name="T329">missing determinative? F 151</text:span><text:span text:style-name="T326">] </text:span><text:span text:style-name="T328">to </text:span><text:span text:style-name="T331">inspect [F 100] her.</text:span></text:p>
      <text:p text:style-name="P156">Then his majesty spoke:</text:p>
      <text:p text:style-name="P157">Bring <text:span text:style-name="T333">to me </text:span><text:span text:style-name="T334">the staff [TLA 177470] of the temple [“house of life”], </text:span><text:span text:style-name="T336">the councils </text:span><text:span text:style-name="T337">[F 280] </text:span><text:span text:style-name="T61">(10)</text:span><text:span text:style-name="T338"> </text:span><text:span text:style-name="T336">of the residence.</text:span></text:p>
      <text:p text:style-name="P160">They were ushered in [F 255] immediately [F 175].</text:p>
      <text:p text:style-name="P161"><text:span text:style-name="T346">Spoke h</text:span>is majesty:</text:p>
      <text:p text:style-name="P162">Look, <text:span text:style-name="T350">it was caused that you were summoned [F 48] </text:span><text:span text:style-name="T351">to this, in order</text:span><text:span text:style-name="T350"> that you </text:span><text:span text:style-name="T351">hear [prospective] these words.</text:span></text:p>
      <text:p text:style-name="P163">Now, bring to me <text:span text:style-name="T354">a </text:span><text:span text:style-name="T356">craftsman </text:span><text:span text:style-name="T354">[F 170] </text:span><text:span text:style-name="T357">in</text:span><text:span text:style-name="T356"> his heart</text:span><text:span text:style-name="T354">, </text:span><text:span text:style-name="T356">a scribe in his fingers, </text:span><text:span text:style-name="T358">[from] within your midst [F 275].</text:span></text:p>
      <text:p text:style-name="P164">There was a coming by a <text:span text:style-name="T362">royal</text:span> <text:span text:style-name="T63">(11)</text:span><text:span text:style-name="T365"> </text:span>scribe, <text:span text:style-name="T362">this </text:span><text:span text:style-name="T363">Thothemheb [</text:span><text:span text:style-name="T223">Hb</text:span><text:span text:style-name="T363"> on F 167], </text:span><text:span text:style-name="T364">before his majesty.</text:span></text:p>
      <text:p text:style-name="P165">His majesty commanded that he go forth to Bakhtan <text:span text:style-name="T367">with this messenger.</text:span></text:p>
      <text:p text:style-name="P166">There was an arrival <text:span text:style-name="T370">by this wise man </text:span><text:span text:style-name="T371">to Bakhtan,</text:span></text:p>
      <text:p text:style-name="P167">[where] he found Bentresh in the state [F 242–243] of [being] upon <text:span text:style-name="T376">spirits </text:span><text:span text:style-name="T377">[F 4],</text:span></text:p>
      <text:p text:style-name="P158"/>
      <text:p text:style-name="P153"/>
      <text:p text:style-name="P26"><text:span text:style-name="T199">4</text:span><text:span text:style-name="T93">/</text:span><text:span text:style-name="T198">1</text:span><text:span text:style-name="T199">9</text:span><text:span text:style-name="T93">/2</text:span><text:span text:style-name="T163">6</text:span></text:p>
      <text:p text:style-name="P56"/>
      <text:p text:style-name="P56"/>
      <text:p text:style-name="P139"><text:span text:style-name="T378">gm</text:span>.n=f <text:span text:style-name="T55">(12)</text:span> sw <text:span text:style-name="T379">xry </text:span><text:span text:style-name="T380">n aHA Hna=f</text:span></text:p>
      <text:p text:style-name="P140">wn wr n Bxtn <text:span text:style-name="T381">wH</text:span><text:span text:style-name="T383">[</text:span><text:span text:style-name="T381">m=f h</text:span><text:span text:style-name="T382">(A)</text:span><text:span text:style-name="T381">b </text:span><text:span text:style-name="T382">m-bAH</text:span><text:span text:style-name="T383">]</text:span><text:span text:style-name="T382"> Hm=f </text:span><text:span text:style-name="T383">m Dd</text:span></text:p>
      <text:p text:style-name="P141">ity nb=i im wD.<text:span text:style-name="T392">{tw}</text:span> Hm=f rdi in.tw nTr[…]</text:p>
      <text:p text:style-name="P141"/>
      <text:p text:style-name="P142"><text:span text:style-name="T65">(13)</text:span><text:span text:style-name="T412"> </text:span>r Hm=f n rnp.t sp 26 Abd <text:span text:style-name="T413">(1)</text:span> Smw sw ifd <text:span text:style-name="T391">H</text:span>b Imn</text:p>
      <text:p text:style-name="P143">iw Hm=f m WAs.t</text:p>
      <text:p text:style-name="P150"><text:soft-page-break/></text:p>
      <text:p text:style-name="P150"/>
      <text:p text:style-name="P168"><text:span text:style-name="T386">[where] h</text:span>e found <text:span text:style-name="T64">(12)</text:span><text:span text:style-name="T384"> </text:span>him<text:span text:style-name="T387">[self]</text:span> an enemy [F 195] <text:span text:style-name="T411">[L 370, 372] </text:span><text:span text:style-name="T380">for fight[ing] with him.</text:span></text:p>
      <text:p text:style-name="P169">There was <text:span text:style-name="T272">[</text:span><text:span text:style-name="T390">imperfect</text:span><text:span text:style-name="T272"> converter] </text:span>a chief of Bakhtan <text:span text:style-name="T385">that [“he”] re</text:span><text:span text:style-name="T388">layed the </text:span><text:span text:style-name="T389">message</text:span><text:span text:style-name="T385"> in the presence of his majesty, saying:</text:span></text:p>
      <text:p text:style-name="P170">Sovereign, my lord, may <text:span text:style-name="T393">your majesty command to cause to be brought a god[</text:span><text:span text:style-name="T395">…]</text:span></text:p>
      <text:p text:style-name="P177"/>
      <text:p text:style-name="P171"><text:span text:style-name="T398">(</text:span><text:span text:style-name="T397">13)</text:span><text:span text:style-name="T394"> </text:span><text:span text:style-name="T400">[to] his majesty in year 26, </text:span><text:span text:style-name="T401">the first month of summer,</text:span><text:span text:style-name="T401"><text:note text:id="ftn5" text:note-class="footnote"><text:note-citation>5</text:note-citation><text:note-body><text:p text:style-name="P176"><text:span text:style-name="T212">Smw</text:span> = Shemu = “Harvest”.</text:p></text:note-body></text:note></text:span><text:span text:style-name="T401"> day four [of] the festival of Amun,</text:span></text:p>
      <text:p text:style-name="P172"><text:span text:style-name="T401">w</text:span><text:span text:style-name="T394">hile his majesty was in Thebes:</text:span></text:p>
      <text:p text:style-name="P159"/>
      <text:p text:style-name="P154"/>
      <text:p text:style-name="P27"><text:span text:style-name="T200">5</text:span><text:span text:style-name="T93">/</text:span><text:span text:style-name="T200">3</text:span><text:span text:style-name="T93">/2</text:span><text:span text:style-name="T163">6</text:span></text:p>
      <text:p text:style-name="P57"/>
      <text:p text:style-name="P57"/>
      <text:p text:style-name="P144"><text:span text:style-name="T396">a</text:span><text:span text:style-name="T394">Ha.n wHm.n Hm=f </text:span><text:span text:style-name="T402">m-b(AH) </text:span><text:span text:style-name="T404">#</text:span><text:span text:style-name="T402">nsw-m-W</text:span><text:span text:style-name="T407">A</text:span><text:span text:style-name="T402">s.t </text:span><text:span text:style-name="T405">N</text:span><text:span text:style-name="T402">fr-H[tp] m-Dd</text:span></text:p>
      <text:p text:style-name="P144"><text:span text:style-name="T402">pA nb nfr ir</text:span><text:span text:style-name="T403">=i </text:span><text:span text:style-name="T405">wH</text:span><text:span text:style-name="T403">m m-b(AH)=k Hr sA.t n pA wr n Bx- </text:span><text:span text:style-name="T399">(14)</text:span><text:span text:style-name="T403"> -tn</text:span></text:p>
      <text:p text:style-name="P145"><text:span text:style-name="T394">aHa.n </text:span><text:span text:style-name="T405">s</text:span><text:span text:style-name="T406">t</text:span><text:span text:style-name="T405">A.</text:span><text:span text:style-name="T394">n </text:span><text:span text:style-name="T404">#</text:span><text:span text:style-name="T394">nsw-m-W</text:span><text:span text:style-name="T407">A</text:span><text:span text:style-name="T394">s.t </text:span><text:span text:style-name="T405">N</text:span><text:span text:style-name="T394">fr-Htp r </text:span><text:span text:style-name="T407">#</text:span><text:span text:style-name="T394">nsw-</text:span><text:span text:style-name="T407">pA-ir-sxr </text:span><text:span text:style-name="T394">nTr </text:span><text:span text:style-name="T408">aA </text:span><text:span text:style-name="T394">sHr</text:span><text:span text:style-name="T409">(i)</text:span><text:span text:style-name="T394"> </text:span><text:span text:style-name="T404">SmA.w</text:span></text:p>
      <text:p text:style-name="P146"><text:span text:style-name="T394">aHa.n Dd.n </text:span><text:span text:style-name="T410">H</text:span><text:span text:style-name="T394">m=f m-b(AH) #nsw-</text:span><text:span text:style-name="T407">m-WAs.t Nfr-Htp</text:span></text:p>
      <text:p text:style-name="P151"/>
      <text:p text:style-name="P151"/>
      <text:p text:style-name="P173">Then his majesty relayed <text:span text:style-name="T414">in the presence </text:span><text:span text:style-name="T415">of Khonsu-of-Thebes Neferhotep, saying:</text:span></text:p>
      <text:p text:style-name="P174"><text:span text:style-name="T424">[“</text:span>The”<text:span text:style-name="T424">]</text:span> good lord, I make a report in your presence about [“upon”] [the] daughter of the chief of Bakh- <text:span text:style-name="T55">(14)</text:span> -tan.</text:p>
      <text:p text:style-name="P174"><text:span text:style-name="T419">T</text:span>hen Khonsu-of-Thebes Neferhotep brought [“pulled”] [F 255, <text:span text:style-name="T50">cf.</text:span><text:span text:style-name="T417"> 253</text:span>] <text:span text:style-name="T416">to </text:span>Khonsu-<text:span text:style-name="T416">the-Provider, </text:span><text:span text:style-name="T418">great god that dispels [F 238] disease-demons.</text:span></text:p>
      <text:p text:style-name="P175">Then his majesty said, <text:span text:style-name="T414">in the presence </text:span><text:span text:style-name="T415">of Khonsu-of-Thebes Neferhotep:</text:span></text:p>
      <text:p text:style-name="P175"/>
      <text:p text:style-name="P175"/>
      <text:p text:style-name="P28"><text:span text:style-name="T200">5</text:span><text:span text:style-name="T93">/</text:span><text:span text:style-name="T200">17</text:span><text:span text:style-name="T93">/2</text:span><text:span text:style-name="T163">6</text:span></text:p>
      <text:p text:style-name="P58"/>
      <text:p text:style-name="P58"/>
      <text:p text:style-name="P179">pA nb nfr iw ir <text:span text:style-name="T428">di</text:span>=k <text:span text:style-name="T420">Hr=k r #nsw- </text:span><text:span text:style-name="T66">(15)</text:span><text:span text:style-name="T420"> -</text:span><text:span text:style-name="T423">p</text:span><text:span text:style-name="T425">(A)-</text:span><text:span text:style-name="T429">i</text:span><text:span text:style-name="T420">r-sxr nTr aA sHr SmA.w r</text:span><text:span text:style-name="T431">di.t</text:span><text:span text:style-name="T420"> Sm</text:span><text:span text:style-name="T431">i</text:span><text:span text:style-name="T420">=</text:span><text:span text:style-name="T431">f</text:span><text:span text:style-name="T420"> r Bxtn</text:span></text:p>
      <text:p text:style-name="P179"><text:span text:style-name="T421">hn wr </text:span><text:span text:style-name="T431">sp 2</text:span></text:p>
      <text:p text:style-name="P180">aHa.n dD.n Hm=f</text:p>
      <text:p text:style-name="P181"><text:span text:style-name="T432">im</text:span> <text:span text:style-name="T435">sA</text:span>=k Hna=f <text:span text:style-name="T434">di=i</text:span> Smi Hm=f r Bxtn r nHm <text:span text:style-name="T433">sA.</text:span>t n wr n Bxtn</text:p>
      <text:p text:style-name="P181"><text:span text:style-name="T55">(16)</text:span> <text:span text:style-name="T422">hn tp wr </text:span><text:span text:style-name="T437">sp 2</text:span><text:span text:style-name="T422"> n #nsw-m-WAs.t Nfr-Htp</text:span></text:p>
      <text:p text:style-name="P182">aHa ir.n=f <text:span text:style-name="T439">sA </text:span><text:span text:style-name="T423">n #nsw-p</text:span><text:span text:style-name="T425">(A)-</text:span><text:span text:style-name="T423">ir-sxr-m-WAs.t spr 4</text:span></text:p>
      <text:p text:style-name="P152"/>
      <text:p text:style-name="P152"/>
      <text:p text:style-name="P185"><text:span text:style-name="T424">[“</text:span>The”<text:span text:style-name="T424">]</text:span> good lord, <text:span text:style-name="T426">will[? Middle </text:span><text:span text:style-name="T427">in iw</text:span><text:span text:style-name="T426"> to Late </text:span><text:span text:style-name="T427">iw ir</text:span><text:span text:style-name="T426">?] </text:span><text:span text:style-name="T428">you turn [“give”] your face toward Khonsu- </text:span><text:span text:style-name="T67">(15)</text:span><text:span text:style-name="T428"> -the-Provider, </text:span><text:span text:style-name="T429">the great god </text:span><text:span text:style-name="T430">that dispels disease-demons, </text:span><text:span text:style-name="T431">to cause that he go to Bakhtan?</text:span></text:p>
      <text:p text:style-name="P186">A gr<text:span text:style-name="T442">and</text:span> nod [TLA 98810], twice.</text:p>
      <text:p text:style-name="P187">Then his majesty said:</text:p>
      <text:p text:style-name="P188">Give your <text:span text:style-name="T440">[magical]</text:span> protection [F 207] [Gardiner sign V16, substituting for V17] <text:span text:style-name="T436">to [“with”] him, [as] I cause his majesty [?] to go to Bakhtan to rescue the daughter of the chief of Bakhtan.</text:span></text:p>
      <text:p text:style-name="P189"><text:soft-page-break/><text:span text:style-name="T55">(16)</text:span> <text:span text:style-name="T438">A </text:span><text:span text:style-name="T442">grand</text:span><text:span text:style-name="T438"> nod of the head, twice, of Khonsu-of-Thebes Neferhotep.</text:span></text:p>
      <text:p text:style-name="P190">Then he made <text:span text:style-name="T440">protection for Khonsu-the-Provider-in-Thebes, four times.</text:span></text:p>
      <text:p text:style-name="P191"/>
      <text:p text:style-name="P191"/>
      <text:p text:style-name="P195"><text:span text:style-name="T200">5</text:span><text:span text:style-name="T93">/</text:span><text:span text:style-name="T201">31</text:span><text:span text:style-name="T93">/2</text:span><text:span text:style-name="T163">6</text:span></text:p>
      <text:p text:style-name="P196"/>
      <text:p text:style-name="P196"/>
      <text:p text:style-name="P183">wD.n Hm=f rdi.t wDA #nsw-ir-sxr-m-WAs.t r wi<text:span text:style-name="T441">(A)</text:span> aA</text:p>
      <text:p text:style-name="P183">qAqA.<text:span text:style-name="T442">(w)</text:span> 5</text:p>
      <text:p text:style-name="P183">wrr<text:span text:style-name="T444">(y)</text:span>.t</text:p>
      <text:p text:style-name="P184">smsm<text:span text:style-name="T445">[ti]</text:span>.w <text:span text:style-name="T445">aSA.wt imnt.t iAbt.t</text:span></text:p>
      <text:p text:style-name="P192"/>
      <text:p text:style-name="P192"/>
      <text:p text:style-name="P193">His majesty commanded to cause Khonsu-the-Provider-in-Thebes to set out [F 75] <text:span text:style-name="T441">toward the great barque, </text:span><text:span text:style-name="T442">[with] </text:span></text:p>
      <text:p text:style-name="P193"><text:span text:style-name="T442">five </text:span><text:span text:style-name="T444">river-</text:span><text:span text:style-name="T442">boats </text:span><text:span text:style-name="T444">[TLA 159600]</text:span><text:span text:style-name="T442">,</text:span></text:p>
      <text:p text:style-name="P193"><text:span text:style-name="T443">a chari- (17) -ot </text:span><text:span text:style-name="T444">[F 65]</text:span><text:span text:style-name="T443">,</text:span></text:p>
      <text:p text:style-name="P194">[and] numerous beasts [TLA 135790?] [on] the right [“to the west”] and the left [“east”].</text:p>
      <text:p text:style-name="P193"/>
      <text:p text:style-name="P186"/>
      <text:p text:style-name="P18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ansliteration" svg:font-family="Transliteration" style:font-pitch="variable"/>
    <style:font-face style:name="Transliteration1" svg:font-family="Transliteration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officeooo:rsid="006fc487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in" fo:margin-bottom="0in" style:contextual-spacing="false" fo:line-height="100%" fo:keep-together="always" fo:keep-with-next="always"/>
      <style:text-properties style:font-name="Arial" fo:font-family="Arial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in" fo:margin-bottom="0in" style:contextual-spacing="false" fo:line-height="100%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style:font-name="Arial" fo:font-family="Arial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 loext:linked-style-name="Header">
      <style:text-properties style:font-name="Times New Roman1" fo:font-family="'Times New Roman'" style:font-family-generic="roman" style:font-pitch="variable" fo:font-size="12pt" style:font-size-asian="12pt"/>
    </style:style>
    <style:style style:name="Footer_20_Char" style:display-name="Footer Char" style:family="text" style:parent-style-name="Default_20_Paragraph_20_Font" loext:linked-style-name="Footer">
      <style:text-properties style:font-name="Times New Roman1" fo:font-family="'Times New Roman'" style:font-family-generic="roman" style:font-pitch="variable" fo:font-size="12pt" style:font-size-asian="12pt"/>
    </style:style>
    <style:style style:name="Heading_20_2_20_Char" style:display-name="Heading 2 Char" style:family="text" style:parent-style-name="Default_20_Paragraph_20_Font" loext:linked-style-name="Heading_20_2"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5.7701in" table:align="margins" fo:background-color="transparent" style:writing-mode="lr-tb">
        <style:background-image/>
      </style:table-properties>
    </style:style>
    <style:style style:name="Table1.A" style:family="table-column">
      <style:table-column-properties style:column-width="1.9236in" style:rel-column-width="21845*"/>
    </style:style>
    <style:style style:name="Table1.1" style:family="table-row">
      <style:table-row-properties style:min-row-height="0.1861in" fo:background-color="transparent">
        <style:background-image/>
      </style:table-row-properties>
    </style:style>
    <style:style style:name="Table1.A1" style:family="table-cell">
      <style:table-cell-properties fo:padding="0in" fo:border="none"/>
    </style:style>
    <style:style style:name="MP1" style:family="paragraph" style:parent-style-name="Header">
      <style:text-properties officeooo:paragraph-rsid="00232ec2"/>
    </style:style>
    <style:style style:name="MP2" style:family="paragraph" style:parent-style-name="Header">
      <style:paragraph-properties fo:text-align="center" style:justify-single-word="false"/>
      <style:text-properties style:font-name="Arial" fo:font-size="10pt" fo:font-style="normal" fo:font-weight="normal" officeooo:rsid="019ca9fd" officeooo:paragraph-rsid="019ca9f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P3" style:family="paragraph" style:parent-style-name="Header">
      <style:paragraph-properties fo:text-align="end" style:justify-single-word="false"/>
      <style:text-properties officeooo:paragraph-rsid="00232ec2"/>
    </style:style>
    <style:style style:name="MT1" style:family="text">
      <style:text-properties style:font-name="Arial" fo:font-size="10pt" style:font-size-asian="10pt" style:font-name-complex="Arial1" style:font-size-complex="10pt"/>
    </style:style>
    <style:style style:name="MT2" style:family="text">
      <style:text-properties style:font-name="Arial" fo:font-size="10pt" officeooo:rsid="00232ec2" style:font-size-asian="10pt" style:font-name-complex="Arial1" style:font-size-complex="10pt"/>
    </style:style>
    <style:page-layout style:name="Mpm1">
      <style:page-layout-properties fo:page-width="8.2701in" fo:page-height="11.6902in" style:num-format="1" style:print-orientation="portrait" fo:margin-top="0.5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598in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 table:number-columns-repeated="3"/>
          <table:table-row table:style-name="Table1.1">
            <table:table-cell table:style-name="Table1.A1" office:value-type="string">
              <text:p text:style-name="MP1"><text:span text:style-name="MT1">Minh-Tâm Trin</text:span><text:span text:style-name="MT2">h</text:span></text:p>
            </table:table-cell>
            <table:table-cell table:style-name="Table1.A1" office:value-type="string">
              <text:p text:style-name="MP2">Bentresh Stela</text:p>
            </table:table-cell>
            <table:table-cell table:style-name="Table1.A1" office:value-type="string">
              <text:p text:style-name="MP3"><text:page-number text:select-page="current">6</text:page-number></text:p>
            </table:table-cell>
          </table:table-row>
        </table:table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rinh</meta:initial-creator>
    <meta:editing-cycles>1121</meta:editing-cycles>
    <meta:print-date>2025-02-09T21:44:00</meta:print-date>
    <meta:creation-date>2025-01-12T21:03:00</meta:creation-date>
    <dc:date>2026-05-17T17:11:37.822084157</dc:date>
    <meta:editing-duration>P5DT14H55M1S</meta:editing-duration>
    <meta:generator>LibreOffice/7.3.7.2$Linux_X86_64 LibreOffice_project/30$Build-2</meta:generator>
    <meta:document-statistic meta:table-count="1" meta:image-count="0" meta:object-count="0" meta:page-count="8" meta:paragraph-count="190" meta:word-count="1870" meta:character-count="10501" meta:non-whitespace-character-count="8814"/>
    <meta:user-defined meta:name="AppVersion">16.0000</meta:user-defined>
    <meta:template xlink:type="simple" xlink:actuate="onRequest" xlink:title="Normal" xlink:href=""/>
  </office:meta>
</office:document-meta>
</file>