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e8284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2" style:font-size-complex="12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213c42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791e41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8c33c7" style:font-weight-asian="bold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84a2a" style:font-weight-asian="bold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b386a" style:font-weight-asian="bold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881bde" style:font-weight-asian="bold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9ead77" style:font-weight-asian="bold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bd2d16" style:font-weight-asian="bold" style:font-weight-complex="bold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2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d2748f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ransliteration1" officeooo:rsid="01bb6611" officeooo:paragraph-rsid="01c261d7" style:font-name-complex="Times New Roman2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854a0" officeooo:paragraph-rsid="01c854a0" style:font-name-complex="Times New Roman2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bb55b" officeooo:paragraph-rsid="01c3673a" style:font-name-complex="Times New Roman2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2" style:font-size-complex="12pt" style:font-style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2" style:font-size-complex="12pt" style:font-style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2" style:font-size-complex="12pt" style:font-style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c7abc7" style:font-style-asian="normal" style:font-name-complex="Times New Roman2" style:font-size-complex="12pt" style:font-style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1a55361" officeooo:paragraph-rsid="01ef44e0" style:font-style-asian="normal" style:font-weight-asian="bold" style:font-name-complex="Times New Roman2" style:font-size-complex="12pt" style:font-style-complex="normal" style:font-weight-complex="bold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e9dda9" officeooo:paragraph-rsid="01ef44e0" style:font-style-asian="normal" style:font-weight-asian="normal" style:font-name-complex="Times New Roman2" style:font-size-complex="12pt" style:font-style-complex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05479" officeooo:paragraph-rsid="01f05479" style:font-style-asian="normal" style:font-weight-asian="normal" style:font-name-complex="Times New Roman2" style:font-size-complex="12pt" style:font-style-complex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1f1d686" style:font-style-asian="normal" style:font-weight-asian="normal" style:font-name-complex="Times New Roman2" style:font-size-complex="12pt" style:font-style-complex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21bc77b" style:font-style-asian="normal" style:font-weight-asian="normal" style:font-name-complex="Times New Roman2" style:font-size-complex="12pt" style:font-style-complex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fa615" officeooo:paragraph-rsid="01ff79e8" style:font-style-asian="normal" style:font-weight-asian="normal" style:font-name-complex="Times New Roman2" style:font-size-complex="12pt" style:font-style-complex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0bb4cf" style:font-style-asian="normal" style:font-weight-asian="normal" style:font-name-complex="Times New Roman2" style:font-size-complex="12pt" style:font-style-complex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8d42e0" style:font-style-asian="normal" style:font-weight-asian="normal" style:font-name-complex="Times New Roman2" style:font-size-complex="12pt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e13cf5" style:font-style-asian="normal" style:font-weight-asian="normal" style:font-name-complex="Times New Roman2" style:font-size-complex="12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213c42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34945" officeooo:paragraph-rsid="02434945" style:font-style-asian="normal" style:font-weight-asian="normal" style:font-name-complex="Times New Roman2" style:font-size-complex="12pt" style:font-style-complex="normal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7238f" officeooo:paragraph-rsid="0247238f" style:font-style-asian="normal" style:font-weight-asian="normal" style:font-name-complex="Times New Roman2" style:font-size-complex="12pt" style:font-style-complex="normal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081b2" officeooo:paragraph-rsid="025081b2" style:font-style-asian="normal" style:font-weight-asian="normal" style:font-name-complex="Times New Roman2" style:font-size-complex="12pt" style:font-style-complex="normal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434b1" officeooo:paragraph-rsid="025434b1" style:font-style-asian="normal" style:font-weight-asian="normal" style:font-name-complex="Times New Roman2" style:font-size-complex="12pt" style:font-style-complex="normal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6b750" officeooo:paragraph-rsid="0256b750" style:font-style-asian="normal" style:font-weight-asian="normal" style:font-name-complex="Times New Roman2" style:font-size-complex="12pt" style:font-style-complex="normal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e7f85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76fbb7" style:font-style-asian="normal" style:font-weight-asian="normal" style:font-name-complex="Times New Roman2" style:font-size-complex="12pt" style:font-style-complex="normal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60f33f" style:font-style-asian="normal" style:font-weight-asian="normal" style:font-name-complex="Times New Roman2" style:font-size-complex="12pt" style:font-style-complex="normal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0f33f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29b7c" officeooo:paragraph-rsid="02929b7c" style:font-style-asian="normal" style:font-weight-asian="normal" style:font-name-complex="Times New Roman2" style:font-size-complex="12pt" style:font-style-complex="normal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9d1de" officeooo:paragraph-rsid="0299d1de" style:font-style-asian="normal" style:font-weight-asian="normal" style:font-name-complex="Times New Roman2" style:font-size-complex="12pt" style:font-style-complex="normal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824fe" officeooo:paragraph-rsid="02c5cfef" style:font-style-asian="normal" style:font-weight-asian="normal" style:font-name-complex="Times New Roman2" style:font-size-complex="12pt" style:font-style-complex="normal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b4c69" officeooo:paragraph-rsid="02ab4c69" style:font-style-asian="normal" style:font-weight-asian="normal" style:font-name-complex="Times New Roman2" style:font-size-complex="12pt" style:font-style-complex="normal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d1744" officeooo:paragraph-rsid="02b2008c" style:font-style-asian="normal" style:font-weight-asian="normal" style:font-name-complex="Times New Roman2" style:font-size-complex="12pt" style:font-style-complex="normal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c9c867" officeooo:paragraph-rsid="02c9c867" style:font-style-asian="normal" style:font-weight-asian="normal" style:font-name-complex="Times New Roman2" style:font-size-complex="12pt" style:font-style-complex="normal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efcf31" officeooo:paragraph-rsid="02efcf31" style:font-style-asian="normal" style:font-weight-asian="normal" style:font-name-complex="Times New Roman2" style:font-size-complex="12pt" style:font-style-complex="normal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6ffc2" officeooo:paragraph-rsid="02f6ffc2" style:font-style-asian="normal" style:font-weight-asian="normal" style:font-name-complex="Times New Roman2" style:font-size-complex="12pt" style:font-style-complex="normal" style:font-weight-complex="normal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8fadd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b55ec" officeooo:paragraph-rsid="02fb55ec" style:font-style-asian="normal" style:font-weight-asian="normal" style:font-name-complex="Times New Roman2" style:font-size-complex="12pt" style:font-style-complex="normal" style:font-weight-complex="normal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307faf8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86" style:family="paragraph" style:parent-style-name="Footnote">
      <style:text-properties officeooo:rsid="0203bf40" officeooo:paragraph-rsid="0203bf40"/>
    </style:style>
    <style:style style:name="P87" style:family="paragraph" style:parent-style-name="Footnote">
      <style:text-properties officeooo:rsid="020418e5" officeooo:paragraph-rsid="020418e5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8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94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95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96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97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98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99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100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101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102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103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00%"/>
      <style:text-properties fo:font-weight="normal" officeooo:rsid="020bb4cf" officeooo:paragraph-rsid="020bb4cf" style:font-weight-asian="normal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00%"/>
      <style:text-properties fo:font-weight="normal" officeooo:rsid="0221e33b" officeooo:paragraph-rsid="0221e33b" style:font-weight-asian="normal" style:font-weight-complex="normal"/>
    </style:style>
    <style:style style:name="P108" style:family="paragraph" style:parent-style-name="Standard">
      <style:paragraph-properties fo:margin-top="0in" fo:margin-bottom="0in" style:contextual-spacing="false" fo:line-height="100%"/>
      <style:text-properties fo:font-weight="normal" officeooo:rsid="022f394e" officeooo:paragraph-rsid="027daf88" style:font-weight-asian="normal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P11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05d3b7" officeooo:paragraph-rsid="020f9533" style:font-weight-asian="normal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1a2de0" style:font-weight-asian="normal" style:font-weight-complex="normal"/>
    </style:style>
    <style:style style:name="P11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213c42" style:font-weight-asian="normal" style:font-weight-complex="normal"/>
    </style:style>
    <style:style style:name="P11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92e16" officeooo:paragraph-rsid="02392e16" style:font-weight-asian="normal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cc759" officeooo:paragraph-rsid="024dd552" style:font-weight-asian="normal" style:font-weight-complex="normal"/>
    </style:style>
    <style:style style:name="P11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de31a" officeooo:paragraph-rsid="025248c6" style:font-weight-asian="normal" style:font-weight-complex="normal"/>
    </style:style>
    <style:style style:name="P11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e9dd4" officeooo:paragraph-rsid="02801060" style:font-weight-asian="normal" style:font-weight-complex="normal"/>
    </style:style>
    <style:style style:name="P11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791e41" officeooo:paragraph-rsid="02801060" style:font-weight-asian="normal" style:font-weight-complex="normal"/>
    </style:style>
    <style:style style:name="P12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56ba3" officeooo:paragraph-rsid="02856ba3" style:font-weight-asian="normal" style:font-weight-complex="normal"/>
    </style:style>
    <style:style style:name="P12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69178" officeooo:paragraph-rsid="02869178" style:font-weight-asian="normal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87cfd" officeooo:paragraph-rsid="02887cfd" style:font-weight-asian="normal" style:font-weight-complex="normal"/>
    </style:style>
    <style:style style:name="P12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c33c7" officeooo:paragraph-rsid="028c33c7" style:font-weight-asian="normal" style:font-weight-complex="normal"/>
    </style:style>
    <style:style style:name="P12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1f3155d" officeooo:paragraph-rsid="01f3155d" style:font-style-asian="normal" style:font-weight-asian="normal" style:font-name-complex="Times New Roman2" style:font-size-complex="12pt" style:font-style-complex="normal" style:font-weight-complex="normal"/>
    </style:style>
    <style:style style:name="P12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4299bb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12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12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93565" officeooo:paragraph-rsid="02d93565" style:font-style-asian="normal" style:font-weight-asian="normal" style:font-name-complex="Times New Roman2" style:font-size-complex="12pt" style:font-style-complex="normal" style:font-weight-complex="normal"/>
    </style:style>
    <style:style style:name="P12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db2328" style:font-style-asian="normal" style:font-weight-asian="normal" style:font-name-complex="Times New Roman2" style:font-size-complex="12pt" style:font-style-complex="normal" style:font-weight-complex="normal"/>
    </style:style>
    <style:style style:name="P12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13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c8184" officeooo:paragraph-rsid="03064108" style:font-style-asian="normal" style:font-weight-asian="normal" style:font-name-complex="Times New Roman2" style:font-size-complex="12pt" style:font-style-complex="normal" style:font-weight-complex="normal"/>
    </style:style>
    <style:style style:name="P13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13cf5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3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39e0f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3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d69bf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50ca6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eab97" officeooo:paragraph-rsid="032eab97" style:font-style-asian="normal" style:font-weight-asian="normal" style:font-name-complex="Times New Roman2" style:font-size-complex="12pt" style:font-style-complex="normal" style:font-weight-complex="normal"/>
    </style:style>
    <style:style style:name="P13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08866" officeooo:paragraph-rsid="03308866" style:font-style-asian="normal" style:font-weight-asian="normal" style:font-name-complex="Times New Roman2" style:font-size-complex="12pt" style:font-style-complex="normal" style:font-weight-complex="normal"/>
    </style:style>
    <style:style style:name="P13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158a2" officeooo:paragraph-rsid="033158a2" style:font-style-asian="normal" style:font-weight-asian="normal" style:font-name-complex="Times New Roman2" style:font-size-complex="12pt" style:font-style-complex="normal" style:font-weight-complex="normal"/>
    </style:style>
    <style:style style:name="P13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69c0c" officeooo:paragraph-rsid="03369c0c" style:font-style-asian="normal" style:font-weight-asian="normal" style:font-name-complex="Times New Roman2" style:font-size-complex="12pt" style:font-style-complex="normal" style:font-weight-complex="normal"/>
    </style:style>
    <style:style style:name="P13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785ad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4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5c7f" officeooo:paragraph-rsid="03395c7f" style:font-style-asian="normal" style:font-weight-asian="normal" style:font-name-complex="Times New Roman2" style:font-size-complex="12pt" style:font-style-complex="normal" style:font-weight-complex="normal"/>
    </style:style>
    <style:style style:name="P14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ad32" officeooo:paragraph-rsid="036042c5" style:font-style-asian="normal" style:font-weight-asian="normal" style:font-name-complex="Times New Roman2" style:font-size-complex="12pt" style:font-style-complex="normal" style:font-weight-complex="normal"/>
    </style:style>
    <style:style style:name="P14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6ef9e4" officeooo:paragraph-rsid="036ef9e4" style:font-style-asian="normal" style:font-weight-asian="normal" style:font-name-complex="Times New Roman2" style:font-size-complex="12pt" style:font-style-complex="normal" style:font-weight-complex="normal"/>
    </style:style>
    <style:style style:name="P14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e04f9" officeooo:paragraph-rsid="037e04f9" style:font-style-asian="normal" style:font-weight-asian="normal" style:font-name-complex="Times New Roman2" style:font-size-complex="12pt" style:font-style-complex="normal" style:font-weight-complex="normal"/>
    </style:style>
    <style:style style:name="P14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f484d" officeooo:paragraph-rsid="037f484d" style:font-style-asian="normal" style:font-weight-asian="normal" style:font-name-complex="Times New Roman2" style:font-size-complex="12pt" style:font-style-complex="normal" style:font-weight-complex="normal"/>
    </style:style>
    <style:style style:name="P14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b4acf" officeooo:paragraph-rsid="038b4acf" style:font-style-asian="normal" style:font-weight-asian="normal" style:font-name-complex="Times New Roman2" style:font-size-complex="12pt" style:font-style-complex="normal" style:font-weight-complex="normal"/>
    </style:style>
    <style:style style:name="P14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fae10" officeooo:paragraph-rsid="0396cd3d" style:font-style-asian="normal" style:font-weight-asian="normal" style:font-name-complex="Times New Roman2" style:font-size-complex="12pt" style:font-style-complex="normal" style:font-weight-complex="normal"/>
    </style:style>
    <style:style style:name="P14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96cd3d" officeooo:paragraph-rsid="0396cd3d" style:font-style-asian="normal" style:font-weight-asian="normal" style:font-name-complex="Times New Roman2" style:font-size-complex="12pt" style:font-style-complex="normal" style:font-weight-complex="normal"/>
    </style:style>
    <style:style style:name="P14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97786a" officeooo:paragraph-rsid="0397786a" style:font-style-asian="normal" style:font-weight-asian="normal" style:font-name-complex="Times New Roman2" style:font-size-complex="12pt" style:font-style-complex="normal" style:font-weight-complex="normal"/>
    </style:style>
    <style:style style:name="P149" style:family="paragraph" style:parent-style-name="Standard">
      <style:paragraph-properties fo:margin-top="0in" fo:margin-bottom="0in" style:contextual-spacing="false" fo:line-height="100%"/>
      <style:text-properties officeooo:rsid="021771c9" officeooo:paragraph-rsid="021771c9"/>
    </style:style>
    <style:style style:name="P150" style:family="paragraph" style:parent-style-name="Footnote">
      <style:text-properties officeooo:rsid="02bbbc96" officeooo:paragraph-rsid="02bbbc96"/>
    </style:style>
    <style:style style:name="P15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5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15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5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P15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P15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e74641" style:font-style-asian="normal" style:font-weight-asian="normal" style:font-name-complex="Times New Roman2" style:font-size-complex="12pt" style:font-style-complex="normal" style:font-weight-complex="normal"/>
    </style:style>
    <style:style style:name="P15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d53897" style:font-style-asian="normal" style:font-weight-asian="normal" style:font-name-complex="Times New Roman2" style:font-size-complex="12pt" style:font-style-complex="normal" style:font-weight-complex="normal"/>
    </style:style>
    <style:style style:name="P15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fad3bf" style:font-style-asian="normal" style:font-weight-asian="normal" style:font-name-complex="Times New Roman2" style:font-size-complex="12pt" style:font-style-complex="normal" style:font-weight-complex="normal"/>
    </style:style>
    <style:style style:name="P15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6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6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63ce8" officeooo:paragraph-rsid="03163ce8" style:font-style-asian="normal" style:font-weight-asian="normal" style:font-name-complex="Times New Roman2" style:font-size-complex="12pt" style:font-style-complex="normal" style:font-weight-complex="normal"/>
    </style:style>
    <style:style style:name="P16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cd793" officeooo:paragraph-rsid="031cd793" style:font-style-asian="normal" style:font-weight-asian="normal" style:font-name-complex="Times New Roman2" style:font-size-complex="12pt" style:font-style-complex="normal" style:font-weight-complex="normal"/>
    </style:style>
    <style:style style:name="P16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2317d7" style:font-style-asian="normal" style:font-weight-asian="normal" style:font-name-complex="Times New Roman2" style:font-size-complex="12pt" style:font-style-complex="normal" style:font-weight-complex="normal"/>
    </style:style>
    <style:style style:name="P16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6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6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b4b47" officeooo:paragraph-rsid="033b4b47" style:font-style-asian="normal" style:font-weight-asian="normal" style:font-name-complex="Times New Roman2" style:font-size-complex="12pt" style:font-style-complex="normal" style:font-weight-complex="normal"/>
    </style:style>
    <style:style style:name="P16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c7175" officeooo:paragraph-rsid="033c7175" style:font-style-asian="normal" style:font-weight-asian="normal" style:font-name-complex="Times New Roman2" style:font-size-complex="12pt" style:font-style-complex="normal" style:font-weight-complex="normal"/>
    </style:style>
    <style:style style:name="P16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dea4f" officeooo:paragraph-rsid="033dea4f" style:font-style-asian="normal" style:font-weight-asian="normal" style:font-name-complex="Times New Roman2" style:font-size-complex="12pt" style:font-style-complex="normal" style:font-weight-complex="normal"/>
    </style:style>
    <style:style style:name="P16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4aa78b" officeooo:paragraph-rsid="034aa78b" style:font-style-asian="normal" style:font-weight-asian="normal" style:font-name-complex="Times New Roman2" style:font-size-complex="12pt" style:font-style-complex="normal" style:font-weight-complex="normal"/>
    </style:style>
    <style:style style:name="P17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42469" officeooo:paragraph-rsid="03542469" style:font-style-asian="normal" style:font-weight-asian="normal" style:font-name-complex="Times New Roman2" style:font-size-complex="12pt" style:font-style-complex="normal" style:font-weight-complex="normal"/>
    </style:style>
    <style:style style:name="P17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b4de8" officeooo:paragraph-rsid="035b4de8" style:font-style-asian="normal" style:font-weight-asian="normal" style:font-name-complex="Times New Roman2" style:font-size-complex="12pt" style:font-style-complex="normal" style:font-weight-complex="normal"/>
    </style:style>
    <style:style style:name="P17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05a2b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7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667c8" officeooo:paragraph-rsid="036667c8" style:font-style-asian="normal" style:font-weight-asian="normal" style:font-name-complex="Times New Roman2" style:font-size-complex="12pt" style:font-style-complex="normal" style:font-weight-complex="normal"/>
    </style:style>
    <style:style style:name="P17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c28de" officeooo:paragraph-rsid="036c28de" style:font-style-asian="normal" style:font-weight-asian="normal" style:font-name-complex="Times New Roman2" style:font-size-complex="12pt" style:font-style-complex="normal" style:font-weight-complex="normal"/>
    </style:style>
    <style:style style:name="P17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768f31" officeooo:paragraph-rsid="037d0e1e" style:font-style-asian="normal" style:font-weight-asian="normal" style:font-name-complex="Times New Roman2" style:font-size-complex="12pt" style:font-style-complex="normal" style:font-weight-complex="normal"/>
    </style:style>
    <style:style style:name="P17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1a53c" officeooo:paragraph-rsid="0381a53c" style:font-style-asian="normal" style:font-weight-asian="normal" style:font-name-complex="Times New Roman2" style:font-size-complex="12pt" style:font-style-complex="normal" style:font-weight-complex="normal"/>
    </style:style>
    <style:style style:name="P17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560c0" officeooo:paragraph-rsid="038560c0" style:font-style-asian="normal" style:font-weight-asian="normal" style:font-name-complex="Times New Roman2" style:font-size-complex="12pt" style:font-style-complex="normal" style:font-weight-complex="normal"/>
    </style:style>
    <style:style style:name="P17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b69e0" officeooo:paragraph-rsid="038b69e0" style:font-style-asian="normal" style:font-weight-asian="normal" style:font-name-complex="Times New Roman2" style:font-size-complex="12pt" style:font-style-complex="normal" style:font-weight-complex="normal"/>
    </style:style>
    <style:style style:name="P17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fae10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8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80688" officeooo:paragraph-rsid="03980688" style:font-style-asian="normal" style:font-weight-asian="normal" style:font-name-complex="Times New Roman2" style:font-size-complex="12pt" style:font-style-complex="normal" style:font-weight-complex="normal"/>
    </style:style>
    <style:style style:name="P18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d49a3" officeooo:paragraph-rsid="039d49a3" style:font-style-asian="normal" style:font-weight-asian="normal" style:font-name-complex="Times New Roman2" style:font-size-complex="12pt" style:font-style-complex="normal" style:font-weight-complex="normal"/>
    </style:style>
    <style:style style:name="P18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d49a3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P18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a1aaa9" officeooo:paragraph-rsid="03a1aaa9" style:font-style-asian="normal" style:font-weight-asian="normal" style:font-name-complex="Times New Roman2" style:font-size-complex="12pt" style:font-style-complex="normal" style:font-weight-complex="normal"/>
    </style:style>
    <style:style style:name="P18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450e1" officeooo:paragraph-rsid="03b450e1" style:font-style-asian="normal" style:font-weight-asian="normal" style:font-name-complex="Times New Roman2" style:font-size-complex="12pt" style:font-style-complex="normal" style:font-weight-complex="normal"/>
    </style:style>
    <style:style style:name="P18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4c2c9" officeooo:paragraph-rsid="03b4c2c9" style:font-style-asian="normal" style:font-weight-asian="normal" style:font-name-complex="Times New Roman2" style:font-size-complex="12pt" style:font-style-complex="normal" style:font-weight-complex="normal"/>
    </style:style>
    <style:style style:name="P18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63608" officeooo:paragraph-rsid="03b63608" style:font-style-asian="normal" style:font-weight-asian="normal" style:font-name-complex="Times New Roman2" style:font-size-complex="12pt" style:font-style-complex="normal" style:font-weight-complex="normal"/>
    </style:style>
    <style:style style:name="P18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8331a" officeooo:paragraph-rsid="03b8331a" style:font-style-asian="normal" style:font-weight-asian="normal" style:font-name-complex="Times New Roman2" style:font-size-complex="12pt" style:font-style-complex="normal" style:font-weight-complex="normal"/>
    </style:style>
    <style:style style:name="P18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b4c90" officeooo:paragraph-rsid="03bb4c90" style:font-style-asian="normal" style:font-weight-asian="normal" style:font-name-complex="Times New Roman2" style:font-size-complex="12pt" style:font-style-complex="normal" style:font-weight-complex="normal"/>
    </style:style>
    <style:style style:name="P18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c04bd4" officeooo:paragraph-rsid="03c631b4" style:font-style-asian="normal" style:font-weight-asian="normal" style:font-name-complex="Times New Roman2" style:font-size-complex="12pt" style:font-style-complex="normal" style:font-weight-complex="normal"/>
    </style:style>
    <style:style style:name="P19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c935fd" officeooo:paragraph-rsid="03c935fd" style:font-style-asian="normal" style:font-weight-asian="normal" style:font-name-complex="Times New Roman2" style:font-size-complex="12pt" style:font-style-complex="normal" style:font-weight-complex="normal"/>
    </style:style>
    <style:style style:name="P19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54a28" officeooo:paragraph-rsid="03d54a28" style:font-style-asian="normal" style:font-weight-asian="normal" style:font-name-complex="Times New Roman2" style:font-size-complex="12pt" style:font-style-complex="normal" style:font-weight-complex="normal"/>
    </style:style>
    <style:style style:name="P19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675a6" officeooo:paragraph-rsid="03d675a6" style:font-style-asian="normal" style:font-weight-asian="normal" style:font-name-complex="Times New Roman2" style:font-size-complex="12pt" style:font-style-complex="normal" style:font-weight-complex="normal"/>
    </style:style>
    <style:style style:name="P19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d85a8" officeooo:paragraph-rsid="03dd85a8" style:font-style-asian="normal" style:font-weight-asian="normal" style:font-name-complex="Times New Roman2" style:font-size-complex="12pt" style:font-style-complex="normal" style:font-weight-complex="normal"/>
    </style:style>
    <style:style style:name="P19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dedf2f" officeooo:paragraph-rsid="03dedf2f" style:font-style-asian="normal" style:font-weight-asian="normal" style:font-name-complex="Times New Roman2" style:font-size-complex="12pt" style:font-style-complex="normal" style:font-weight-complex="normal"/>
    </style:style>
    <style:style style:name="P19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13dce" officeooo:paragraph-rsid="03e13dce" style:font-style-asian="normal" style:font-weight-asian="normal" style:font-name-complex="Times New Roman2" style:font-size-complex="12pt" style:font-style-complex="normal" style:font-weight-complex="normal"/>
    </style:style>
    <style:style style:name="P19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5e1e9" officeooo:paragraph-rsid="03e5e1e9" style:font-style-asian="normal" style:font-weight-asian="normal" style:font-name-complex="Times New Roman2" style:font-size-complex="12pt" style:font-style-complex="normal" style:font-weight-complex="normal"/>
    </style:style>
    <style:style style:name="P19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74641" officeooo:paragraph-rsid="03e74641" style:font-style-asian="normal" style:font-weight-asian="normal" style:font-name-complex="Times New Roman2" style:font-size-complex="12pt" style:font-style-complex="normal" style:font-weight-complex="normal"/>
    </style:style>
    <style:style style:name="P19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74641" officeooo:paragraph-rsid="03fad3bf" style:font-style-asian="normal" style:font-weight-asian="normal" style:font-name-complex="Times New Roman2" style:font-size-complex="12pt" style:font-style-complex="normal" style:font-weight-complex="normal"/>
    </style:style>
    <style:style style:name="P19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74641" officeooo:paragraph-rsid="04437d40" style:font-style-asian="normal" style:font-weight-asian="normal" style:font-name-complex="Times New Roman2" style:font-size-complex="12pt" style:font-style-complex="normal" style:font-weight-complex="normal"/>
    </style:style>
    <style:style style:name="P20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74641" officeooo:paragraph-rsid="044c7169" style:font-style-asian="normal" style:font-weight-asian="normal" style:font-name-complex="Times New Roman2" style:font-size-complex="12pt" style:font-style-complex="normal" style:font-weight-complex="normal"/>
    </style:style>
    <style:style style:name="P20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2ad21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0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e86de3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0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1b4fb" officeooo:paragraph-rsid="0401b4fb" style:font-style-asian="normal" style:font-weight-asian="normal" style:font-name-complex="Times New Roman2" style:font-size-complex="12pt" style:font-style-complex="normal" style:font-weight-complex="normal"/>
    </style:style>
    <style:style style:name="P20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3ae36" officeooo:paragraph-rsid="0403ae36" style:font-style-asian="normal" style:font-weight-asian="normal" style:font-name-complex="Times New Roman2" style:font-size-complex="12pt" style:font-style-complex="normal" style:font-weight-complex="normal"/>
    </style:style>
    <style:style style:name="P20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45408" officeooo:paragraph-rsid="04045408" style:font-style-asian="normal" style:font-weight-asian="normal" style:font-name-complex="Times New Roman2" style:font-size-complex="12pt" style:font-style-complex="normal" style:font-weight-complex="normal"/>
    </style:style>
    <style:style style:name="P20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0160f0" officeooo:paragraph-rsid="040160f0" style:font-style-asian="normal" style:font-weight-asian="normal" style:font-name-complex="Times New Roman2" style:font-size-complex="12pt" style:font-style-complex="normal" style:font-weight-complex="normal"/>
    </style:style>
    <style:style style:name="P20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31c092" officeooo:paragraph-rsid="0431c092" style:font-style-asian="normal" style:font-weight-asian="normal" style:font-name-complex="Times New Roman2" style:font-size-complex="12pt" style:font-style-complex="normal" style:font-weight-complex="normal"/>
    </style:style>
    <style:style style:name="P20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344ba4" officeooo:paragraph-rsid="04344ba4" style:font-style-asian="normal" style:font-weight-asian="normal" style:font-name-complex="Times New Roman2" style:font-size-complex="12pt" style:font-style-complex="normal" style:font-weight-complex="normal"/>
    </style:style>
    <style:style style:name="P20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4cc1e" officeooo:paragraph-rsid="0444cc1e" style:font-style-asian="normal" style:font-weight-asian="normal" style:font-name-complex="Times New Roman2" style:font-size-complex="12pt" style:font-style-complex="normal" style:font-weight-complex="normal"/>
    </style:style>
    <style:style style:name="P21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500ea" officeooo:paragraph-rsid="044500ea" style:font-style-asian="normal" style:font-weight-asian="normal" style:font-name-complex="Times New Roman2" style:font-size-complex="12pt" style:font-style-complex="normal" style:font-weight-complex="normal"/>
    </style:style>
    <style:style style:name="P21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51ead" officeooo:paragraph-rsid="04451ead" style:font-style-asian="normal" style:font-weight-asian="normal" style:font-name-complex="Times New Roman2" style:font-size-complex="12pt" style:font-style-complex="normal" style:font-weight-complex="normal"/>
    </style:style>
    <style:style style:name="P21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653ae" officeooo:paragraph-rsid="04466d32" style:font-style-asian="normal" style:font-weight-asian="normal" style:font-name-complex="Times New Roman2" style:font-size-complex="12pt" style:font-style-complex="normal" style:font-weight-complex="normal"/>
    </style:style>
    <style:style style:name="P21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ad0dd" officeooo:paragraph-rsid="044ad0dd" style:font-style-asian="normal" style:font-weight-asian="normal" style:font-name-complex="Times New Roman2" style:font-size-complex="12pt" style:font-style-complex="normal" style:font-weight-complex="normal"/>
    </style:style>
    <style:style style:name="P21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bold" officeooo:rsid="03e74641" officeooo:paragraph-rsid="03e74641" style:font-style-asian="normal" style:font-weight-asian="bold" style:font-name-complex="Times New Roman2" style:font-size-complex="12pt" style:font-style-complex="normal" style:font-weight-complex="bold"/>
    </style:style>
    <style:style style:name="P21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bold" officeooo:rsid="03e74641" officeooo:paragraph-rsid="03fad3bf" style:font-style-asian="normal" style:font-weight-asian="bold" style:font-name-complex="Times New Roman2" style:font-size-complex="12pt" style:font-style-complex="normal" style:font-weight-complex="bold"/>
    </style:style>
    <style:style style:name="P21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bold" officeooo:rsid="03e74641" officeooo:paragraph-rsid="04437d40" style:font-style-asian="normal" style:font-weight-asian="bold" style:font-name-complex="Times New Roman2" style:font-size-complex="12pt" style:font-style-complex="normal" style:font-weight-complex="bold"/>
    </style:style>
    <style:style style:name="P21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bold" officeooo:rsid="03e74641" officeooo:paragraph-rsid="044c7169" style:font-style-asian="normal" style:font-weight-asian="bold" style:font-name-complex="Times New Roman2" style:font-size-complex="12pt" style:font-style-complex="normal" style:font-weight-complex="bold"/>
    </style:style>
    <style:style style:name="P218" style:family="paragraph" style:parent-style-name="Footnote">
      <style:text-properties officeooo:rsid="039136cd" officeooo:paragraph-rsid="039136cd"/>
    </style:style>
    <style:style style:name="P219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imes New Roman" fo:letter-spacing="normal" fo:font-style="normal" fo:font-weight="normal" officeooo:rsid="038348e6" officeooo:paragraph-rsid="0381a53c" style:font-style-asian="normal" style:font-weight-asian="normal" style:font-name-complex="Times New Roman2" style:font-size-complex="12pt" style:font-style-complex="normal" style:font-weight-complex="normal"/>
    </style:style>
    <style:style style:name="P220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imes New Roman" fo:letter-spacing="normal" fo:font-style="normal" fo:font-weight="normal" officeooo:rsid="044ad0dd" officeooo:paragraph-rsid="044d0832" style:font-style-asian="normal" style:font-weight-asian="normal" style:font-name-complex="Times New Roman2" style:font-size-complex="12pt" style:font-style-complex="normal" style:font-weight-complex="normal"/>
    </style:style>
    <style:style style:name="P22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00168" officeooo:paragraph-rsid="03b1e0de" style:font-style-asian="normal" style:font-weight-asian="normal" style:font-name-complex="Times New Roman2" style:font-size-complex="12pt" style:font-style-complex="normal" style:font-weight-complex="normal"/>
    </style:style>
    <style:style style:name="P22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3cc6e" officeooo:paragraph-rsid="03a3cc6e" style:font-style-asian="normal" style:font-weight-asian="normal" style:font-name-complex="Times New Roman2" style:font-size-complex="12pt" style:font-style-complex="normal" style:font-weight-complex="normal"/>
    </style:style>
    <style:style style:name="P223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55b8d" officeooo:paragraph-rsid="03a55b8d" style:font-style-asian="normal" style:font-weight-asian="normal" style:font-name-complex="Times New Roman2" style:font-size-complex="12pt" style:font-style-complex="normal" style:font-weight-complex="normal"/>
    </style:style>
    <style:style style:name="P224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74945" officeooo:paragraph-rsid="03a74945" style:font-style-asian="normal" style:font-weight-asian="normal" style:font-name-complex="Times New Roman2" style:font-size-complex="12pt" style:font-style-complex="normal" style:font-weight-complex="normal"/>
    </style:style>
    <style:style style:name="P225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beae98" officeooo:paragraph-rsid="03c61ee7" style:font-style-asian="normal" style:font-weight-asian="normal" style:font-name-complex="Times New Roman2" style:font-size-complex="12pt" style:font-style-complex="normal" style:font-weight-complex="normal"/>
    </style:style>
    <style:style style:name="P226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c75b06" officeooo:paragraph-rsid="03c75b06" style:font-style-asian="normal" style:font-weight-asian="normal" style:font-name-complex="Times New Roman2" style:font-size-complex="12pt" style:font-style-complex="normal" style:font-weight-complex="normal"/>
    </style:style>
    <style:style style:name="P22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cd937d" officeooo:paragraph-rsid="03cd937d" style:font-style-asian="normal" style:font-weight-asian="normal" style:font-name-complex="Times New Roman2" style:font-size-complex="12pt" style:font-style-complex="normal" style:font-weight-complex="normal"/>
    </style:style>
    <style:style style:name="P228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ce5325" officeooo:paragraph-rsid="03ce5325" style:font-style-asian="normal" style:font-weight-asian="normal" style:font-name-complex="Times New Roman2" style:font-size-complex="12pt" style:font-style-complex="normal" style:font-weight-complex="normal"/>
    </style:style>
    <style:style style:name="P229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d282a3" officeooo:paragraph-rsid="03d282a3" style:font-style-asian="normal" style:font-weight-asian="normal" style:font-name-complex="Times New Roman2" style:font-size-complex="12pt" style:font-style-complex="normal" style:font-weight-complex="normal"/>
    </style:style>
    <style:style style:name="P230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d282a3" officeooo:paragraph-rsid="03e07f23" style:font-style-asian="normal" style:font-weight-asian="normal" style:font-name-complex="Times New Roman2" style:font-size-complex="12pt" style:font-style-complex="normal" style:font-weight-complex="normal"/>
    </style:style>
    <style:style style:name="P23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d53897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3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e5e1e9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33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e86de3" officeooo:paragraph-rsid="03ede1a9" style:font-style-asian="normal" style:font-weight-asian="normal" style:font-name-complex="Times New Roman2" style:font-size-complex="12pt" style:font-style-complex="normal" style:font-weight-complex="normal"/>
    </style:style>
    <style:style style:name="P234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ef9c24" officeooo:paragraph-rsid="03ef9c24" style:font-style-asian="normal" style:font-weight-asian="normal" style:font-name-complex="Times New Roman2" style:font-size-complex="12pt" style:font-style-complex="normal" style:font-weight-complex="normal"/>
    </style:style>
    <style:style style:name="P235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f0877d" officeooo:paragraph-rsid="03f5165e" style:font-style-asian="normal" style:font-weight-asian="normal" style:font-name-complex="Times New Roman2" style:font-size-complex="12pt" style:font-style-complex="normal" style:font-weight-complex="normal"/>
    </style:style>
    <style:style style:name="P236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f585b0" officeooo:paragraph-rsid="03f585b0" style:font-style-asian="normal" style:font-weight-asian="normal" style:font-name-complex="Times New Roman2" style:font-size-complex="12pt" style:font-style-complex="normal" style:font-weight-complex="normal"/>
    </style:style>
    <style:style style:name="P23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f463ac" officeooo:paragraph-rsid="03f5165e" style:font-style-asian="normal" style:font-weight-asian="normal" style:font-name-complex="Times New Roman2" style:font-size-complex="12pt" style:font-style-complex="normal" style:font-weight-complex="normal"/>
    </style:style>
    <style:style style:name="P238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7e04f9" officeooo:paragraph-rsid="03fb8374" style:font-style-asian="normal" style:font-weight-asian="normal" style:font-name-complex="Times New Roman2" style:font-size-complex="12pt" style:font-style-complex="normal" style:font-weight-complex="normal"/>
    </style:style>
    <style:style style:name="P239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0b6a44" officeooo:paragraph-rsid="040b6a44" style:font-style-asian="normal" style:font-weight-asian="normal" style:font-name-complex="Times New Roman2" style:font-size-complex="12pt" style:font-style-complex="normal" style:font-weight-complex="normal"/>
    </style:style>
    <style:style style:name="P240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0fda2a" officeooo:paragraph-rsid="040fda2a" style:font-style-asian="normal" style:font-weight-asian="normal" style:font-name-complex="Times New Roman2" style:font-size-complex="12pt" style:font-style-complex="normal" style:font-weight-complex="normal"/>
    </style:style>
    <style:style style:name="P24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1482ff" officeooo:paragraph-rsid="041482ff" style:font-style-asian="normal" style:font-weight-asian="normal" style:font-name-complex="Times New Roman2" style:font-size-complex="12pt" style:font-style-complex="normal" style:font-weight-complex="normal"/>
    </style:style>
    <style:style style:name="P24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21446b" officeooo:paragraph-rsid="0421446b" style:font-style-asian="normal" style:font-weight-asian="normal" style:font-name-complex="Times New Roman2" style:font-size-complex="12pt" style:font-style-complex="normal" style:font-weight-complex="normal"/>
    </style:style>
    <style:style style:name="P243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271fe0" officeooo:paragraph-rsid="04271fe0" style:font-style-asian="normal" style:font-weight-asian="normal" style:font-name-complex="Times New Roman2" style:font-size-complex="12pt" style:font-style-complex="normal" style:font-weight-complex="normal"/>
    </style:style>
    <style:style style:name="P244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27ff36" officeooo:paragraph-rsid="04503c70" style:font-style-asian="normal" style:font-weight-asian="normal" style:font-name-complex="Times New Roman2" style:font-size-complex="12pt" style:font-style-complex="normal" style:font-weight-complex="normal"/>
    </style:style>
    <style:style style:name="P245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49f336" officeooo:paragraph-rsid="044ad0dd" style:font-style-asian="normal" style:font-weight-asian="normal" style:font-name-complex="Times New Roman2" style:font-size-complex="12pt" style:font-style-complex="normal" style:font-weight-complex="normal"/>
    </style:style>
    <style:style style:name="P246" style:family="paragraph" style:parent-style-name="Heading_20_1" style:master-page-name="First_20_Page">
      <style:paragraph-properties style:page-number="auto"/>
    </style:style>
    <style:style style:name="P24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49f336" officeooo:paragraph-rsid="0449f336" style:font-style-asian="normal" style:font-weight-asian="normal" style:font-name-complex="Times New Roman2" style:font-size-complex="12pt" style:font-style-complex="normal" style:font-weight-complex="normal"/>
    </style:style>
    <style:style style:name="P248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5235ec" officeooo:paragraph-rsid="045235ec" style:font-style-asian="normal" style:font-weight-asian="normal" style:font-name-complex="Times New Roman2" style:font-size-complex="12pt" style:font-style-complex="normal" style:font-weight-complex="normal"/>
    </style:style>
    <style:style style:name="P249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531743" officeooo:paragraph-rsid="04531743" style:font-style-asian="normal" style:font-weight-asian="normal" style:font-name-complex="Times New Roman2" style:font-size-complex="12pt" style:font-style-complex="normal" style:font-weight-complex="normal"/>
    </style:style>
    <style:style style:name="P250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531743" officeooo:paragraph-rsid="045ef2e4" style:font-style-asian="normal" style:font-weight-asian="normal" style:font-name-complex="Times New Roman2" style:font-size-complex="12pt" style:font-style-complex="normal" style:font-weight-complex="normal"/>
    </style:style>
    <style:style style:name="P25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5463a2" officeooo:paragraph-rsid="045463a2" style:font-style-asian="normal" style:font-weight-asian="normal" style:font-name-complex="Times New Roman2" style:font-size-complex="12pt" style:font-style-complex="normal" style:font-weight-complex="normal"/>
    </style:style>
    <style:style style:name="P25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55a8ab" officeooo:paragraph-rsid="0455a8ab" style:font-style-asian="normal" style:font-weight-asian="normal" style:font-name-complex="Times New Roman2" style:font-size-complex="12pt" style:font-style-complex="normal" style:font-weight-complex="normal"/>
    </style:style>
    <style:style style:name="P253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579a63" officeooo:paragraph-rsid="04579a63" style:font-style-asian="normal" style:font-weight-asian="normal" style:font-name-complex="Times New Roman2" style:font-size-complex="12pt" style:font-style-complex="normal" style:font-weight-complex="normal"/>
    </style:style>
    <style:style style:name="P254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77128b" officeooo:paragraph-rsid="0485be50" style:font-style-asian="normal" style:font-weight-asian="normal" style:font-name-complex="Times New Roman2" style:font-size-complex="12pt" style:font-style-complex="normal" style:font-weight-complex="normal"/>
    </style:style>
    <style:style style:name="P255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78b4de" officeooo:paragraph-rsid="0478b4de" style:font-style-asian="normal" style:font-weight-asian="normal" style:font-name-complex="Times New Roman2" style:font-size-complex="12pt" style:font-style-complex="normal" style:font-weight-complex="normal"/>
    </style:style>
    <style:style style:name="P256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78b4de" officeooo:paragraph-rsid="0485be50" style:font-style-asian="normal" style:font-weight-asian="normal" style:font-name-complex="Times New Roman2" style:font-size-complex="12pt" style:font-style-complex="normal" style:font-weight-complex="normal"/>
    </style:style>
    <style:style style:name="P25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47a25ee" officeooo:paragraph-rsid="0485be50" style:font-style-asian="normal" style:font-weight-asian="normal" style:font-name-complex="Times New Roman2" style:font-size-complex="12pt" style:font-style-complex="normal" style:font-weight-complex="normal"/>
    </style:style>
    <style:style style:name="P258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imes New Roman" fo:letter-spacing="normal" fo:font-style="normal" fo:font-weight="normal" officeooo:rsid="04815267" officeooo:paragraph-rsid="04841c7c" style:font-style-asian="normal" style:font-weight-asian="normal" style:font-name-complex="Times New Roman2" style:font-size-complex="12pt" style:font-style-complex="normal" style:font-weight-complex="normal"/>
    </style:style>
    <style:style style:name="P25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4ad0dd" officeooo:paragraph-rsid="044ad0dd" style:font-style-asian="normal" style:font-weight-asian="normal" style:font-name-complex="Times New Roman2" style:font-size-complex="12pt" style:font-style-complex="normal" style:font-weight-complex="normal"/>
    </style:style>
    <style:style style:name="P26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5b3926" officeooo:paragraph-rsid="045b3926" style:font-style-asian="normal" style:font-weight-asian="normal" style:font-name-complex="Times New Roman2" style:font-size-complex="12pt" style:font-style-complex="normal" style:font-weight-complex="normal"/>
    </style:style>
    <style:style style:name="P26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5c5a77" officeooo:paragraph-rsid="045c5a77" style:font-style-asian="normal" style:font-weight-asian="normal" style:font-name-complex="Times New Roman2" style:font-size-complex="12pt" style:font-style-complex="normal" style:font-weight-complex="normal"/>
    </style:style>
    <style:style style:name="P26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60e5f1" officeooo:paragraph-rsid="0460e5f1" style:font-style-asian="normal" style:font-weight-asian="normal" style:font-name-complex="Times New Roman2" style:font-size-complex="12pt" style:font-style-complex="normal" style:font-weight-complex="normal"/>
    </style:style>
    <style:style style:name="P26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61f8cf" officeooo:paragraph-rsid="0461f8cf" style:font-style-asian="normal" style:font-weight-asian="normal" style:font-name-complex="Times New Roman2" style:font-size-complex="12pt" style:font-style-complex="normal" style:font-weight-complex="normal"/>
    </style:style>
    <style:style style:name="P26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6b8011" officeooo:paragraph-rsid="046b8011" style:font-style-asian="normal" style:font-weight-asian="normal" style:font-name-complex="Times New Roman2" style:font-size-complex="12pt" style:font-style-complex="normal" style:font-weight-complex="normal"/>
    </style:style>
    <style:style style:name="P26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70979f" officeooo:paragraph-rsid="0470979f" style:font-style-asian="normal" style:font-weight-asian="normal" style:font-name-complex="Times New Roman2" style:font-size-complex="12pt" style:font-style-complex="normal" style:font-weight-complex="normal"/>
    </style:style>
    <style:style style:name="P26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734573" officeooo:paragraph-rsid="04734573" style:font-style-asian="normal" style:font-weight-asian="normal" style:font-name-complex="Times New Roman2" style:font-size-complex="12pt" style:font-style-complex="normal" style:font-weight-complex="normal"/>
    </style:style>
    <style:style style:name="P26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776d7e" officeooo:paragraph-rsid="04841c7c" style:font-style-asian="normal" style:font-weight-asian="normal" style:font-name-complex="Times New Roman2" style:font-size-complex="12pt" style:font-style-complex="normal" style:font-weight-complex="normal"/>
    </style:style>
    <style:style style:name="P26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7cc62e" officeooo:paragraph-rsid="047cc62e" style:font-style-asian="normal" style:font-weight-asian="normal" style:font-name-complex="Times New Roman2" style:font-size-complex="12pt" style:font-style-complex="normal" style:font-weight-complex="normal"/>
    </style:style>
    <style:style style:name="P26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7cc62e" officeooo:paragraph-rsid="04841c7c" style:font-style-asian="normal" style:font-weight-asian="normal" style:font-name-complex="Times New Roman2" style:font-size-complex="12pt" style:font-style-complex="normal" style:font-weight-complex="normal"/>
    </style:style>
    <style:style style:name="P27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815267" officeooo:paragraph-rsid="04815267" style:font-style-asian="normal" style:font-weight-asian="normal" style:font-name-complex="Times New Roman2" style:font-size-complex="12pt" style:font-style-complex="normal" style:font-weight-complex="normal"/>
    </style:style>
    <style:style style:name="P27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4815267" officeooo:paragraph-rsid="04841c7c" style:font-style-asian="normal" style:font-weight-asian="normal" style:font-name-complex="Times New Roman2" style:font-size-complex="12pt" style:font-style-complex="normal" style:font-weight-complex="normal"/>
    </style:style>
    <style:style style:name="P27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Times New Roman" fo:font-style="normal" fo:font-weight="normal" officeooo:rsid="0449f336" officeooo:paragraph-rsid="0449f336" style:font-style-asian="normal" style:font-weight-asian="normal" style:font-name-complex="Times New Roman2" style:font-size-complex="12pt" style:font-style-complex="normal" style:font-weight-complex="normal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officeooo:rsid="019ca9fd" style:font-name-complex="Times New Roman2" style:font-size-complex="12pt"/>
    </style:style>
    <style:style style:name="T5" style:family="text">
      <style:text-properties officeooo:rsid="019cf784" style:font-name-complex="Times New Roman2" style:font-size-complex="12pt"/>
    </style:style>
    <style:style style:name="T6" style:family="text">
      <style:text-properties officeooo:rsid="019e3d05" style:font-name-complex="Times New Roman2" style:font-size-complex="12pt"/>
    </style:style>
    <style:style style:name="T7" style:family="text">
      <style:text-properties officeooo:rsid="01a088d6" style:font-name-complex="Times New Roman2" style:font-size-complex="12pt"/>
    </style:style>
    <style:style style:name="T8" style:family="text">
      <style:text-properties officeooo:rsid="01a398f9" style:font-name-complex="Times New Roman2" style:font-size-complex="12pt"/>
    </style:style>
    <style:style style:name="T9" style:family="text">
      <style:text-properties officeooo:rsid="01a51333" style:font-name-complex="Times New Roman2" style:font-size-complex="12pt"/>
    </style:style>
    <style:style style:name="T10" style:family="text">
      <style:text-properties officeooo:rsid="01aad25c" style:font-name-complex="Times New Roman2" style:font-size-complex="12pt"/>
    </style:style>
    <style:style style:name="T11" style:family="text">
      <style:text-properties officeooo:rsid="01af8865" style:font-name-complex="Times New Roman2" style:font-size-complex="12pt"/>
    </style:style>
    <style:style style:name="T12" style:family="text">
      <style:text-properties officeooo:rsid="01bb9526" style:font-name-complex="Times New Roman2" style:font-size-complex="12pt"/>
    </style:style>
    <style:style style:name="T13" style:family="text">
      <style:text-properties officeooo:rsid="01bd9025" style:font-name-complex="Times New Roman2" style:font-size-complex="12pt"/>
    </style:style>
    <style:style style:name="T14" style:family="text">
      <style:text-properties officeooo:rsid="01bf10ab" style:font-name-complex="Times New Roman2" style:font-size-complex="12pt"/>
    </style:style>
    <style:style style:name="T15" style:family="text">
      <style:text-properties officeooo:rsid="01c199d9" style:font-name-complex="Times New Roman2" style:font-size-complex="12pt"/>
    </style:style>
    <style:style style:name="T16" style:family="text">
      <style:text-properties officeooo:rsid="01c261d7" style:font-name-complex="Times New Roman2" style:font-size-complex="12pt"/>
    </style:style>
    <style:style style:name="T17" style:family="text">
      <style:text-properties officeooo:rsid="01c26810" style:font-name-complex="Times New Roman2" style:font-size-complex="12pt"/>
    </style:style>
    <style:style style:name="T18" style:family="text">
      <style:text-properties officeooo:rsid="01c4d4c4" style:font-name-complex="Times New Roman2" style:font-size-complex="12pt"/>
    </style:style>
    <style:style style:name="T19" style:family="text">
      <style:text-properties officeooo:rsid="01c972dc" style:font-name-complex="Times New Roman2" style:font-size-complex="12pt"/>
    </style:style>
    <style:style style:name="T20" style:family="text">
      <style:text-properties officeooo:rsid="01cad4a6" style:font-name-complex="Times New Roman2" style:font-size-complex="12pt"/>
    </style:style>
    <style:style style:name="T21" style:family="text">
      <style:text-properties officeooo:rsid="01ce2d0b" style:font-name-complex="Times New Roman2" style:font-size-complex="12pt"/>
    </style:style>
    <style:style style:name="T22" style:family="text">
      <style:text-properties officeooo:rsid="01d02338" style:font-name-complex="Times New Roman2" style:font-size-complex="12pt"/>
    </style:style>
    <style:style style:name="T23" style:family="text">
      <style:text-properties officeooo:rsid="01d35e4c" style:font-name-complex="Times New Roman2" style:font-size-complex="12pt"/>
    </style:style>
    <style:style style:name="T24" style:family="text">
      <style:text-properties officeooo:rsid="01d77a9b" style:font-name-complex="Times New Roman2" style:font-size-complex="12pt"/>
    </style:style>
    <style:style style:name="T25" style:family="text">
      <style:text-properties officeooo:rsid="01d89107" style:font-name-complex="Times New Roman2" style:font-size-complex="12pt"/>
    </style:style>
    <style:style style:name="T26" style:family="text">
      <style:text-properties officeooo:rsid="01d99096" style:font-name-complex="Times New Roman2" style:font-size-complex="12pt"/>
    </style:style>
    <style:style style:name="T27" style:family="text">
      <style:text-properties officeooo:rsid="01db2508" style:font-name-complex="Times New Roman2" style:font-size-complex="12pt"/>
    </style:style>
    <style:style style:name="T28" style:family="text">
      <style:text-properties officeooo:rsid="01de14a5" style:font-name-complex="Times New Roman2" style:font-size-complex="12pt"/>
    </style:style>
    <style:style style:name="T29" style:family="text">
      <style:text-properties officeooo:rsid="01df020f" style:font-name-complex="Times New Roman2" style:font-size-complex="12pt"/>
    </style:style>
    <style:style style:name="T30" style:family="text">
      <style:text-properties officeooo:rsid="01e0946c" style:font-name-complex="Times New Roman2" style:font-size-complex="12pt"/>
    </style:style>
    <style:style style:name="T31" style:family="text">
      <style:text-properties officeooo:rsid="01e0dc23" style:font-name-complex="Times New Roman2" style:font-size-complex="12pt"/>
    </style:style>
    <style:style style:name="T32" style:family="text">
      <style:text-properties officeooo:rsid="01e17e96" style:font-name-complex="Times New Roman2" style:font-size-complex="12pt"/>
    </style:style>
    <style:style style:name="T33" style:family="text">
      <style:text-properties officeooo:rsid="01e4cfcf" style:font-name-complex="Times New Roman2" style:font-size-complex="12pt"/>
    </style:style>
    <style:style style:name="T34" style:family="text">
      <style:text-properties officeooo:rsid="01e5305c" style:font-name-complex="Times New Roman2" style:font-size-complex="12pt"/>
    </style:style>
    <style:style style:name="T35" style:family="text">
      <style:text-properties officeooo:rsid="01e6e7fb" style:font-name-complex="Times New Roman2" style:font-size-complex="12pt"/>
    </style:style>
    <style:style style:name="T36" style:family="text">
      <style:text-properties officeooo:rsid="01e8d8ca" style:font-name-complex="Times New Roman2" style:font-size-complex="12pt"/>
    </style:style>
    <style:style style:name="T37" style:family="text">
      <style:text-properties officeooo:rsid="01fa8789" style:font-name-complex="Times New Roman2" style:font-size-complex="12pt"/>
    </style:style>
    <style:style style:name="T38" style:family="text">
      <style:text-properties officeooo:rsid="01fc3525" style:font-name-complex="Times New Roman2" style:font-size-complex="12pt"/>
    </style:style>
    <style:style style:name="T39" style:family="text">
      <style:text-properties officeooo:rsid="02a02062" style:font-name-complex="Times New Roman2" style:font-size-complex="12pt"/>
    </style:style>
    <style:style style:name="T40" style:family="text">
      <style:text-properties officeooo:rsid="02a347f3" style:font-name-complex="Times New Roman2" style:font-size-complex="12pt"/>
    </style:style>
    <style:style style:name="T41" style:family="text">
      <style:text-properties officeooo:rsid="02a4a20e" style:font-name-complex="Times New Roman2" style:font-size-complex="12pt"/>
    </style:style>
    <style:style style:name="T42" style:family="text">
      <style:text-properties officeooo:rsid="031f6ebc" style:font-name-complex="Times New Roman2" style:font-size-complex="12pt"/>
    </style:style>
    <style:style style:name="T43" style:family="text">
      <style:text-properties fo:font-style="italic" style:font-style-asian="italic" style:font-name-complex="Times New Roman2" style:font-size-complex="12pt" style:font-style-complex="italic"/>
    </style:style>
    <style:style style:name="T44" style:family="text">
      <style:text-properties fo:font-style="italic" officeooo:rsid="019cf784" style:font-style-asian="italic" style:font-name-complex="Times New Roman2" style:font-size-complex="12pt" style:font-style-complex="italic"/>
    </style:style>
    <style:style style:name="T45" style:family="text">
      <style:text-properties fo:font-style="italic" officeooo:rsid="01b4caa9" style:font-style-asian="italic" style:font-name-complex="Times New Roman2" style:font-size-complex="12pt" style:font-style-complex="italic"/>
    </style:style>
    <style:style style:name="T46" style:family="text">
      <style:text-properties fo:font-style="italic" officeooo:rsid="01b186c7" style:font-style-asian="italic" style:font-name-complex="Times New Roman2" style:font-size-complex="12pt" style:font-style-complex="italic"/>
    </style:style>
    <style:style style:name="T47" style:family="text">
      <style:text-properties fo:font-style="italic" officeooo:rsid="01d89107" style:font-style-asian="italic" style:font-name-complex="Times New Roman2" style:font-size-complex="12pt" style:font-style-complex="italic"/>
    </style:style>
    <style:style style:name="T48" style:family="text">
      <style:text-properties fo:font-style="italic" officeooo:rsid="02150457" style:font-style-asian="italic" style:font-name-complex="Times New Roman2" style:font-size-complex="12pt" style:font-style-complex="italic"/>
    </style:style>
    <style:style style:name="T49" style:family="text">
      <style:text-properties fo:font-style="italic" officeooo:rsid="02a02062" style:font-style-asian="italic" style:font-name-complex="Times New Roman2" style:font-size-complex="12pt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39a861e" style:font-style-asian="italic" style:font-style-complex="italic"/>
    </style:style>
    <style:style style:name="T52" style:family="text">
      <style:text-properties fo:font-style="italic" officeooo:rsid="04392cc6" style:font-style-asian="italic" style:font-style-complex="italic"/>
    </style:style>
    <style:style style:name="T53" style:family="text">
      <style:text-properties fo:font-style="italic" officeooo:rsid="0444cc1e" style:font-style-asian="italic" style:font-style-complex="italic"/>
    </style:style>
    <style:style style:name="T54" style:family="text">
      <style:text-properties fo:font-style="italic" officeooo:rsid="04466d32" style:font-style-asian="italic" style:font-style-complex="italic"/>
    </style:style>
    <style:style style:name="T55" style:family="text">
      <style:text-properties fo:font-style="italic" style:text-underline-style="none" officeooo:rsid="044acbeb" style:font-style-asian="italic" style:font-style-complex="italic"/>
    </style:style>
    <style:style style:name="T56" style:family="text">
      <style:text-properties fo:font-weight="bold" style:font-weight-asian="bold" style:font-name-complex="Times New Roman2" style:font-size-complex="12pt" style:font-weight-complex="bold"/>
    </style:style>
    <style:style style:name="T57" style:family="text">
      <style:text-properties fo:font-weight="bold" officeooo:rsid="01aed673" style:font-weight-asian="bold" style:font-name-complex="Times New Roman2" style:font-size-complex="12pt" style:font-weight-complex="bold"/>
    </style:style>
    <style:style style:name="T58" style:family="text">
      <style:text-properties fo:font-weight="bold" officeooo:rsid="01e0946c" style:font-weight-asian="bold" style:font-name-complex="Times New Roman2" style:font-size-complex="12pt" style:font-weight-complex="bold"/>
    </style:style>
    <style:style style:name="T59" style:family="text">
      <style:text-properties fo:font-weight="bold" officeooo:rsid="01e0dc23" style:font-weight-asian="bold" style:font-name-complex="Times New Roman2" style:font-size-complex="12pt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1de14a5" style:font-weight-asian="bold" style:font-weight-complex="bold"/>
    </style:style>
    <style:style style:name="T62" style:family="text">
      <style:text-properties fo:font-weight="bold" officeooo:rsid="025f4ee2" style:font-weight-asian="bold" style:font-weight-complex="bold"/>
    </style:style>
    <style:style style:name="T63" style:family="text">
      <style:text-properties fo:font-weight="bold" officeooo:rsid="02a7088a" style:font-weight-asian="bold" style:font-weight-complex="bold"/>
    </style:style>
    <style:style style:name="T64" style:family="text">
      <style:text-properties fo:font-weight="bold" officeooo:rsid="02d6eabc" style:font-weight-asian="bold" style:font-weight-complex="bold"/>
    </style:style>
    <style:style style:name="T65" style:family="text">
      <style:text-properties fo:font-weight="bold" officeooo:rsid="02dc920d" style:font-weight-asian="bold" style:font-weight-complex="bold"/>
    </style:style>
    <style:style style:name="T66" style:family="text">
      <style:text-properties fo:font-weight="bold" officeooo:rsid="032943d9" style:font-weight-asian="bold" style:font-weight-complex="bold"/>
    </style:style>
    <style:style style:name="T67" style:family="text">
      <style:text-properties fo:font-weight="bold" officeooo:rsid="02e52838" style:font-weight-asian="bold" style:font-weight-complex="bold"/>
    </style:style>
    <style:style style:name="T68" style:family="text">
      <style:text-properties fo:font-weight="bold" officeooo:rsid="03598608" style:font-weight-asian="bold" style:font-weight-complex="bold"/>
    </style:style>
    <style:style style:name="T69" style:family="text">
      <style:text-properties fo:font-weight="bold" officeooo:rsid="03768f31" style:font-weight-asian="bold" style:font-weight-complex="bold"/>
    </style:style>
    <style:style style:name="T70" style:family="text">
      <style:text-properties fo:font-weight="bold" officeooo:rsid="038716e0" style:font-weight-asian="bold" style:font-weight-complex="bold"/>
    </style:style>
    <style:style style:name="T71" style:family="text">
      <style:text-properties fo:font-weight="bold" officeooo:rsid="03a337f2" style:font-weight-asian="bold" style:font-weight-complex="bold"/>
    </style:style>
    <style:style style:name="T72" style:family="text">
      <style:text-properties fo:font-weight="bold" officeooo:rsid="03ae6e70" style:font-weight-asian="bold" style:font-weight-complex="bold"/>
    </style:style>
    <style:style style:name="T73" style:family="text">
      <style:text-properties fo:font-weight="bold" officeooo:rsid="03cb0426" style:font-weight-asian="bold" style:font-weight-complex="bold"/>
    </style:style>
    <style:style style:name="T74" style:family="text">
      <style:text-properties fo:font-weight="bold" officeooo:rsid="03c44ca4" style:font-weight-asian="bold" style:font-weight-complex="bold"/>
    </style:style>
    <style:style style:name="T75" style:family="text">
      <style:text-properties fo:font-weight="bold" officeooo:rsid="03ef9c24" style:font-weight-asian="bold" style:font-weight-complex="bold"/>
    </style:style>
    <style:style style:name="T76" style:family="text">
      <style:text-properties fo:font-weight="bold" officeooo:rsid="04841c7c" style:font-weight-asian="bold" style:font-weight-complex="bold"/>
    </style:style>
    <style:style style:name="T77" style:family="text">
      <style:text-properties style:font-name="Transliteration1"/>
    </style:style>
    <style:style style:name="T78" style:family="text">
      <style:text-properties style:font-name="Transliteration1" style:font-name-complex="Times New Roman2" style:font-size-complex="12pt"/>
    </style:style>
    <style:style style:name="T79" style:family="text">
      <style:text-properties style:font-name="Transliteration1" officeooo:rsid="01af8865" style:font-name-complex="Times New Roman2" style:font-size-complex="12pt"/>
    </style:style>
    <style:style style:name="T80" style:family="text">
      <style:text-properties style:font-name="Transliteration1" officeooo:rsid="01b6a868" style:font-name-complex="Times New Roman2" style:font-size-complex="12pt"/>
    </style:style>
    <style:style style:name="T81" style:family="text">
      <style:text-properties style:font-name="Transliteration1" officeooo:rsid="01b824db" style:font-name-complex="Times New Roman2" style:font-size-complex="12pt"/>
    </style:style>
    <style:style style:name="T82" style:family="text">
      <style:text-properties style:font-name="Transliteration1" officeooo:rsid="01b903ad" style:font-name-complex="Times New Roman2" style:font-size-complex="12pt"/>
    </style:style>
    <style:style style:name="T83" style:family="text">
      <style:text-properties style:font-name="Transliteration1" officeooo:rsid="01b9d1b8" style:font-name-complex="Times New Roman2" style:font-size-complex="12pt"/>
    </style:style>
    <style:style style:name="T84" style:family="text">
      <style:text-properties style:font-name="Transliteration1" officeooo:rsid="01ba7b25" style:font-name-complex="Times New Roman2" style:font-size-complex="12pt"/>
    </style:style>
    <style:style style:name="T85" style:family="text">
      <style:text-properties style:font-name="Transliteration1" officeooo:rsid="01bb6611" style:font-name-complex="Times New Roman2" style:font-size-complex="12pt"/>
    </style:style>
    <style:style style:name="T86" style:family="text">
      <style:text-properties style:font-name="Transliteration1" officeooo:rsid="01bd9025" style:font-name-complex="Times New Roman2" style:font-size-complex="12pt"/>
    </style:style>
    <style:style style:name="T87" style:family="text">
      <style:text-properties style:font-name="Transliteration1" officeooo:rsid="01bf10ab" style:font-name-complex="Times New Roman2" style:font-size-complex="12pt"/>
    </style:style>
    <style:style style:name="T88" style:family="text">
      <style:text-properties style:font-name="Transliteration1" officeooo:rsid="01c261d7" style:font-name-complex="Times New Roman2" style:font-size-complex="12pt"/>
    </style:style>
    <style:style style:name="T89" style:family="text">
      <style:text-properties style:font-name="Transliteration1" officeooo:rsid="01c3673a" style:font-name-complex="Times New Roman2" style:font-size-complex="12pt"/>
    </style:style>
    <style:style style:name="T90" style:family="text">
      <style:text-properties style:font-name="Transliteration1" officeooo:rsid="01c3b4d7" style:font-name-complex="Times New Roman2" style:font-size-complex="12pt"/>
    </style:style>
    <style:style style:name="T91" style:family="text">
      <style:text-properties style:font-name="Transliteration1" officeooo:rsid="01c854a0" style:font-name-complex="Times New Roman2" style:font-size-complex="12pt"/>
    </style:style>
    <style:style style:name="T92" style:family="text">
      <style:text-properties style:font-name="Transliteration1" officeooo:rsid="01c972dc" style:font-name-complex="Times New Roman2" style:font-size-complex="12pt"/>
    </style:style>
    <style:style style:name="T93" style:family="text">
      <style:text-properties style:font-name="Transliteration1" officeooo:rsid="01cad4a6" style:font-name-complex="Times New Roman2" style:font-size-complex="12pt"/>
    </style:style>
    <style:style style:name="T94" style:family="text">
      <style:text-properties style:font-name="Transliteration1" officeooo:rsid="01cbb55b" style:font-name-complex="Times New Roman2" style:font-size-complex="12pt"/>
    </style:style>
    <style:style style:name="T95" style:family="text">
      <style:text-properties style:font-name="Transliteration1" officeooo:rsid="01cc98b2" style:font-name-complex="Times New Roman2" style:font-size-complex="12pt"/>
    </style:style>
    <style:style style:name="T96" style:family="text">
      <style:text-properties style:font-name="Transliteration1" officeooo:rsid="01ce2d0b" style:font-name-complex="Times New Roman2" style:font-size-complex="12pt"/>
    </style:style>
    <style:style style:name="T97" style:family="text">
      <style:text-properties style:font-name="Transliteration1" officeooo:rsid="01d35e4c" style:font-name-complex="Times New Roman2" style:font-size-complex="12pt"/>
    </style:style>
    <style:style style:name="T98" style:family="text">
      <style:text-properties style:font-name="Transliteration1" officeooo:rsid="01d77a9b" style:font-name-complex="Times New Roman2" style:font-size-complex="12pt"/>
    </style:style>
    <style:style style:name="T99" style:family="text">
      <style:text-properties style:font-name="Transliteration1" officeooo:rsid="01de14a5" style:font-name-complex="Times New Roman2" style:font-size-complex="12pt"/>
    </style:style>
    <style:style style:name="T100" style:family="text">
      <style:text-properties style:font-name="Transliteration1" officeooo:rsid="02a0c07d" style:font-name-complex="Times New Roman2" style:font-size-complex="12pt"/>
    </style:style>
    <style:style style:name="T101" style:family="text">
      <style:text-properties style:font-name="Transliteration1" fo:font-weight="bold" style:font-weight-asian="bold" style:font-name-complex="Times New Roman2" style:font-size-complex="12pt" style:font-weight-complex="bold"/>
    </style:style>
    <style:style style:name="T102" style:family="text">
      <style:text-properties style:font-name="Transliteration1" fo:font-weight="bold" officeooo:rsid="01de14a5" style:font-weight-asian="bold" style:font-name-complex="Times New Roman2" style:font-size-complex="12pt" style:font-weight-complex="bold"/>
    </style:style>
    <style:style style:name="T103" style:family="text">
      <style:text-properties style:font-name="Transliteration1" fo:font-weight="bold" style:font-weight-asian="bold" style:font-weight-complex="bold"/>
    </style:style>
    <style:style style:name="T104" style:family="text">
      <style:text-properties style:font-name="Transliteration1" fo:font-weight="bold" officeooo:rsid="042af72a" style:font-weight-asian="bold" style:font-weight-complex="bold"/>
    </style:style>
    <style:style style:name="T105" style:family="text">
      <style:text-properties style:font-name="Transliteration1" officeooo:rsid="01b9d1b8"/>
    </style:style>
    <style:style style:name="T106" style:family="text">
      <style:text-properties style:font-name="Transliteration1" officeooo:rsid="01c3673a"/>
    </style:style>
    <style:style style:name="T107" style:family="text">
      <style:text-properties style:font-name="Transliteration1" officeooo:rsid="01cbb55b"/>
    </style:style>
    <style:style style:name="T108" style:family="text">
      <style:text-properties style:font-name="Transliteration1" officeooo:rsid="01cc98b2"/>
    </style:style>
    <style:style style:name="T109" style:family="text">
      <style:text-properties style:font-name="Transliteration1" officeooo:rsid="03e2ad21"/>
    </style:style>
    <style:style style:name="T110" style:family="text">
      <style:text-properties style:font-name="Transliteration1" officeooo:rsid="0381a53c"/>
    </style:style>
    <style:style style:name="T111" style:family="text">
      <style:text-properties style:font-name="Transliteration1" officeooo:rsid="03ff6ea9"/>
    </style:style>
    <style:style style:name="T112" style:family="text">
      <style:text-properties style:font-name="Transliteration1" officeooo:rsid="0400760a"/>
    </style:style>
    <style:style style:name="T113" style:family="text">
      <style:text-properties style:font-name="Transliteration1" officeooo:rsid="04095dbf"/>
    </style:style>
    <style:style style:name="T114" style:family="text">
      <style:text-properties style:font-name="Transliteration1" officeooo:rsid="040a54f6"/>
    </style:style>
    <style:style style:name="T115" style:family="text">
      <style:text-properties style:font-name="Transliteration1" officeooo:rsid="040e2dd7"/>
    </style:style>
    <style:style style:name="T116" style:family="text">
      <style:text-properties style:font-name="Transliteration1" officeooo:rsid="040fda2a"/>
    </style:style>
    <style:style style:name="T117" style:family="text">
      <style:text-properties style:font-name="Transliteration1" officeooo:rsid="0410b615"/>
    </style:style>
    <style:style style:name="T118" style:family="text">
      <style:text-properties style:font-name="Transliteration1" officeooo:rsid="041209f1"/>
    </style:style>
    <style:style style:name="T119" style:family="text">
      <style:text-properties style:font-name="Transliteration1" officeooo:rsid="04146ccc"/>
    </style:style>
    <style:style style:name="T120" style:family="text">
      <style:text-properties style:font-name="Transliteration1" officeooo:rsid="041482ff"/>
    </style:style>
    <style:style style:name="T121" style:family="text">
      <style:text-properties style:font-name="Transliteration1" officeooo:rsid="04155cb9"/>
    </style:style>
    <style:style style:name="T122" style:family="text">
      <style:text-properties style:font-name="Transliteration1" officeooo:rsid="0416c8c5"/>
    </style:style>
    <style:style style:name="T123" style:family="text">
      <style:text-properties style:font-name="Transliteration1" officeooo:rsid="041dff03"/>
    </style:style>
    <style:style style:name="T124" style:family="text">
      <style:text-properties style:font-name="Transliteration1" officeooo:rsid="041fc446"/>
    </style:style>
    <style:style style:name="T125" style:family="text">
      <style:text-properties style:font-name="Transliteration1" officeooo:rsid="04229439"/>
    </style:style>
    <style:style style:name="T126" style:family="text">
      <style:text-properties style:font-name="Transliteration1" officeooo:rsid="0425a93e"/>
    </style:style>
    <style:style style:name="T127" style:family="text">
      <style:text-properties style:font-name="Transliteration1" officeooo:rsid="0427ff36"/>
    </style:style>
    <style:style style:name="T128" style:family="text">
      <style:text-properties style:font-name="Transliteration1" officeooo:rsid="04290016"/>
    </style:style>
    <style:style style:name="T129" style:family="text">
      <style:text-properties style:font-name="Transliteration1" officeooo:rsid="042af72a"/>
    </style:style>
    <style:style style:name="T130" style:family="text">
      <style:text-properties style:font-name="Transliteration1" officeooo:rsid="042b31ff"/>
    </style:style>
    <style:style style:name="T131" style:family="text">
      <style:text-properties style:font-name="Transliteration1" officeooo:rsid="042c9d50"/>
    </style:style>
    <style:style style:name="T132" style:family="text">
      <style:text-properties style:font-name="Transliteration1" officeooo:rsid="042d3a22"/>
    </style:style>
    <style:style style:name="T133" style:family="text">
      <style:text-properties style:font-name="Transliteration1" officeooo:rsid="042db194"/>
    </style:style>
    <style:style style:name="T134" style:family="text">
      <style:text-properties style:font-name="Transliteration1" officeooo:rsid="0430a680"/>
    </style:style>
    <style:style style:name="T135" style:family="text">
      <style:text-properties style:font-name="Transliteration1" officeooo:rsid="04317ac5"/>
    </style:style>
    <style:style style:name="T136" style:family="text">
      <style:text-properties style:font-name="Transliteration1" officeooo:rsid="0431c092"/>
    </style:style>
    <style:style style:name="T137" style:family="text">
      <style:text-properties style:font-name="Transliteration1" officeooo:rsid="0432e750"/>
    </style:style>
    <style:style style:name="T138" style:family="text">
      <style:text-properties style:font-name="Transliteration1" officeooo:rsid="04354356"/>
    </style:style>
    <style:style style:name="T139" style:family="text">
      <style:text-properties style:font-name="Transliteration1" officeooo:rsid="0435f2fd"/>
    </style:style>
    <style:style style:name="T140" style:family="text">
      <style:text-properties style:font-name="Transliteration1" officeooo:rsid="04392cc6"/>
    </style:style>
    <style:style style:name="T141" style:family="text">
      <style:text-properties style:font-name="Transliteration1" officeooo:rsid="0443fa6b"/>
    </style:style>
    <style:style style:name="T142" style:family="text">
      <style:text-properties style:font-name="Transliteration1" officeooo:rsid="0444cc1e"/>
    </style:style>
    <style:style style:name="T143" style:family="text">
      <style:text-properties style:font-name="Transliteration1" officeooo:rsid="044500ea"/>
    </style:style>
    <style:style style:name="T144" style:family="text">
      <style:text-properties style:font-name="Transliteration1" officeooo:rsid="04451ead"/>
    </style:style>
    <style:style style:name="T145" style:family="text">
      <style:text-properties style:font-name="Transliteration1" officeooo:rsid="044653ae"/>
    </style:style>
    <style:style style:name="T146" style:family="text">
      <style:text-properties style:font-name="Transliteration1" officeooo:rsid="04466d32"/>
    </style:style>
    <style:style style:name="T147" style:family="text">
      <style:text-properties style:font-name="Transliteration1" officeooo:rsid="044ad0dd"/>
    </style:style>
    <style:style style:name="T148" style:family="text">
      <style:text-properties style:font-name="Transliteration1" officeooo:rsid="04503c70"/>
    </style:style>
    <style:style style:name="T149" style:family="text">
      <style:text-properties style:font-name="Transliteration1" officeooo:rsid="045235ec"/>
    </style:style>
    <style:style style:name="T150" style:family="text">
      <style:text-properties style:font-name="Transliteration1" officeooo:rsid="0482ce09"/>
    </style:style>
    <style:style style:name="T151" style:family="text">
      <style:text-properties style:font-name="Transliteration1" officeooo:rsid="0484145c"/>
    </style:style>
    <style:style style:name="T152" style:family="text">
      <style:text-properties fo:font-style="normal" style:font-style-asian="normal" style:font-name-complex="Times New Roman2" style:font-size-complex="12pt" style:font-style-complex="normal"/>
    </style:style>
    <style:style style:name="T153" style:family="text">
      <style:text-properties fo:font-style="normal" officeooo:rsid="019cf784" style:font-style-asian="normal" style:font-name-complex="Times New Roman2" style:font-size-complex="12pt" style:font-style-complex="normal"/>
    </style:style>
    <style:style style:name="T154" style:family="text">
      <style:text-properties fo:font-style="normal" officeooo:rsid="019df45c" style:font-style-asian="normal" style:font-name-complex="Times New Roman2" style:font-size-complex="12pt" style:font-style-complex="normal"/>
    </style:style>
    <style:style style:name="T155" style:family="text">
      <style:text-properties fo:font-style="normal" officeooo:rsid="01a069bf" style:font-style-asian="normal" style:font-name-complex="Times New Roman2" style:font-size-complex="12pt" style:font-style-complex="normal"/>
    </style:style>
    <style:style style:name="T156" style:family="text">
      <style:text-properties fo:font-style="normal" officeooo:rsid="01a55361" style:font-style-asian="normal" style:font-name-complex="Times New Roman2" style:font-size-complex="12pt" style:font-style-complex="normal"/>
    </style:style>
    <style:style style:name="T157" style:family="text">
      <style:text-properties fo:font-style="normal" officeooo:rsid="01b186c7" style:font-style-asian="normal" style:font-name-complex="Times New Roman2" style:font-size-complex="12pt" style:font-style-complex="normal"/>
    </style:style>
    <style:style style:name="T158" style:family="text">
      <style:text-properties fo:font-style="normal" officeooo:rsid="01b48c9c" style:font-style-asian="normal" style:font-name-complex="Times New Roman2" style:font-size-complex="12pt" style:font-style-complex="normal"/>
    </style:style>
    <style:style style:name="T159" style:family="text">
      <style:text-properties fo:font-style="normal" officeooo:rsid="01b4f3c6" style:font-style-asian="normal" style:font-name-complex="Times New Roman2" style:font-size-complex="12pt" style:font-style-complex="normal"/>
    </style:style>
    <style:style style:name="T160" style:family="text">
      <style:text-properties fo:font-style="normal" officeooo:rsid="01bf10ab" style:font-style-asian="normal" style:font-name-complex="Times New Roman2" style:font-size-complex="12pt" style:font-style-complex="normal"/>
    </style:style>
    <style:style style:name="T161" style:family="text">
      <style:text-properties fo:font-style="normal" officeooo:rsid="01eb821a" style:font-style-asian="normal" style:font-name-complex="Times New Roman2" style:font-size-complex="12pt" style:font-style-complex="normal"/>
    </style:style>
    <style:style style:name="T162" style:family="text">
      <style:text-properties fo:font-style="normal" officeooo:rsid="01ed694c" style:font-style-asian="normal" style:font-name-complex="Times New Roman2" style:font-size-complex="12pt" style:font-style-complex="normal"/>
    </style:style>
    <style:style style:name="T163" style:family="text">
      <style:text-properties fo:font-style="normal" officeooo:rsid="01f2f136" style:font-style-asian="normal" style:font-name-complex="Times New Roman2" style:font-size-complex="12pt" style:font-style-complex="normal"/>
    </style:style>
    <style:style style:name="T164" style:family="text">
      <style:text-properties fo:font-style="normal" officeooo:rsid="01f4cf35" style:font-style-asian="normal" style:font-name-complex="Times New Roman2" style:font-size-complex="12pt" style:font-style-complex="normal"/>
    </style:style>
    <style:style style:name="T165" style:family="text">
      <style:text-properties fo:font-style="normal" officeooo:rsid="01f68f8c" style:font-style-asian="normal" style:font-name-complex="Times New Roman2" style:font-size-complex="12pt" style:font-style-complex="normal"/>
    </style:style>
    <style:style style:name="T166" style:family="text">
      <style:text-properties fo:font-style="normal" officeooo:rsid="01f847c5" style:font-style-asian="normal" style:font-name-complex="Times New Roman2" style:font-size-complex="12pt" style:font-style-complex="normal"/>
    </style:style>
    <style:style style:name="T167" style:family="text">
      <style:text-properties fo:font-style="normal" officeooo:rsid="01fc48be" style:font-style-asian="normal" style:font-name-complex="Times New Roman2" style:font-size-complex="12pt" style:font-style-complex="normal"/>
    </style:style>
    <style:style style:name="T168" style:family="text">
      <style:text-properties fo:font-style="normal" officeooo:rsid="01fcfda0" style:font-style-asian="normal" style:font-name-complex="Times New Roman2" style:font-size-complex="12pt" style:font-style-complex="normal"/>
    </style:style>
    <style:style style:name="T169" style:family="text">
      <style:text-properties fo:font-style="normal" officeooo:rsid="01fe2848" style:font-style-asian="normal" style:font-name-complex="Times New Roman2" style:font-size-complex="12pt" style:font-style-complex="normal"/>
    </style:style>
    <style:style style:name="T170" style:family="text">
      <style:text-properties fo:font-style="normal" officeooo:rsid="01fe77c8" style:font-style-asian="normal" style:font-name-complex="Times New Roman2" style:font-size-complex="12pt" style:font-style-complex="normal"/>
    </style:style>
    <style:style style:name="T171" style:family="text">
      <style:text-properties fo:font-style="normal" officeooo:rsid="01ff79e8" style:font-style-asian="normal" style:font-name-complex="Times New Roman2" style:font-size-complex="12pt" style:font-style-complex="normal"/>
    </style:style>
    <style:style style:name="T172" style:family="text">
      <style:text-properties fo:font-style="normal" officeooo:rsid="01ff9b42" style:font-style-asian="normal" style:font-name-complex="Times New Roman2" style:font-size-complex="12pt" style:font-style-complex="normal"/>
    </style:style>
    <style:style style:name="T173" style:family="text">
      <style:text-properties fo:font-style="normal" officeooo:rsid="01ffa615" style:font-style-asian="normal" style:font-name-complex="Times New Roman2" style:font-size-complex="12pt" style:font-style-complex="normal"/>
    </style:style>
    <style:style style:name="T174" style:family="text">
      <style:text-properties fo:font-style="normal" officeooo:rsid="0201e0c5" style:font-style-asian="normal" style:font-name-complex="Times New Roman2" style:font-size-complex="12pt" style:font-style-complex="normal"/>
    </style:style>
    <style:style style:name="T175" style:family="text">
      <style:text-properties fo:font-style="normal" officeooo:rsid="020734ac" style:font-style-asian="normal" style:font-name-complex="Times New Roman2" style:font-size-complex="12pt" style:font-style-complex="normal"/>
    </style:style>
    <style:style style:name="T176" style:family="text">
      <style:text-properties fo:font-style="normal" officeooo:rsid="02089ad0" style:font-style-asian="normal" style:font-name-complex="Times New Roman2" style:font-size-complex="12pt" style:font-style-complex="normal"/>
    </style:style>
    <style:style style:name="T177" style:family="text">
      <style:text-properties fo:font-style="normal" officeooo:rsid="020b713c" style:font-style-asian="normal" style:font-name-complex="Times New Roman2" style:font-size-complex="12pt" style:font-style-complex="normal"/>
    </style:style>
    <style:style style:name="T178" style:family="text">
      <style:text-properties fo:font-style="normal" officeooo:rsid="020c63a9" style:font-style-asian="normal" style:font-name-complex="Times New Roman2" style:font-size-complex="12pt" style:font-style-complex="normal"/>
    </style:style>
    <style:style style:name="T179" style:family="text">
      <style:text-properties fo:font-style="normal" officeooo:rsid="020f0044" style:font-style-asian="normal" style:font-name-complex="Times New Roman2" style:font-size-complex="12pt" style:font-style-complex="normal"/>
    </style:style>
    <style:style style:name="T180" style:family="text">
      <style:text-properties fo:font-style="normal" officeooo:rsid="020f9533" style:font-style-asian="normal" style:font-name-complex="Times New Roman2" style:font-size-complex="12pt" style:font-style-complex="normal"/>
    </style:style>
    <style:style style:name="T181" style:family="text">
      <style:text-properties fo:font-style="normal" officeooo:rsid="021035de" style:font-style-asian="normal" style:font-name-complex="Times New Roman2" style:font-size-complex="12pt" style:font-style-complex="normal"/>
    </style:style>
    <style:style style:name="T182" style:family="text">
      <style:text-properties fo:font-style="normal" officeooo:rsid="021082cc" style:font-style-asian="normal" style:font-name-complex="Times New Roman2" style:font-size-complex="12pt" style:font-style-complex="normal"/>
    </style:style>
    <style:style style:name="T183" style:family="text">
      <style:text-properties fo:font-style="normal" officeooo:rsid="021259d4" style:font-style-asian="normal" style:font-name-complex="Times New Roman2" style:font-size-complex="12pt" style:font-style-complex="normal"/>
    </style:style>
    <style:style style:name="T184" style:family="text">
      <style:text-properties fo:font-style="normal" officeooo:rsid="02131ed7" style:font-style-asian="normal" style:font-name-complex="Times New Roman2" style:font-size-complex="12pt" style:font-style-complex="normal"/>
    </style:style>
    <style:style style:name="T185" style:family="text">
      <style:text-properties fo:font-style="normal" officeooo:rsid="02150457" style:font-style-asian="normal" style:font-name-complex="Times New Roman2" style:font-size-complex="12pt" style:font-style-complex="normal"/>
    </style:style>
    <style:style style:name="T186" style:family="text">
      <style:text-properties fo:font-style="normal" officeooo:rsid="0217c8cd" style:font-style-asian="normal" style:font-name-complex="Times New Roman2" style:font-size-complex="12pt" style:font-style-complex="normal"/>
    </style:style>
    <style:style style:name="T187" style:family="text">
      <style:text-properties fo:font-style="normal" officeooo:rsid="0219cd2e" style:font-style-asian="normal" style:font-name-complex="Times New Roman2" style:font-size-complex="12pt" style:font-style-complex="normal"/>
    </style:style>
    <style:style style:name="T188" style:family="text">
      <style:text-properties fo:font-style="normal" officeooo:rsid="021bc77b" style:font-style-asian="normal" style:font-name-complex="Times New Roman2" style:font-size-complex="12pt" style:font-style-complex="normal"/>
    </style:style>
    <style:style style:name="T189" style:family="text">
      <style:text-properties fo:font-style="normal" officeooo:rsid="021c068b" style:font-style-asian="normal" style:font-name-complex="Times New Roman2" style:font-size-complex="12pt" style:font-style-complex="normal"/>
    </style:style>
    <style:style style:name="T190" style:family="text">
      <style:text-properties fo:font-style="normal" officeooo:rsid="021f1dfe" style:font-style-asian="normal" style:font-name-complex="Times New Roman2" style:font-size-complex="12pt" style:font-style-complex="normal"/>
    </style:style>
    <style:style style:name="T191" style:family="text">
      <style:text-properties fo:font-style="normal" officeooo:rsid="0221e33b" style:font-style-asian="normal" style:font-name-complex="Times New Roman2" style:font-size-complex="12pt" style:font-style-complex="normal"/>
    </style:style>
    <style:style style:name="T192" style:family="text">
      <style:text-properties fo:font-style="normal" officeooo:rsid="0223d530" style:font-style-asian="normal" style:font-name-complex="Times New Roman2" style:font-size-complex="12pt" style:font-style-complex="normal"/>
    </style:style>
    <style:style style:name="T193" style:family="text">
      <style:text-properties fo:font-style="normal" officeooo:rsid="0225a1eb" style:font-style-asian="normal" style:font-name-complex="Times New Roman2" style:font-size-complex="12pt" style:font-style-complex="normal"/>
    </style:style>
    <style:style style:name="T194" style:family="text">
      <style:text-properties fo:font-style="normal" officeooo:rsid="0225b4b1" style:font-style-asian="normal" style:font-name-complex="Times New Roman2" style:font-size-complex="12pt" style:font-style-complex="normal"/>
    </style:style>
    <style:style style:name="T195" style:family="text">
      <style:text-properties fo:font-style="normal" officeooo:rsid="02282f6e" style:font-style-asian="normal" style:font-name-complex="Times New Roman2" style:font-size-complex="12pt" style:font-style-complex="normal"/>
    </style:style>
    <style:style style:name="T196" style:family="text">
      <style:text-properties fo:font-style="normal" officeooo:rsid="02283307" style:font-style-asian="normal" style:font-name-complex="Times New Roman2" style:font-size-complex="12pt" style:font-style-complex="normal"/>
    </style:style>
    <style:style style:name="T197" style:family="text">
      <style:text-properties fo:font-style="normal" officeooo:rsid="022a0121" style:font-style-asian="normal" style:font-name-complex="Times New Roman2" style:font-size-complex="12pt" style:font-style-complex="normal"/>
    </style:style>
    <style:style style:name="T198" style:family="text">
      <style:text-properties fo:font-style="normal" officeooo:rsid="022bdcbe" style:font-style-asian="normal" style:font-name-complex="Times New Roman2" style:font-size-complex="12pt" style:font-style-complex="normal"/>
    </style:style>
    <style:style style:name="T199" style:family="text">
      <style:text-properties fo:font-style="normal" officeooo:rsid="022dba80" style:font-style-asian="normal" style:font-name-complex="Times New Roman2" style:font-size-complex="12pt" style:font-style-complex="normal"/>
    </style:style>
    <style:style style:name="T200" style:family="text">
      <style:text-properties fo:font-style="normal" officeooo:rsid="022f4d2b" style:font-style-asian="normal" style:font-name-complex="Times New Roman2" style:font-size-complex="12pt" style:font-style-complex="normal"/>
    </style:style>
    <style:style style:name="T201" style:family="text">
      <style:text-properties fo:font-style="normal" officeooo:rsid="0230b0d1" style:font-style-asian="normal" style:font-name-complex="Times New Roman2" style:font-size-complex="12pt" style:font-style-complex="normal"/>
    </style:style>
    <style:style style:name="T202" style:family="text">
      <style:text-properties fo:font-style="normal" officeooo:rsid="023288c2" style:font-style-asian="normal" style:font-name-complex="Times New Roman2" style:font-size-complex="12pt" style:font-style-complex="normal"/>
    </style:style>
    <style:style style:name="T203" style:family="text">
      <style:text-properties fo:font-style="normal" officeooo:rsid="0236c895" style:font-style-asian="normal" style:font-name-complex="Times New Roman2" style:font-size-complex="12pt" style:font-style-complex="normal"/>
    </style:style>
    <style:style style:name="T204" style:family="text">
      <style:text-properties fo:font-style="normal" officeooo:rsid="0239acf3" style:font-style-asian="normal" style:font-name-complex="Times New Roman2" style:font-size-complex="12pt" style:font-style-complex="normal"/>
    </style:style>
    <style:style style:name="T205" style:family="text">
      <style:text-properties fo:font-style="normal" officeooo:rsid="023b3ed9" style:font-style-asian="normal" style:font-name-complex="Times New Roman2" style:font-size-complex="12pt" style:font-style-complex="normal"/>
    </style:style>
    <style:style style:name="T206" style:family="text">
      <style:text-properties fo:font-style="normal" officeooo:rsid="023d718b" style:font-style-asian="normal" style:font-name-complex="Times New Roman2" style:font-size-complex="12pt" style:font-style-complex="normal"/>
    </style:style>
    <style:style style:name="T207" style:family="text">
      <style:text-properties fo:font-style="normal" officeooo:rsid="023f4f98" style:font-style-asian="normal" style:font-name-complex="Times New Roman2" style:font-size-complex="12pt" style:font-style-complex="normal"/>
    </style:style>
    <style:style style:name="T208" style:family="text">
      <style:text-properties fo:font-style="normal" officeooo:rsid="0241aac8" style:font-style-asian="normal" style:font-name-complex="Times New Roman2" style:font-size-complex="12pt" style:font-style-complex="normal"/>
    </style:style>
    <style:style style:name="T209" style:family="text">
      <style:text-properties fo:font-style="normal" officeooo:rsid="024370d7" style:font-style-asian="normal" style:font-name-complex="Times New Roman2" style:font-size-complex="12pt" style:font-style-complex="normal"/>
    </style:style>
    <style:style style:name="T210" style:family="text">
      <style:text-properties fo:font-style="normal" officeooo:rsid="0247238f" style:font-style-asian="normal" style:font-name-complex="Times New Roman2" style:font-size-complex="12pt" style:font-style-complex="normal"/>
    </style:style>
    <style:style style:name="T211" style:family="text">
      <style:text-properties fo:font-style="normal" officeooo:rsid="024f73e6" style:font-style-asian="normal" style:font-name-complex="Times New Roman2" style:font-size-complex="12pt" style:font-style-complex="normal"/>
    </style:style>
    <style:style style:name="T212" style:family="text">
      <style:text-properties fo:font-style="normal" officeooo:rsid="025248c6" style:font-style-asian="normal" style:font-name-complex="Times New Roman2" style:font-size-complex="12pt" style:font-style-complex="normal"/>
    </style:style>
    <style:style style:name="T213" style:family="text">
      <style:text-properties fo:font-style="normal" officeooo:rsid="0254f833" style:font-style-asian="normal" style:font-name-complex="Times New Roman2" style:font-size-complex="12pt" style:font-style-complex="normal"/>
    </style:style>
    <style:style style:name="T214" style:family="text">
      <style:text-properties fo:font-style="normal" officeooo:rsid="02597a9a" style:font-style-asian="normal" style:font-name-complex="Times New Roman2" style:font-size-complex="12pt" style:font-style-complex="normal"/>
    </style:style>
    <style:style style:name="T215" style:family="text">
      <style:text-properties fo:font-style="normal" officeooo:rsid="02614468" style:font-style-asian="normal" style:font-name-complex="Times New Roman2" style:font-size-complex="12pt" style:font-style-complex="normal"/>
    </style:style>
    <style:style style:name="T216" style:family="text">
      <style:text-properties fo:font-style="normal" officeooo:rsid="026513d5" style:font-style-asian="normal" style:font-name-complex="Times New Roman2" style:font-size-complex="12pt" style:font-style-complex="normal"/>
    </style:style>
    <style:style style:name="T217" style:family="text">
      <style:text-properties fo:font-style="normal" officeooo:rsid="026752f3" style:font-style-asian="normal" style:font-name-complex="Times New Roman2" style:font-size-complex="12pt" style:font-style-complex="normal"/>
    </style:style>
    <style:style style:name="T218" style:family="text">
      <style:text-properties fo:font-style="normal" officeooo:rsid="026a8f37" style:font-style-asian="normal" style:font-name-complex="Times New Roman2" style:font-size-complex="12pt" style:font-style-complex="normal"/>
    </style:style>
    <style:style style:name="T219" style:family="text">
      <style:text-properties fo:font-style="normal" officeooo:rsid="026c21f0" style:font-style-asian="normal" style:font-name-complex="Times New Roman2" style:font-size-complex="12pt" style:font-style-complex="normal"/>
    </style:style>
    <style:style style:name="T220" style:family="text">
      <style:text-properties fo:font-style="normal" officeooo:rsid="02728767" style:font-style-asian="normal" style:font-name-complex="Times New Roman2" style:font-size-complex="12pt" style:font-style-complex="normal"/>
    </style:style>
    <style:style style:name="T221" style:family="text">
      <style:text-properties fo:font-style="normal" officeooo:rsid="0275c59c" style:font-style-asian="normal" style:font-name-complex="Times New Roman2" style:font-size-complex="12pt" style:font-style-complex="normal"/>
    </style:style>
    <style:style style:name="T222" style:family="text">
      <style:text-properties fo:font-style="normal" officeooo:rsid="02791e41" style:font-style-asian="normal" style:font-name-complex="Times New Roman2" style:font-size-complex="12pt" style:font-style-complex="normal"/>
    </style:style>
    <style:style style:name="T223" style:family="text">
      <style:text-properties fo:font-style="normal" officeooo:rsid="027daf88" style:font-style-asian="normal" style:font-name-complex="Times New Roman2" style:font-size-complex="12pt" style:font-style-complex="normal"/>
    </style:style>
    <style:style style:name="T224" style:family="text">
      <style:text-properties fo:font-style="normal" officeooo:rsid="0232dd69" style:font-style-asian="normal" style:font-name-complex="Times New Roman2" style:font-size-complex="12pt" style:font-style-complex="normal"/>
    </style:style>
    <style:style style:name="T225" style:family="text">
      <style:text-properties fo:font-style="normal" officeooo:rsid="02359ee0" style:font-style-asian="normal" style:font-name-complex="Times New Roman2" style:font-size-complex="12pt" style:font-style-complex="normal"/>
    </style:style>
    <style:style style:name="T226" style:family="text">
      <style:text-properties fo:font-style="normal" officeooo:rsid="0234280f" style:font-style-asian="normal" style:font-name-complex="Times New Roman2" style:font-size-complex="12pt" style:font-style-complex="normal"/>
    </style:style>
    <style:style style:name="T227" style:family="text">
      <style:text-properties fo:font-style="normal" officeooo:rsid="027eb9e1" style:font-style-asian="normal" style:font-name-complex="Times New Roman2" style:font-size-complex="12pt" style:font-style-complex="normal"/>
    </style:style>
    <style:style style:name="T228" style:family="text">
      <style:text-properties fo:font-style="normal" officeooo:rsid="024299bb" style:font-style-asian="normal" style:font-name-complex="Times New Roman2" style:font-size-complex="12pt" style:font-style-complex="normal"/>
    </style:style>
    <style:style style:name="T229" style:family="text">
      <style:text-properties fo:font-style="normal" officeooo:rsid="0282bd2b" style:font-style-asian="normal" style:font-name-complex="Times New Roman2" style:font-size-complex="12pt" style:font-style-complex="normal"/>
    </style:style>
    <style:style style:name="T230" style:family="text">
      <style:text-properties fo:font-style="normal" officeooo:rsid="02842c5d" style:font-style-asian="normal" style:font-name-complex="Times New Roman2" style:font-size-complex="12pt" style:font-style-complex="normal"/>
    </style:style>
    <style:style style:name="T231" style:family="text">
      <style:text-properties fo:font-style="normal" officeooo:rsid="0285c1f9" style:font-style-asian="normal" style:font-name-complex="Times New Roman2" style:font-size-complex="12pt" style:font-style-complex="normal"/>
    </style:style>
    <style:style style:name="T232" style:family="text">
      <style:text-properties fo:font-style="normal" officeooo:rsid="02869178" style:font-style-asian="normal" style:font-name-complex="Times New Roman2" style:font-size-complex="12pt" style:font-style-complex="normal"/>
    </style:style>
    <style:style style:name="T233" style:family="text">
      <style:text-properties fo:font-style="normal" officeooo:rsid="02869371" style:font-style-asian="normal" style:font-name-complex="Times New Roman2" style:font-size-complex="12pt" style:font-style-complex="normal"/>
    </style:style>
    <style:style style:name="T234" style:family="text">
      <style:text-properties fo:font-style="normal" officeooo:rsid="02887cfd" style:font-style-asian="normal" style:font-name-complex="Times New Roman2" style:font-size-complex="12pt" style:font-style-complex="normal"/>
    </style:style>
    <style:style style:name="T235" style:family="text">
      <style:text-properties fo:font-style="normal" officeooo:rsid="028c33c7" style:font-style-asian="normal" style:font-name-complex="Times New Roman2" style:font-size-complex="12pt" style:font-style-complex="normal"/>
    </style:style>
    <style:style style:name="T236" style:family="text">
      <style:text-properties fo:font-style="normal" officeooo:rsid="02947fdd" style:font-style-asian="normal" style:font-name-complex="Times New Roman2" style:font-size-complex="12pt" style:font-style-complex="normal"/>
    </style:style>
    <style:style style:name="T237" style:family="text">
      <style:text-properties fo:font-style="normal" officeooo:rsid="0294c9da" style:font-style-asian="normal" style:font-name-complex="Times New Roman2" style:font-size-complex="12pt" style:font-style-complex="normal"/>
    </style:style>
    <style:style style:name="T238" style:family="text">
      <style:text-properties fo:font-style="normal" officeooo:rsid="0298d295" style:font-style-asian="normal" style:font-name-complex="Times New Roman2" style:font-size-complex="12pt" style:font-style-complex="normal"/>
    </style:style>
    <style:style style:name="T239" style:family="text">
      <style:text-properties fo:font-style="normal" officeooo:rsid="029d0a25" style:font-style-asian="normal" style:font-name-complex="Times New Roman2" style:font-size-complex="12pt" style:font-style-complex="normal"/>
    </style:style>
    <style:style style:name="T240" style:family="text">
      <style:text-properties fo:font-style="normal" officeooo:rsid="029d71b9" style:font-style-asian="normal" style:font-name-complex="Times New Roman2" style:font-size-complex="12pt" style:font-style-complex="normal"/>
    </style:style>
    <style:style style:name="T241" style:family="text">
      <style:text-properties fo:font-style="normal" officeooo:rsid="029f16e9" style:font-style-asian="normal" style:font-name-complex="Times New Roman2" style:font-size-complex="12pt" style:font-style-complex="normal"/>
    </style:style>
    <style:style style:name="T242" style:family="text">
      <style:text-properties fo:font-style="normal" officeooo:rsid="02a10835" style:font-style-asian="normal" style:font-name-complex="Times New Roman2" style:font-size-complex="12pt" style:font-style-complex="normal"/>
    </style:style>
    <style:style style:name="T243" style:family="text">
      <style:text-properties fo:font-style="normal" officeooo:rsid="02a607fc" style:font-style-asian="normal" style:font-name-complex="Times New Roman2" style:font-size-complex="12pt" style:font-style-complex="normal"/>
    </style:style>
    <style:style style:name="T244" style:family="text">
      <style:text-properties fo:font-style="normal" officeooo:rsid="02a80220" style:font-style-asian="normal" style:font-name-complex="Times New Roman2" style:font-size-complex="12pt" style:font-style-complex="normal"/>
    </style:style>
    <style:style style:name="T245" style:family="text">
      <style:text-properties fo:font-style="normal" officeooo:rsid="02a824fe" style:font-style-asian="normal" style:font-name-complex="Times New Roman2" style:font-size-complex="12pt" style:font-style-complex="normal"/>
    </style:style>
    <style:style style:name="T246" style:family="text">
      <style:text-properties fo:font-style="normal" officeooo:rsid="02a8c64e" style:font-style-asian="normal" style:font-name-complex="Times New Roman2" style:font-size-complex="12pt" style:font-style-complex="normal"/>
    </style:style>
    <style:style style:name="T247" style:family="text">
      <style:text-properties fo:font-style="normal" officeooo:rsid="02a9c9a0" style:font-style-asian="normal" style:font-name-complex="Times New Roman2" style:font-size-complex="12pt" style:font-style-complex="normal"/>
    </style:style>
    <style:style style:name="T248" style:family="text">
      <style:text-properties fo:font-style="normal" officeooo:rsid="02ab4c69" style:font-style-asian="normal" style:font-name-complex="Times New Roman2" style:font-size-complex="12pt" style:font-style-complex="normal"/>
    </style:style>
    <style:style style:name="T249" style:family="text">
      <style:text-properties fo:font-style="normal" officeooo:rsid="02ab94ee" style:font-style-asian="normal" style:font-name-complex="Times New Roman2" style:font-size-complex="12pt" style:font-style-complex="normal"/>
    </style:style>
    <style:style style:name="T250" style:family="text">
      <style:text-properties fo:font-style="normal" officeooo:rsid="02ad1744" style:font-style-asian="normal" style:font-name-complex="Times New Roman2" style:font-size-complex="12pt" style:font-style-complex="normal"/>
    </style:style>
    <style:style style:name="T251" style:family="text">
      <style:text-properties fo:font-style="normal" officeooo:rsid="02aea232" style:font-style-asian="normal" style:font-name-complex="Times New Roman2" style:font-size-complex="12pt" style:font-style-complex="normal"/>
    </style:style>
    <style:style style:name="T252" style:family="text">
      <style:text-properties fo:font-style="normal" officeooo:rsid="02b2f945" style:font-style-asian="normal" style:font-name-complex="Times New Roman2" style:font-size-complex="12pt" style:font-style-complex="normal"/>
    </style:style>
    <style:style style:name="T253" style:family="text">
      <style:text-properties fo:font-style="normal" officeooo:rsid="02caebe4" style:font-style-asian="normal" style:font-name-complex="Times New Roman2" style:font-size-complex="12pt" style:font-style-complex="normal"/>
    </style:style>
    <style:style style:name="T254" style:family="text">
      <style:text-properties fo:font-style="normal" officeooo:rsid="02cb5218" style:font-style-asian="normal" style:font-name-complex="Times New Roman2" style:font-size-complex="12pt" style:font-style-complex="normal"/>
    </style:style>
    <style:style style:name="T255" style:family="text">
      <style:text-properties fo:font-style="normal" officeooo:rsid="02cd4810" style:font-style-asian="normal" style:font-name-complex="Times New Roman2" style:font-size-complex="12pt" style:font-style-complex="normal"/>
    </style:style>
    <style:style style:name="T256" style:family="text">
      <style:text-properties fo:font-style="normal" officeooo:rsid="02d40921" style:font-style-asian="normal" style:font-name-complex="Times New Roman2" style:font-size-complex="12pt" style:font-style-complex="normal"/>
    </style:style>
    <style:style style:name="T257" style:family="text">
      <style:text-properties fo:font-style="normal" officeooo:rsid="03097544" style:font-style-asian="normal" style:font-name-complex="Times New Roman2" style:font-size-complex="12pt" style:font-style-complex="normal"/>
    </style:style>
    <style:style style:name="T258" style:family="text">
      <style:text-properties fo:font-style="normal" officeooo:rsid="0374bbe6" style:font-style-asian="normal" style:font-name-complex="Times New Roman2" style:font-size-complex="12pt" style:font-style-complex="normal"/>
    </style:style>
    <style:style style:name="T259" style:family="text">
      <style:text-properties fo:font-style="normal" officeooo:rsid="039ead77" style:font-style-asian="normal" style:font-name-complex="Times New Roman2" style:font-size-complex="12pt" style:font-style-complex="normal"/>
    </style:style>
    <style:style style:name="T260" style:family="text">
      <style:text-properties fo:font-style="normal" officeooo:rsid="03bd2d16" style:font-style-asian="normal" style:font-name-complex="Times New Roman2" style:font-size-complex="12pt" style:font-style-complex="normal"/>
    </style:style>
    <style:style style:name="T261" style:family="text">
      <style:text-properties fo:font-style="normal" fo:font-weight="bold" style:font-style-asian="normal" style:font-weight-asian="bold" style:font-name-complex="Times New Roman2" style:font-size-complex="12pt" style:font-style-complex="normal" style:font-weight-complex="bold"/>
    </style:style>
    <style:style style:name="T262" style:family="text">
      <style:text-properties fo:font-style="normal" fo:font-weight="bold" officeooo:rsid="01a55361" style:font-style-asian="normal" style:font-weight-asian="bold" style:font-name-complex="Times New Roman2" style:font-size-complex="12pt" style:font-style-complex="normal" style:font-weight-complex="bold"/>
    </style:style>
    <style:style style:name="T263" style:family="text">
      <style:text-properties fo:font-style="normal" fo:font-weight="bold" officeooo:rsid="01ef44e0" style:font-style-asian="normal" style:font-weight-asian="bold" style:font-name-complex="Times New Roman2" style:font-size-complex="12pt" style:font-style-complex="normal" style:font-weight-complex="bold"/>
    </style:style>
    <style:style style:name="T264" style:family="text">
      <style:text-properties fo:font-style="normal" fo:font-weight="bold" officeooo:rsid="0201e0c5" style:font-style-asian="normal" style:font-weight-asian="bold" style:font-name-complex="Times New Roman2" style:font-size-complex="12pt" style:font-style-complex="normal" style:font-weight-complex="bold"/>
    </style:style>
    <style:style style:name="T265" style:family="text">
      <style:text-properties fo:font-style="normal" fo:font-weight="bold" officeooo:rsid="02089ad0" style:font-style-asian="normal" style:font-weight-asian="bold" style:font-name-complex="Times New Roman2" style:font-size-complex="12pt" style:font-style-complex="normal" style:font-weight-complex="bold"/>
    </style:style>
    <style:style style:name="T266" style:family="text">
      <style:text-properties fo:font-style="normal" fo:font-weight="bold" officeooo:rsid="0236c895" style:font-style-asian="normal" style:font-weight-asian="bold" style:font-name-complex="Times New Roman2" style:font-size-complex="12pt" style:font-style-complex="normal" style:font-weight-complex="bold"/>
    </style:style>
    <style:style style:name="T267" style:family="text">
      <style:text-properties fo:font-style="normal" fo:font-weight="bold" officeooo:rsid="0250a71f" style:font-style-asian="normal" style:font-weight-asian="bold" style:font-name-complex="Times New Roman2" style:font-size-complex="12pt" style:font-style-complex="normal" style:font-weight-complex="bold"/>
    </style:style>
    <style:style style:name="T268" style:family="text">
      <style:text-properties fo:font-style="normal" fo:font-weight="bold" officeooo:rsid="02a607fc" style:font-style-asian="normal" style:font-weight-asian="bold" style:font-name-complex="Times New Roman2" style:font-size-complex="12pt" style:font-style-complex="normal" style:font-weight-complex="bold"/>
    </style:style>
    <style:style style:name="T269" style:family="text">
      <style:text-properties officeooo:rsid="019bc138"/>
    </style:style>
    <style:style style:name="T270" style:family="text">
      <style:text-properties officeooo:rsid="01a55361"/>
    </style:style>
    <style:style style:name="T271" style:family="text">
      <style:text-properties style:font-name="Transliteration"/>
    </style:style>
    <style:style style:name="T272" style:family="text">
      <style:text-properties style:font-name="Transliteration" officeooo:rsid="01bf10ab" style:font-name-complex="Times New Roman2" style:font-size-complex="12pt"/>
    </style:style>
    <style:style style:name="T273" style:family="text">
      <style:text-properties style:font-name="Transliteration" officeooo:rsid="01cad4a6" style:font-name-complex="Times New Roman2" style:font-size-complex="12pt"/>
    </style:style>
    <style:style style:name="T274" style:family="text">
      <style:text-properties style:font-name="Transliteration" fo:font-style="normal" officeooo:rsid="01bf10ab" style:font-style-asian="normal" style:font-name-complex="Times New Roman2" style:font-size-complex="12pt" style:font-style-complex="normal"/>
    </style:style>
    <style:style style:name="T275" style:family="text">
      <style:text-properties style:font-name="Transliteration" fo:font-style="normal" officeooo:rsid="01ff9b42" style:font-style-asian="normal" style:font-name-complex="Times New Roman2" style:font-size-complex="12pt" style:font-style-complex="normal"/>
    </style:style>
    <style:style style:name="T276" style:family="text">
      <style:text-properties style:font-name="Transliteration" fo:font-style="normal" officeooo:rsid="0225a1eb" style:font-style-asian="normal" style:font-name-complex="Times New Roman2" style:font-size-complex="12pt" style:font-style-complex="normal"/>
    </style:style>
    <style:style style:name="T277" style:family="text">
      <style:text-properties style:font-name="Transliteration" officeooo:rsid="020418e5"/>
    </style:style>
    <style:style style:name="T278" style:family="text">
      <style:text-properties style:font-name="Transliteration" officeooo:rsid="025745bd"/>
    </style:style>
    <style:style style:name="T279" style:family="text">
      <style:text-properties style:font-name="Transliteration" officeooo:rsid="029f16e9"/>
    </style:style>
    <style:style style:name="T280" style:family="text">
      <style:text-properties style:font-name="Transliteration" officeooo:rsid="02bda874"/>
    </style:style>
    <style:style style:name="T281" style:family="text">
      <style:text-properties style:font-name="Transliteration" officeooo:rsid="030046e2"/>
    </style:style>
    <style:style style:name="T282" style:family="text">
      <style:text-properties style:font-name="Transliteration" officeooo:rsid="0357e92b"/>
    </style:style>
    <style:style style:name="T283" style:family="text">
      <style:text-properties style:font-name="Transliteration" officeooo:rsid="03ac884b"/>
    </style:style>
    <style:style style:name="T284" style:family="text">
      <style:text-properties style:font-name="Transliteration" officeooo:rsid="04392cc6"/>
    </style:style>
    <style:style style:name="T285" style:family="text">
      <style:text-properties officeooo:rsid="01c3851d"/>
    </style:style>
    <style:style style:name="T286" style:family="text">
      <style:text-properties officeooo:rsid="01c4d4c4"/>
    </style:style>
    <style:style style:name="T287" style:family="text">
      <style:text-properties officeooo:rsid="01d5f246"/>
    </style:style>
    <style:style style:name="T288" style:family="text">
      <style:text-properties officeooo:rsid="01d77a9b"/>
    </style:style>
    <style:style style:name="T289" style:family="text">
      <style:text-properties officeooo:rsid="01db2508"/>
    </style:style>
    <style:style style:name="T290" style:family="text">
      <style:text-properties officeooo:rsid="01de14a5"/>
    </style:style>
    <style:style style:name="T291" style:family="text">
      <style:text-properties officeooo:rsid="01e17e96"/>
    </style:style>
    <style:style style:name="T292" style:family="text">
      <style:text-properties officeooo:rsid="01e3e1e7"/>
    </style:style>
    <style:style style:name="T293" style:family="text">
      <style:text-properties officeooo:rsid="01e5305c"/>
    </style:style>
    <style:style style:name="T294" style:family="text">
      <style:text-properties officeooo:rsid="01e8d8ca"/>
    </style:style>
    <style:style style:name="T295" style:family="text">
      <style:text-properties officeooo:rsid="01ef44e0"/>
    </style:style>
    <style:style style:name="T296" style:family="text">
      <style:text-properties officeooo:rsid="02440f4b"/>
    </style:style>
    <style:style style:name="T297" style:family="text">
      <style:text-properties officeooo:rsid="024a16bb"/>
    </style:style>
    <style:style style:name="T298" style:family="text">
      <style:text-properties officeooo:rsid="024c80cc"/>
    </style:style>
    <style:style style:name="T299" style:family="text">
      <style:text-properties officeooo:rsid="025745bd"/>
    </style:style>
    <style:style style:name="T300" style:family="text">
      <style:text-properties officeooo:rsid="025ad19f"/>
    </style:style>
    <style:style style:name="T301" style:family="text">
      <style:text-properties officeooo:rsid="025bb2fa"/>
    </style:style>
    <style:style style:name="T302" style:family="text">
      <style:text-properties officeooo:rsid="025d0ff2"/>
    </style:style>
    <style:style style:name="T303" style:family="text">
      <style:text-properties officeooo:rsid="0266b04b"/>
    </style:style>
    <style:style style:name="T304" style:family="text">
      <style:text-properties officeooo:rsid="02691be0"/>
    </style:style>
    <style:style style:name="T305" style:family="text">
      <style:text-properties officeooo:rsid="026dc537"/>
    </style:style>
    <style:style style:name="T306" style:family="text">
      <style:text-properties officeooo:rsid="027045c5"/>
    </style:style>
    <style:style style:name="T307" style:family="text">
      <style:text-properties officeooo:rsid="02715978"/>
    </style:style>
    <style:style style:name="T308" style:family="text">
      <style:text-properties officeooo:rsid="0276fbb7"/>
    </style:style>
    <style:style style:name="T309" style:family="text">
      <style:text-properties officeooo:rsid="027887ec"/>
    </style:style>
    <style:style style:name="T310" style:family="text">
      <style:text-properties officeooo:rsid="027eb967"/>
    </style:style>
    <style:style style:name="T311" style:family="text">
      <style:text-properties officeooo:rsid="027eb9e1"/>
    </style:style>
    <style:style style:name="T312" style:family="text">
      <style:text-properties officeooo:rsid="027f1a42"/>
    </style:style>
    <style:style style:name="T313" style:family="text">
      <style:text-properties officeooo:rsid="028ea34d"/>
    </style:style>
    <style:style style:name="T314" style:family="text">
      <style:text-properties officeooo:rsid="028f3e5a"/>
    </style:style>
    <style:style style:name="T315" style:family="text">
      <style:text-properties officeooo:rsid="0293afa3"/>
    </style:style>
    <style:style style:name="T316" style:family="text">
      <style:text-properties officeooo:rsid="02947fdd"/>
    </style:style>
    <style:style style:name="T317" style:family="text">
      <style:text-properties officeooo:rsid="0295c253"/>
    </style:style>
    <style:style style:name="T318" style:family="text">
      <style:text-properties officeooo:rsid="02970406"/>
    </style:style>
    <style:style style:name="T319" style:family="text">
      <style:text-properties officeooo:rsid="0297ec39"/>
    </style:style>
    <style:style style:name="T320" style:family="text">
      <style:text-properties officeooo:rsid="029b59f5"/>
    </style:style>
    <style:style style:name="T321" style:family="text">
      <style:text-properties officeooo:rsid="029d0a25"/>
    </style:style>
    <style:style style:name="T322" style:family="text">
      <style:text-properties officeooo:rsid="029f16e9"/>
    </style:style>
    <style:style style:name="T323" style:family="text">
      <style:text-properties officeooo:rsid="029f95be"/>
    </style:style>
    <style:style style:name="T324" style:family="text">
      <style:text-properties officeooo:rsid="02a02062"/>
    </style:style>
    <style:style style:name="T325" style:family="text">
      <style:text-properties officeooo:rsid="02a2033b"/>
    </style:style>
    <style:style style:name="T326" style:family="text">
      <style:text-properties officeooo:rsid="02a7088a"/>
    </style:style>
    <style:style style:name="T327" style:family="text">
      <style:text-properties officeooo:rsid="02a8c64e"/>
    </style:style>
    <style:style style:name="T328" style:family="text">
      <style:text-properties officeooo:rsid="02a9c9a0"/>
    </style:style>
    <style:style style:name="T329" style:family="text">
      <style:text-properties officeooo:rsid="02aa3e62"/>
    </style:style>
    <style:style style:name="T330" style:family="text">
      <style:text-properties officeooo:rsid="02b0334c"/>
    </style:style>
    <style:style style:name="T331" style:family="text">
      <style:text-properties officeooo:rsid="02b1ff7e"/>
    </style:style>
    <style:style style:name="T332" style:family="text">
      <style:text-properties officeooo:rsid="02b2008c"/>
    </style:style>
    <style:style style:name="T333" style:family="text">
      <style:text-properties officeooo:rsid="0256b750"/>
    </style:style>
    <style:style style:name="T334" style:family="text">
      <style:text-properties officeooo:rsid="02b61928"/>
    </style:style>
    <style:style style:name="T335" style:family="text">
      <style:text-properties officeooo:rsid="02bbbc96"/>
    </style:style>
    <style:style style:name="T336" style:family="text">
      <style:text-properties officeooo:rsid="02bea321"/>
    </style:style>
    <style:style style:name="T337" style:family="text">
      <style:text-properties officeooo:rsid="02c0933e"/>
    </style:style>
    <style:style style:name="T338" style:family="text">
      <style:text-properties officeooo:rsid="02c105d2"/>
    </style:style>
    <style:style style:name="T339" style:family="text">
      <style:text-properties officeooo:rsid="02c22b77"/>
    </style:style>
    <style:style style:name="T340" style:family="text">
      <style:text-properties officeooo:rsid="02c4179b"/>
    </style:style>
    <style:style style:name="T341" style:family="text">
      <style:text-properties officeooo:rsid="02c46c36"/>
    </style:style>
    <style:style style:name="T342" style:family="text">
      <style:text-properties officeooo:rsid="02c77a05"/>
    </style:style>
    <style:style style:name="T343" style:family="text">
      <style:text-properties officeooo:rsid="02caebe4"/>
    </style:style>
    <style:style style:name="T344" style:family="text">
      <style:text-properties officeooo:rsid="02ceda45"/>
    </style:style>
    <style:style style:name="T345" style:family="text">
      <style:text-properties officeooo:rsid="02d184f4"/>
    </style:style>
    <style:style style:name="T346" style:family="text">
      <style:text-properties officeooo:rsid="02d6eabc"/>
    </style:style>
    <style:style style:name="T347" style:family="text">
      <style:text-properties officeooo:rsid="02d87694"/>
    </style:style>
    <style:style style:name="T348" style:family="text">
      <style:text-properties officeooo:rsid="02d93565"/>
    </style:style>
    <style:style style:name="T349" style:family="text">
      <style:text-properties officeooo:rsid="02db814c"/>
    </style:style>
    <style:style style:name="T350" style:family="text">
      <style:text-properties officeooo:rsid="02dc920d"/>
    </style:style>
    <style:style style:name="T351" style:family="text">
      <style:text-properties officeooo:rsid="02dd2b19"/>
    </style:style>
    <style:style style:name="T352" style:family="text">
      <style:text-properties officeooo:rsid="02de82dd"/>
    </style:style>
    <style:style style:name="T353" style:family="text">
      <style:text-properties officeooo:rsid="02e00fd6"/>
    </style:style>
    <style:style style:name="T354" style:family="text">
      <style:text-properties officeooo:rsid="02e20158"/>
    </style:style>
    <style:style style:name="T355" style:family="text">
      <style:text-properties officeooo:rsid="02e52838"/>
    </style:style>
    <style:style style:name="T356" style:family="text">
      <style:text-properties officeooo:rsid="02e5b47d"/>
    </style:style>
    <style:style style:name="T357" style:family="text">
      <style:text-properties officeooo:rsid="02e67a3b"/>
    </style:style>
    <style:style style:name="T358" style:family="text">
      <style:text-properties officeooo:rsid="02e7dd85"/>
    </style:style>
    <style:style style:name="T359" style:family="text">
      <style:text-properties officeooo:rsid="02e9158c"/>
    </style:style>
    <style:style style:name="T360" style:family="text">
      <style:text-properties officeooo:rsid="02eac353"/>
    </style:style>
    <style:style style:name="T361" style:family="text">
      <style:text-properties officeooo:rsid="02ed24ae"/>
    </style:style>
    <style:style style:name="T362" style:family="text">
      <style:text-properties officeooo:rsid="02ee767e"/>
    </style:style>
    <style:style style:name="T363" style:family="text">
      <style:text-properties officeooo:rsid="02efcf31"/>
    </style:style>
    <style:style style:name="T364" style:family="text">
      <style:text-properties officeooo:rsid="02f0c0de"/>
    </style:style>
    <style:style style:name="T365" style:family="text">
      <style:text-properties officeooo:rsid="02f2e21f"/>
    </style:style>
    <style:style style:name="T366" style:family="text">
      <style:text-properties officeooo:rsid="02f3688d"/>
    </style:style>
    <style:style style:name="T367" style:family="text">
      <style:text-properties officeooo:rsid="02f592de"/>
    </style:style>
    <style:style style:name="T368" style:family="text">
      <style:text-properties officeooo:rsid="02f8fadd"/>
    </style:style>
    <style:style style:name="T369" style:family="text">
      <style:text-properties officeooo:rsid="02fab54e"/>
    </style:style>
    <style:style style:name="T370" style:family="text">
      <style:text-properties officeooo:rsid="02fb3f60"/>
    </style:style>
    <style:style style:name="T371" style:family="text">
      <style:text-properties officeooo:rsid="02fcbabe"/>
    </style:style>
    <style:style style:name="T372" style:family="text">
      <style:text-properties officeooo:rsid="02fd969a"/>
    </style:style>
    <style:style style:name="T373" style:family="text">
      <style:text-properties officeooo:rsid="02fe0376"/>
    </style:style>
    <style:style style:name="T374" style:family="text">
      <style:text-properties officeooo:rsid="02ff76fe"/>
    </style:style>
    <style:style style:name="T375" style:family="text">
      <style:text-properties officeooo:rsid="030046e2"/>
    </style:style>
    <style:style style:name="T376" style:family="text">
      <style:text-properties officeooo:rsid="03022d1d"/>
    </style:style>
    <style:style style:name="T377" style:family="text">
      <style:text-properties officeooo:rsid="0303ef5e"/>
    </style:style>
    <style:style style:name="T378" style:family="text">
      <style:text-properties officeooo:rsid="03046fb2"/>
    </style:style>
    <style:style style:name="T379" style:family="text">
      <style:text-properties officeooo:rsid="03064108"/>
    </style:style>
    <style:style style:name="T380" style:family="text">
      <style:text-properties officeooo:rsid="030f8e93"/>
    </style:style>
    <style:style style:name="T381" style:family="text">
      <style:text-properties officeooo:rsid="0310f661"/>
    </style:style>
    <style:style style:name="T382" style:family="text">
      <style:text-properties officeooo:rsid="031277d4"/>
    </style:style>
    <style:style style:name="T383" style:family="text">
      <style:text-properties officeooo:rsid="0312fcc4"/>
    </style:style>
    <style:style style:name="T384" style:family="text">
      <style:text-properties officeooo:rsid="0314c907"/>
    </style:style>
    <style:style style:name="T385" style:family="text">
      <style:text-properties officeooo:rsid="03163ce8"/>
    </style:style>
    <style:style style:name="T386" style:family="text">
      <style:text-properties officeooo:rsid="031819a2"/>
    </style:style>
    <style:style style:name="T387" style:family="text">
      <style:text-properties officeooo:rsid="03188350"/>
    </style:style>
    <style:style style:name="T388" style:family="text">
      <style:text-properties officeooo:rsid="03195f85"/>
    </style:style>
    <style:style style:name="T389" style:family="text">
      <style:text-properties officeooo:rsid="0319edd6"/>
    </style:style>
    <style:style style:name="T390" style:family="text">
      <style:text-properties officeooo:rsid="031bcf75"/>
    </style:style>
    <style:style style:name="T391" style:family="text">
      <style:text-properties officeooo:rsid="031cb3fc"/>
    </style:style>
    <style:style style:name="T392" style:family="text">
      <style:text-properties officeooo:rsid="031cd793"/>
    </style:style>
    <style:style style:name="T393" style:family="text">
      <style:text-properties officeooo:rsid="032080b1"/>
    </style:style>
    <style:style style:name="T394" style:family="text">
      <style:text-properties officeooo:rsid="0324a5dd"/>
    </style:style>
    <style:style style:name="T395" style:family="text">
      <style:text-properties officeooo:rsid="03252e67"/>
    </style:style>
    <style:style style:name="T396" style:family="text">
      <style:text-properties officeooo:rsid="03259599"/>
    </style:style>
    <style:style style:name="T397" style:family="text">
      <style:text-properties officeooo:rsid="0325eac1"/>
    </style:style>
    <style:style style:name="T398" style:family="text">
      <style:text-properties officeooo:rsid="0327bc17"/>
    </style:style>
    <style:style style:name="T399" style:family="text">
      <style:text-properties officeooo:rsid="032943d9"/>
    </style:style>
    <style:style style:name="T400" style:family="text">
      <style:text-properties officeooo:rsid="032c9a73"/>
    </style:style>
    <style:style style:name="T401" style:family="text">
      <style:text-properties officeooo:rsid="032d69bf"/>
    </style:style>
    <style:style style:name="T402" style:family="text">
      <style:text-properties officeooo:rsid="033158a2"/>
    </style:style>
    <style:style style:name="T403" style:family="text">
      <style:text-properties officeooo:rsid="0331da63"/>
    </style:style>
    <style:style style:name="T404" style:family="text">
      <style:text-properties officeooo:rsid="03338d99"/>
    </style:style>
    <style:style style:name="T405" style:family="text">
      <style:text-properties officeooo:rsid="03357423"/>
    </style:style>
    <style:style style:name="T406" style:family="text">
      <style:text-properties officeooo:rsid="033b4b47"/>
    </style:style>
    <style:style style:name="T407" style:family="text">
      <style:text-properties officeooo:rsid="033d6cd5"/>
    </style:style>
    <style:style style:name="T408" style:family="text">
      <style:text-properties officeooo:rsid="033dea4f"/>
    </style:style>
    <style:style style:name="T409" style:family="text">
      <style:text-properties officeooo:rsid="034192ee"/>
    </style:style>
    <style:style style:name="T410" style:family="text">
      <style:text-properties officeooo:rsid="0345faf9"/>
    </style:style>
    <style:style style:name="T411" style:family="text">
      <style:text-properties officeooo:rsid="03475744"/>
    </style:style>
    <style:style style:name="T412" style:family="text">
      <style:text-properties officeooo:rsid="0348e06e"/>
    </style:style>
    <style:style style:name="T413" style:family="text">
      <style:text-properties officeooo:rsid="034a4b42"/>
    </style:style>
    <style:style style:name="T414" style:family="text">
      <style:text-properties officeooo:rsid="034aa78b"/>
    </style:style>
    <style:style style:name="T415" style:family="text">
      <style:text-properties officeooo:rsid="034c25e5"/>
    </style:style>
    <style:style style:name="T416" style:family="text">
      <style:text-properties officeooo:rsid="034e75c0"/>
    </style:style>
    <style:style style:name="T417" style:family="text">
      <style:text-properties officeooo:rsid="034f0e4c"/>
    </style:style>
    <style:style style:name="T418" style:family="text">
      <style:text-properties officeooo:rsid="0350a5b5"/>
    </style:style>
    <style:style style:name="T419" style:family="text">
      <style:text-properties officeooo:rsid="03511110"/>
    </style:style>
    <style:style style:name="T420" style:family="text">
      <style:text-properties officeooo:rsid="0352a33b"/>
    </style:style>
    <style:style style:name="T421" style:family="text">
      <style:text-properties officeooo:rsid="03542469"/>
    </style:style>
    <style:style style:name="T422" style:family="text">
      <style:text-properties officeooo:rsid="0354fed6"/>
    </style:style>
    <style:style style:name="T423" style:family="text">
      <style:text-properties officeooo:rsid="03566a6b"/>
    </style:style>
    <style:style style:name="T424" style:family="text">
      <style:text-properties officeooo:rsid="0357e92b"/>
    </style:style>
    <style:style style:name="T425" style:family="text">
      <style:text-properties officeooo:rsid="0358f4de"/>
    </style:style>
    <style:style style:name="T426" style:family="text">
      <style:text-properties officeooo:rsid="03598608"/>
    </style:style>
    <style:style style:name="T427" style:family="text">
      <style:text-properties officeooo:rsid="035a6ce8"/>
    </style:style>
    <style:style style:name="T428" style:family="text">
      <style:text-properties officeooo:rsid="035d07c8"/>
    </style:style>
    <style:style style:name="T429" style:family="text">
      <style:text-properties officeooo:rsid="035ea621"/>
    </style:style>
    <style:style style:name="T430" style:family="text">
      <style:text-properties officeooo:rsid="03620837"/>
    </style:style>
    <style:style style:name="T431" style:family="text">
      <style:text-properties officeooo:rsid="0362c918"/>
    </style:style>
    <style:style style:name="T432" style:family="text">
      <style:text-properties officeooo:rsid="03633187"/>
    </style:style>
    <style:style style:name="T433" style:family="text">
      <style:text-properties officeooo:rsid="0363feaf"/>
    </style:style>
    <style:style style:name="T434" style:family="text">
      <style:text-properties officeooo:rsid="0364dcde"/>
    </style:style>
    <style:style style:name="T435" style:family="text">
      <style:text-properties officeooo:rsid="0364ebdd"/>
    </style:style>
    <style:style style:name="T436" style:family="text">
      <style:text-properties officeooo:rsid="03682c8f"/>
    </style:style>
    <style:style style:name="T437" style:family="text">
      <style:text-properties officeooo:rsid="0368e650"/>
    </style:style>
    <style:style style:name="T438" style:family="text">
      <style:text-properties officeooo:rsid="0369d67a"/>
    </style:style>
    <style:style style:name="T439" style:family="text">
      <style:text-properties officeooo:rsid="036ae07b"/>
    </style:style>
    <style:style style:name="T440" style:family="text">
      <style:text-properties officeooo:rsid="036c28de"/>
    </style:style>
    <style:style style:name="T441" style:family="text">
      <style:text-properties officeooo:rsid="036d5a91"/>
    </style:style>
    <style:style style:name="T442" style:family="text">
      <style:text-properties officeooo:rsid="036ffe92"/>
    </style:style>
    <style:style style:name="T443" style:family="text">
      <style:text-properties officeooo:rsid="03715fd1"/>
    </style:style>
    <style:style style:name="T444" style:family="text">
      <style:text-properties officeooo:rsid="03722fdc"/>
    </style:style>
    <style:style style:name="T445" style:family="text">
      <style:text-properties officeooo:rsid="03768f31"/>
    </style:style>
    <style:style style:name="T446" style:family="text">
      <style:text-properties officeooo:rsid="0376c958"/>
    </style:style>
    <style:style style:name="T447" style:family="text">
      <style:text-properties officeooo:rsid="0377af81"/>
    </style:style>
    <style:style style:name="T448" style:family="text">
      <style:text-properties officeooo:rsid="03781abe"/>
    </style:style>
    <style:style style:name="T449" style:family="text">
      <style:text-properties officeooo:rsid="037a156a"/>
    </style:style>
    <style:style style:name="T450" style:family="text">
      <style:text-properties officeooo:rsid="037ba93b"/>
    </style:style>
    <style:style style:name="T451" style:family="text">
      <style:text-properties officeooo:rsid="037d0e1e"/>
    </style:style>
    <style:style style:name="T452" style:family="text">
      <style:text-properties officeooo:rsid="037f7bfa"/>
    </style:style>
    <style:style style:name="T453" style:family="text">
      <style:text-properties officeooo:rsid="0381a53c"/>
    </style:style>
    <style:style style:name="T454" style:family="text">
      <style:text-properties officeooo:rsid="038348e6"/>
    </style:style>
    <style:style style:name="T455" style:family="text">
      <style:text-properties fo:font-variant="normal" fo:text-transform="none" fo:color="#404040" loext:opacity="100%" fo:letter-spacing="normal"/>
    </style:style>
    <style:style style:name="T456" style:family="text">
      <style:text-properties fo:font-variant="normal" fo:text-transform="none" fo:color="#404040" loext:opacity="100%" fo:letter-spacing="normal" officeooo:rsid="038348e6"/>
    </style:style>
    <style:style style:name="T457" style:family="text">
      <style:text-properties fo:font-variant="normal" fo:text-transform="none" fo:color="#404040" loext:opacity="100%" fo:letter-spacing="normal" officeooo:rsid="036ae07b"/>
    </style:style>
    <style:style style:name="T458" style:family="text">
      <style:text-properties fo:font-variant="normal" fo:text-transform="none" fo:color="#404040" loext:opacity="100%" fo:letter-spacing="normal" fo:font-weight="bold" style:font-weight-asian="bold" style:font-weight-complex="bold"/>
    </style:style>
    <style:style style:name="T459" style:family="text">
      <style:text-properties fo:font-variant="normal" fo:text-transform="none" fo:color="#404040" loext:opacity="100%" fo:letter-spacing="normal" fo:font-weight="bold" officeooo:rsid="038348e6" style:font-weight-asian="bold" style:font-weight-complex="bold"/>
    </style:style>
    <style:style style:name="T460" style:family="text">
      <style:text-properties fo:font-variant="normal" fo:text-transform="none" fo:color="#404040" loext:opacity="100%" fo:letter-spacing="normal" fo:font-weight="bold" officeooo:rsid="0396cd3d" style:font-weight-asian="bold" style:font-weight-complex="bold"/>
    </style:style>
    <style:style style:name="T461" style:family="text">
      <style:text-properties fo:font-variant="normal" fo:text-transform="none" fo:color="#404040" loext:opacity="100%" fo:letter-spacing="normal" officeooo:rsid="038a0833"/>
    </style:style>
    <style:style style:name="T462" style:family="text">
      <style:text-properties fo:font-variant="normal" fo:text-transform="none" fo:color="#404040" loext:opacity="100%" fo:letter-spacing="normal" officeooo:rsid="038a7561"/>
    </style:style>
    <style:style style:name="T463" style:family="text">
      <style:text-properties fo:font-variant="normal" fo:text-transform="none" fo:color="#404040" loext:opacity="100%" fo:letter-spacing="normal" officeooo:rsid="0396745c"/>
    </style:style>
    <style:style style:name="T464" style:family="text">
      <style:text-properties fo:font-variant="normal" fo:text-transform="none" fo:color="#404040" loext:opacity="100%" fo:letter-spacing="normal" officeooo:rsid="0396cd3d"/>
    </style:style>
    <style:style style:name="T465" style:family="text">
      <style:text-properties fo:font-variant="normal" fo:text-transform="none" fo:color="#404040" loext:opacity="100%" fo:letter-spacing="normal" officeooo:rsid="0397786a"/>
    </style:style>
    <style:style style:name="T466" style:family="text">
      <style:text-properties fo:font-variant="normal" fo:text-transform="none" fo:color="#404040" loext:opacity="100%" fo:letter-spacing="normal" officeooo:rsid="0397f5b4"/>
    </style:style>
    <style:style style:name="T467" style:family="text">
      <style:text-properties fo:font-variant="normal" fo:text-transform="none" fo:color="#404040" loext:opacity="100%" fo:letter-spacing="normal" officeooo:rsid="03980688"/>
    </style:style>
    <style:style style:name="T468" style:family="text">
      <style:text-properties fo:font-variant="normal" fo:text-transform="none" fo:color="#404040" loext:opacity="100%" fo:letter-spacing="normal" officeooo:rsid="0398471c"/>
    </style:style>
    <style:style style:name="T469" style:family="text">
      <style:text-properties fo:font-variant="normal" fo:text-transform="none" fo:color="#404040" loext:opacity="100%" fo:letter-spacing="normal" officeooo:rsid="039bbb72"/>
    </style:style>
    <style:style style:name="T470" style:family="text">
      <style:text-properties fo:font-variant="normal" fo:text-transform="none" fo:color="#404040" loext:opacity="100%" fo:letter-spacing="normal" officeooo:rsid="039c96ba"/>
    </style:style>
    <style:style style:name="T471" style:family="text">
      <style:text-properties fo:font-variant="normal" fo:text-transform="none" fo:color="#404040" loext:opacity="100%" fo:letter-spacing="normal" officeooo:rsid="039d49a3"/>
    </style:style>
    <style:style style:name="T472" style:family="text">
      <style:text-properties officeooo:rsid="03848180"/>
    </style:style>
    <style:style style:name="T473" style:family="text">
      <style:text-properties officeooo:rsid="038716e0"/>
    </style:style>
    <style:style style:name="T474" style:family="text">
      <style:text-properties officeooo:rsid="038a0833"/>
    </style:style>
    <style:style style:name="T475" style:family="text">
      <style:text-properties officeooo:rsid="0397f5b4"/>
    </style:style>
    <style:style style:name="T476" style:family="text">
      <style:text-properties officeooo:rsid="03980688"/>
    </style:style>
    <style:style style:name="T477" style:family="text">
      <style:text-properties officeooo:rsid="03999ab4"/>
    </style:style>
    <style:style style:name="T478" style:family="text">
      <style:text-properties officeooo:rsid="039a861e"/>
    </style:style>
    <style:style style:name="T479" style:family="text">
      <style:text-properties officeooo:rsid="039c96ba"/>
    </style:style>
    <style:style style:name="T480" style:family="text">
      <style:text-properties officeooo:rsid="039d49a3"/>
    </style:style>
    <style:style style:name="T481" style:family="text">
      <style:text-properties officeooo:rsid="03a337f2"/>
    </style:style>
    <style:style style:name="T482" style:family="text">
      <style:text-properties officeooo:rsid="03a34191"/>
    </style:style>
    <style:style style:name="T483" style:family="text">
      <style:text-properties officeooo:rsid="03a74945"/>
    </style:style>
    <style:style style:name="T484" style:family="text">
      <style:text-properties officeooo:rsid="03a7527b"/>
    </style:style>
    <style:style style:name="T485" style:family="text">
      <style:text-properties officeooo:rsid="03a82f38"/>
    </style:style>
    <style:style style:name="T486" style:family="text">
      <style:text-properties officeooo:rsid="03aa03c3"/>
    </style:style>
    <style:style style:name="T487" style:family="text">
      <style:text-properties officeooo:rsid="03ac884b"/>
    </style:style>
    <style:style style:name="T488" style:family="text">
      <style:text-properties officeooo:rsid="03ae6e70"/>
    </style:style>
    <style:style style:name="T489" style:family="text">
      <style:text-properties officeooo:rsid="03aed037"/>
    </style:style>
    <style:style style:name="T490" style:family="text">
      <style:text-properties officeooo:rsid="03b082ae"/>
    </style:style>
    <style:style style:name="T491" style:family="text">
      <style:text-properties officeooo:rsid="03b1e0de"/>
    </style:style>
    <style:style style:name="T492" style:family="text">
      <style:text-properties officeooo:rsid="03b1eeed"/>
    </style:style>
    <style:style style:name="T493" style:family="text">
      <style:text-properties officeooo:rsid="03b2b877"/>
    </style:style>
    <style:style style:name="T494" style:family="text">
      <style:text-properties officeooo:rsid="03b362cd"/>
    </style:style>
    <style:style style:name="T495" style:family="text">
      <style:text-properties officeooo:rsid="03b63608"/>
    </style:style>
    <style:style style:name="T496" style:family="text">
      <style:text-properties officeooo:rsid="03b8331a"/>
    </style:style>
    <style:style style:name="T497" style:family="text">
      <style:text-properties officeooo:rsid="03b87c44"/>
    </style:style>
    <style:style style:name="T498" style:family="text">
      <style:text-properties officeooo:rsid="03b9a2eb"/>
    </style:style>
    <style:style style:name="T499" style:family="text">
      <style:text-properties officeooo:rsid="03bb4c90"/>
    </style:style>
    <style:style style:name="T500" style:family="text">
      <style:text-properties officeooo:rsid="03bcbd4d"/>
    </style:style>
    <style:style style:name="T501" style:family="text">
      <style:text-properties officeooo:rsid="03c13dfc"/>
    </style:style>
    <style:style style:name="T502" style:family="text">
      <style:text-properties officeooo:rsid="03c2857a"/>
    </style:style>
    <style:style style:name="T503" style:family="text">
      <style:text-properties officeooo:rsid="03c44ca4"/>
    </style:style>
    <style:style style:name="T504" style:family="text">
      <style:text-properties officeooo:rsid="03c5692a"/>
    </style:style>
    <style:style style:name="T505" style:family="text">
      <style:text-properties officeooo:rsid="03c935fd"/>
    </style:style>
    <style:style style:name="T506" style:family="text">
      <style:text-properties officeooo:rsid="03ce5325"/>
    </style:style>
    <style:style style:name="T507" style:family="text">
      <style:text-properties officeooo:rsid="03cfa467"/>
    </style:style>
    <style:style style:name="T508" style:family="text">
      <style:text-properties officeooo:rsid="03d1839f"/>
    </style:style>
    <style:style style:name="T509" style:family="text">
      <style:text-properties officeooo:rsid="03d3972d"/>
    </style:style>
    <style:style style:name="T510" style:family="text">
      <style:text-properties officeooo:rsid="03d54a28"/>
    </style:style>
    <style:style style:name="T511" style:family="text">
      <style:text-properties officeooo:rsid="03d675a6"/>
    </style:style>
    <style:style style:name="T512" style:family="text">
      <style:text-properties officeooo:rsid="03d83db3"/>
    </style:style>
    <style:style style:name="T513" style:family="text">
      <style:text-properties officeooo:rsid="03dbcf27"/>
    </style:style>
    <style:style style:name="T514" style:family="text">
      <style:text-properties officeooo:rsid="03dc7e5e"/>
    </style:style>
    <style:style style:name="T515" style:family="text">
      <style:text-properties officeooo:rsid="03dd45b5"/>
    </style:style>
    <style:style style:name="T516" style:family="text">
      <style:text-properties officeooo:rsid="03dd85a8"/>
    </style:style>
    <style:style style:name="T517" style:family="text">
      <style:text-properties officeooo:rsid="03dedf2f"/>
    </style:style>
    <style:style style:name="T518" style:family="text">
      <style:text-properties officeooo:rsid="03e0266e"/>
    </style:style>
    <style:style style:name="T519" style:family="text">
      <style:text-properties officeooo:rsid="03e13dce"/>
    </style:style>
    <style:style style:name="T520" style:family="text">
      <style:text-properties officeooo:rsid="01c261d7"/>
    </style:style>
    <style:style style:name="T521" style:family="text">
      <style:text-properties officeooo:rsid="01ce2d0b"/>
    </style:style>
    <style:style style:name="T522" style:family="text">
      <style:text-properties officeooo:rsid="03e72ab9"/>
    </style:style>
    <style:style style:name="T523" style:family="text">
      <style:text-properties officeooo:rsid="03e9db9e"/>
    </style:style>
    <style:style style:name="T524" style:family="text">
      <style:text-properties officeooo:rsid="03ea2148"/>
    </style:style>
    <style:style style:name="T525" style:family="text">
      <style:text-properties officeooo:rsid="03ebefc3"/>
    </style:style>
    <style:style style:name="T526" style:family="text">
      <style:text-properties officeooo:rsid="03ed6248"/>
    </style:style>
    <style:style style:name="T527" style:family="text">
      <style:text-properties officeooo:rsid="03e5e1e9"/>
    </style:style>
    <style:style style:name="T528" style:family="text">
      <style:text-properties officeooo:rsid="03ef9c24"/>
    </style:style>
    <style:style style:name="T529" style:family="text">
      <style:text-properties officeooo:rsid="03f0877d"/>
    </style:style>
    <style:style style:name="T530" style:family="text">
      <style:text-properties officeooo:rsid="03f1286c"/>
    </style:style>
    <style:style style:name="T531" style:family="text">
      <style:text-properties officeooo:rsid="03f306ae"/>
    </style:style>
    <style:style style:name="T532" style:family="text">
      <style:text-properties officeooo:rsid="03f5165e"/>
    </style:style>
    <style:style style:name="T533" style:family="text">
      <style:text-properties officeooo:rsid="03f6f752"/>
    </style:style>
    <style:style style:name="T534" style:family="text">
      <style:text-properties officeooo:rsid="03f88351"/>
    </style:style>
    <style:style style:name="T535" style:family="text">
      <style:text-properties officeooo:rsid="03fa0815"/>
    </style:style>
    <style:style style:name="T536" style:family="text">
      <style:text-properties officeooo:rsid="03fa9d80"/>
    </style:style>
    <style:style style:name="T537" style:family="text">
      <style:text-properties officeooo:rsid="03fad3bf"/>
    </style:style>
    <style:style style:name="T538" style:family="text">
      <style:text-properties officeooo:rsid="03ff6ea9"/>
    </style:style>
    <style:style style:name="T539" style:family="text">
      <style:text-properties officeooo:rsid="0402baf2"/>
    </style:style>
    <style:style style:name="T540" style:family="text">
      <style:text-properties officeooo:rsid="04048886"/>
    </style:style>
    <style:style style:name="T541" style:family="text">
      <style:text-properties officeooo:rsid="0405ca6a"/>
    </style:style>
    <style:style style:name="T542" style:family="text">
      <style:text-properties officeooo:rsid="0406c5ee"/>
    </style:style>
    <style:style style:name="T543" style:family="text">
      <style:text-properties officeooo:rsid="040cfa88"/>
    </style:style>
    <style:style style:name="T544" style:family="text">
      <style:text-properties officeooo:rsid="0416c8c5"/>
    </style:style>
    <style:style style:name="T545" style:family="text">
      <style:text-properties officeooo:rsid="041a1ba0"/>
    </style:style>
    <style:style style:name="T546" style:family="text">
      <style:text-properties officeooo:rsid="041c0f7b"/>
    </style:style>
    <style:style style:name="T547" style:family="text">
      <style:text-properties officeooo:rsid="0432e750"/>
    </style:style>
    <style:style style:name="T548" style:family="text">
      <style:text-properties officeooo:rsid="04361788"/>
    </style:style>
    <style:style style:name="T549" style:family="text">
      <style:text-properties officeooo:rsid="0437da37"/>
    </style:style>
    <style:style style:name="T550" style:family="text">
      <style:text-properties officeooo:rsid="04392cc6"/>
    </style:style>
    <style:style style:name="T551" style:family="text">
      <style:text-properties officeooo:rsid="043c6333"/>
    </style:style>
    <style:style style:name="T552" style:family="text">
      <style:text-properties officeooo:rsid="04437d40"/>
    </style:style>
    <style:style style:name="T553" style:family="text">
      <style:text-properties officeooo:rsid="0444cc1e"/>
    </style:style>
    <style:style style:name="T554" style:family="text">
      <style:text-properties officeooo:rsid="04466d32"/>
    </style:style>
    <style:style style:name="T555" style:family="text">
      <style:text-properties officeooo:rsid="04484c73"/>
    </style:style>
    <style:style style:name="T556" style:family="text">
      <style:text-properties officeooo:rsid="044acbeb"/>
    </style:style>
    <style:style style:name="T557" style:family="text">
      <style:text-properties officeooo:rsid="044c7169"/>
    </style:style>
    <style:style style:name="T558" style:family="text">
      <style:text-properties officeooo:rsid="044dfa7b"/>
    </style:style>
    <style:style style:name="T559" style:family="text">
      <style:text-properties officeooo:rsid="04503c70"/>
    </style:style>
    <style:style style:name="T560" style:family="text">
      <style:text-properties officeooo:rsid="04530e66"/>
    </style:style>
    <style:style style:name="T561" style:family="text">
      <style:text-properties officeooo:rsid="04531743"/>
    </style:style>
    <style:style style:name="T562" style:family="text">
      <style:text-properties officeooo:rsid="045463a2"/>
    </style:style>
    <style:style style:name="T563" style:family="text">
      <style:text-properties officeooo:rsid="0455a8ab"/>
    </style:style>
    <style:style style:name="T564" style:family="text">
      <style:text-properties officeooo:rsid="045b3926"/>
    </style:style>
    <style:style style:name="T565" style:family="text">
      <style:text-properties officeooo:rsid="045c3964"/>
    </style:style>
    <style:style style:name="T566" style:family="text">
      <style:text-properties officeooo:rsid="045c5a77"/>
    </style:style>
    <style:style style:name="T567" style:family="text">
      <style:text-properties officeooo:rsid="045d7c6d"/>
    </style:style>
    <style:style style:name="T568" style:family="text">
      <style:text-properties style:font-name="Transliteration" officeooo:rsid="045d7c6d"/>
    </style:style>
    <style:style style:name="T569" style:family="text">
      <style:text-properties style:font-name="Transliteration" officeooo:rsid="0475992f"/>
    </style:style>
    <style:style style:name="T570" style:family="text">
      <style:text-properties officeooo:rsid="045ef2e4"/>
    </style:style>
    <style:style style:name="T571" style:family="text">
      <style:text-properties officeooo:rsid="0460e5f1"/>
    </style:style>
    <style:style style:name="T572" style:family="text">
      <style:text-properties officeooo:rsid="04639c82"/>
    </style:style>
    <style:style style:name="T573" style:family="text">
      <style:text-properties officeooo:rsid="04656c6e"/>
    </style:style>
    <style:style style:name="T574" style:family="text">
      <style:text-properties officeooo:rsid="0468ec56"/>
    </style:style>
    <style:style style:name="T575" style:family="text">
      <style:text-properties officeooo:rsid="04696f2c"/>
    </style:style>
    <style:style style:name="T576" style:family="text">
      <style:text-properties officeooo:rsid="046acc9c"/>
    </style:style>
    <style:style style:name="T577" style:family="text">
      <style:text-properties officeooo:rsid="046b8011"/>
    </style:style>
    <style:style style:name="T578" style:family="text">
      <style:text-properties officeooo:rsid="046bf2ba"/>
    </style:style>
    <style:style style:name="T579" style:family="text">
      <style:text-properties officeooo:rsid="046cf6c3"/>
    </style:style>
    <style:style style:name="T580" style:family="text">
      <style:text-properties officeooo:rsid="046e2352"/>
    </style:style>
    <style:style style:name="T581" style:family="text">
      <style:text-properties officeooo:rsid="04711b0c"/>
    </style:style>
    <style:style style:name="T582" style:family="text">
      <style:text-properties officeooo:rsid="04734573"/>
    </style:style>
    <style:style style:name="T583" style:family="text">
      <style:text-properties officeooo:rsid="0474a264"/>
    </style:style>
    <style:style style:name="T584" style:family="text">
      <style:text-properties officeooo:rsid="0475992f"/>
    </style:style>
    <style:style style:name="T585" style:family="text">
      <style:text-properties officeooo:rsid="04761545"/>
    </style:style>
    <style:style style:name="T586" style:family="text">
      <style:text-properties officeooo:rsid="0477128b"/>
    </style:style>
    <style:style style:name="T587" style:family="text">
      <style:text-properties officeooo:rsid="04776d7e"/>
    </style:style>
    <style:style style:name="T588" style:family="text">
      <style:text-properties officeooo:rsid="047ebe2d"/>
    </style:style>
    <style:style style:name="T589" style:family="text">
      <style:text-properties officeooo:rsid="047fea87"/>
    </style:style>
    <style:style style:name="T590" style:family="text">
      <style:text-properties officeooo:rsid="0484145c"/>
    </style:style>
    <style:style style:name="T591" style:family="text">
      <style:text-properties officeooo:rsid="04841c7c"/>
    </style:style>
    <style:style style:name="T592" style:family="text">
      <style:text-properties officeooo:rsid="04869a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6" text:outline-level="1"><text:span text:style-name="T269">Bentresh Stela</text:span> (<text:span text:style-name="T269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8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2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9">References</text:p>
      <text:p text:style-name="P5"/>
      <text:p text:style-name="P12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8"/>
      <text:p text:style-name="P38"><text:span text:style-name="T3">[B]<text:tab/><text:tab/>M. Broze. </text:span><text:span text:style-name="T43">La princesse de Bakhtan : Essai d’analyse stylistique. </text:span><text:span text:style-name="T152">Monographies Reine Élisabeth. Fondation gÉyptologique Reine Élisabeth. Bruxelles (1989).</text:span></text:p>
      <text:p text:style-name="P7"/>
      <text:p text:style-name="P13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4">Attalus</text:span><text:span text:style-name="T153">. </text:span><text:span text:style-name="T154">Last updated August 1, 2020. Accessed October 18, 2025.</text:span><text:span text:style-name="T153"> </text:span><text:a xlink:type="simple" xlink:href="https://www.attalus.org/egypt/bentresh_stela.html" text:style-name="Internet_20_link" text:visited-style-name="Visited_20_Internet_20_Link"><text:span text:style-name="T153">https://www.attalus.org/egypt/bentresh_stela.html</text:span></text:a></text:p>
      <text:p text:style-name="P39"/>
      <text:p text:style-name="P95"><text:span text:style-name="T153">[</text:span><text:span text:style-name="T152">DB]<text:tab/><text:tab/></text:span><text:span text:style-name="T157">A story designed to make propaganda for the cult of Khonsu (The Bentresh-Stela…). </text:span><text:span text:style-name="T158">In</text:span><text:span text:style-name="T157"> </text:span><text:span text:style-name="T43">Egyptian Reading Book, Vol. </text:span><text:span text:style-name="T45">I</text:span><text:span text:style-name="T43">: Exercises and Middle Egyptian Texts</text:span><text:span text:style-name="T152">. Ed. A. De Buck. </text:span><text:span text:style-name="T155">Nederlandsch Archaeologisch-Philologisch Instituut. </text:span><text:span text:style-name="T152">Leyden (1948). </text:span><text:span text:style-name="T157">106–109.</text:span></text:p>
      <text:p text:style-name="P41"/>
      <text:p text:style-name="P16"><text:span text:style-name="T3">[F]<text:tab/><text:tab/>R. O. Faulkner. </text:span><text:span text:style-name="T43">A Concise Dictionary of Middle Egyptian</text:span><text:span text:style-name="T3">. Griffith Institute, Ashmolean Museum, Oxford. Reprinted at the University Press, Oxford (1981).</text:span></text:p>
      <text:p text:style-name="P6"/>
      <text:p text:style-name="P96"><text:span text:style-name="T157">[G]<text:tab/><text:tab/>A. Gardiner. </text:span><text:span text:style-name="T46">Egyptian Grammar: Being an Introduction to the Study of Hieroglyphs</text:span><text:span text:style-name="T157">. 3rd Edition, Revised. Griffith Institute, Ashmolean Museum, Oxford. Printed at the University Press, Cambridge (2007).</text:span></text:p>
      <text:p text:style-name="P42"/>
      <text:p text:style-name="P149"><text:span text:style-name="T157">[</text:span><text:span text:style-name="T152">H]<text:tab/><text:tab/>J. </text:span><text:span text:style-name="T186">E.</text:span><text:span text:style-name="T152"> Hoch. </text:span><text:span text:style-name="T43">Middle Egyptian Grammar</text:span><text:span text:style-name="T152">. </text:span><text:span text:style-name="T186">Benben Publications. Mississauga (1997).</text:span></text:p>
      <text:p text:style-name="P41"/>
      <text:p text:style-name="P85"><text:soft-page-break/><text:span text:style-name="T157">[</text:span><text:span text:style-name="T152">L]<text:tab/><text:tab/>III. Two Pseudepigrapha: The Bentresh Stela. In </text:span><text:span text:style-name="T43">Ancient Egyptian Literature, </text:span><text:span text:style-name="T45">Vol. III: The Late Period. </text:span><text:span text:style-name="T159">Trans. M. Lichtheim. University of California Press. Berkeley (1980). 90</text:span><text:span text:style-name="T157">–</text:span><text:span text:style-name="T159">93.</text:span></text:p>
      <text:p text:style-name="P40"/>
      <text:p text:style-name="P14"><text:span text:style-name="T156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156">https://mqtrinh.github.io/other/egyptian/middle-egyptian/bentresh-stela_trans-nederhof.pdf</text:span></text:a></text:p>
      <text:p text:style-name="P5"/>
      <text:p text:style-name="P12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21"><text:span text:style-name="T270">1</text:span><text:span text:style-name="T295">1</text:span>/1<text:span text:style-name="T295">7</text:span>/25</text:p>
      <text:p text:style-name="P20"/>
      <text:p text:style-name="P20"/>
      <text:p text:style-name="P15"><text:span text:style-name="T101">(1)</text:span><text:span text:style-name="T78"> @</text:span><text:span text:style-name="T79">r </text:span><text:span text:style-name="T86">K</text:span><text:span text:style-name="T89">A </text:span><text:span text:style-name="T86">N</text:span><text:span text:style-name="T84">x</text:span><text:span text:style-name="T85">t</text:span></text:p>
      <text:p text:style-name="P15"><text:span text:style-name="T91">t</text:span><text:span text:style-name="T86">wt </text:span><text:span text:style-name="T91">x</text:span><text:span text:style-name="T85">a</text:span><text:span text:style-name="T80">.</text:span><text:span text:style-name="T81">w</text:span></text:p>
      <text:p text:style-name="P15"><text:span text:style-name="T91">D</text:span><text:span text:style-name="T85">d</text:span><text:span text:style-name="T81"> </text:span><text:span text:style-name="T91">n</text:span><text:span text:style-name="T85">s.</text:span><text:span text:style-name="T87">y</text:span><text:span text:style-name="T92">(t)</text:span><text:span text:style-name="T81"> mi </text:span><text:span text:style-name="T92">(I)</text:span><text:span text:style-name="T85">tm</text:span></text:p>
      <text:p text:style-name="P35"/>
      <text:p text:style-name="P17"><text:span text:style-name="T81">@r </text:span><text:span text:style-name="T88">Nbw</text:span></text:p>
      <text:p text:style-name="P17"><text:span text:style-name="T91">ws</text:span><text:span text:style-name="T92">(</text:span><text:span text:style-name="T91">r</text:span><text:span text:style-name="T92">)</text:span><text:span text:style-name="T91"> x</text:span><text:span text:style-name="T81">pS</text:span><text:span text:style-name="T88">w</text:span><text:span text:style-name="T81"> </text:span><text:span text:style-name="T91">d</text:span><text:span text:style-name="T82">r </text:span><text:span text:style-name="T93">P</text:span><text:span text:style-name="T91">Dt</text:span><text:span text:style-name="T82"> </text:span><text:span text:style-name="T91">9</text:span></text:p>
      <text:p text:style-name="P36"/>
      <text:p text:style-name="P15"><text:span text:style-name="T82">Nsw Bity </text:span><text:span text:style-name="T88">N</text:span><text:span text:style-name="T83">b </text:span><text:span text:style-name="T88">&amp;</text:span><text:span text:style-name="T83">A.wy </text:span></text:p>
      <text:p text:style-name="P91"><text:span text:style-name="T83">W</text:span><text:span text:style-name="T78">sr-MaA.t-Ra </text:span><text:span text:style-name="T94">%tp-</text:span><text:span text:style-name="T95">(n)</text:span><text:span text:style-name="T94">-Ra</text:span></text:p>
      <text:p text:style-name="P37"/>
      <text:p text:style-name="P92"><text:span text:style-name="T96">%</text:span><text:span text:style-name="T78">A Ra</text:span></text:p>
      <text:p text:style-name="P93"><text:span text:style-name="T78">xt=f Mri-Imn Ra-</text:span><text:span text:style-name="T90">m</text:span><text:span text:style-name="T78">s-</text:span><text:span text:style-name="T90">s(w)</text:span></text:p>
      <text:p text:style-name="P32"/>
      <text:p text:style-name="P93"><text:span text:style-name="T78">Imn-Ra </text:span><text:span text:style-name="T102">(2)</text:span><text:span text:style-name="T99"> </text:span><text:span text:style-name="T78">Nb </text:span><text:span text:style-name="T100">Nsw.t</text:span><text:span text:style-name="T97"> PsD.t Nb.wt </text:span><text:span text:style-name="T78">WAs.t</text:span></text:p>
      <text:p text:style-name="P31">mri nTr nfr Imn</text:p>
      <text:p text:style-name="P91"><text:span text:style-name="T78">ms.</text:span><text:span text:style-name="T98">[</text:span><text:span text:style-name="T78">ti</text:span><text:span text:style-name="T98">]</text:span><text:span text:style-name="T78">w Ra-@r-Ax.ty</text:span></text:p>
      <text:p text:style-name="P31">pr.<text:span text:style-name="T288">w</text:span> ax n <text:span text:style-name="T286">N</text:span>b <text:span text:style-name="T286">+</text:span>r.<text:span text:style-name="T287">(</text:span>t<text:span text:style-name="T287">)</text:span></text:p>
      <text:p text:style-name="P31">wtt n KA-<text:span text:style-name="T285">Mwt=f</text:span></text:p>
      <text:p text:style-name="P33">nsw.t n Km.t <text:span text:style-name="T289">HqA</text:span> _Sr.wt</text:p>
      <text:p text:style-name="P33">iTy <text:span text:style-name="T61">(3)</text:span><text:span text:style-name="T290"> </text:span><text:span text:style-name="T291">iT</text:span> <text:span text:style-name="T291">PDt</text:span> 9</text:p>
      <text:p text:style-name="P34">pri m <text:span text:style-name="T292">X</text:span>t</text:p>
      <text:p text:style-name="P34">s<text:span text:style-name="T293">r(w) </text:span>n=f nx.tw</text:p>
      <text:p text:style-name="P33"><text:span text:style-name="T294">w</text:span>D n=f pri a m swH.t</text:p>
      <text:p text:style-name="P33"/>
      <text:p text:style-name="P30"/>
      <text:p text:style-name="P15"><text:span text:style-name="T56">(</text:span><text:span text:style-name="T57">1</text:span><text:span text:style-name="T56">) </text:span><text:span text:style-name="T11">Horus, </text:span><text:span text:style-name="T19">M</text:span><text:span text:style-name="T15">ighty</text:span><text:span text:style-name="T12"> Bull,</text:span></text:p>
      <text:p text:style-name="P15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272">nfr Hr</text:span><text:span text:style-name="T14">]</text:span><text:span text:style-name="T13">,</text:span></text:p>
      <text:p text:style-name="P15"><text:span text:style-name="T19">e</text:span><text:span text:style-name="T14">nduring of </text:span><text:span text:style-name="T19">k</text:span><text:span text:style-name="T14">ingship [</text:span><text:span text:style-name="T274">nfr Hr</text:span><text:span text:style-name="T14">], </text:span><text:span text:style-name="T16">like Atum,</text:span></text:p>
      <text:p text:style-name="P8"/>
      <text:p text:style-name="P8">Golden Horus,</text:p>
      <text:p text:style-name="P97"><text:span text:style-name="T16">s</text:span><text:span text:style-name="T3">trong </text:span><text:span text:style-name="T19">[F 68] </text:span><text:span text:style-name="T3">of arm </text:span><text:span text:style-name="T14">[</text:span><text:span text:style-name="T274">nfr Hr</text:span><text:span text:style-name="T14">] </text:span><text:span text:style-name="T20">[who] drives away the Nine Bows [</text:span><text:span text:style-name="T273">pD.t psD.t</text:span><text:span text:style-name="T20">],</text:span></text:p>
      <text:p text:style-name="P8"/>
      <text:p text:style-name="P8">Dual King, Lord of the Two Lands,</text:p>
      <text:p text:style-name="P88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9"/>
      <text:p text:style-name="P9">Son of Re,</text:p>
      <text:p text:style-name="P90"><text:span text:style-name="T22">h</text:span><text:span text:style-name="T3">is </text:span><text:span text:style-name="T42">presence [F 200],</text:span><text:span text:style-name="T3"> Meri</text:span><text:span text:style-name="T21">a</text:span><text:span text:style-name="T3">mun Ra</text:span><text:span text:style-name="T21">m</text:span><text:span text:style-name="T3">eses,</text:span></text:p>
      <text:p text:style-name="P10"/>
      <text:p text:style-name="P89"><text:span text:style-name="T17">Amun-Re, </text:span><text:span text:style-name="T58">(2)</text:span><text:span text:style-name="T30"> </text:span><text:span text:style-name="T17">Lord of </text:span><text:span text:style-name="T39">t</text:span><text:span text:style-name="T23">he Thrones </text:span><text:span text:style-name="T39">[</text:span><text:span text:style-name="T49">cf.</text:span><text:span text:style-name="T39"> </text:span><text:span text:style-name="T41">G 627 and </text:span><text:span text:style-name="T39">TLA 26200</text:span><text:span text:style-name="T40">]</text:span><text:span text:style-name="T39"> </text:span><text:span text:style-name="T23">[of] the Ennead</text:span><text:span text:style-name="T17">, </text:span><text:span text:style-name="T23">of the Ladies of Thebes</text:span><text:span text:style-name="T23"><text:note text:id="ftn1" text:note-class="footnote"><text:note-citation>1</text:note-citation><text:note-body><text:p text:style-name="P86"><text:span text:style-name="T277">W</text:span><text:span text:style-name="T271">As.t </text:span><text:span text:style-name="T277">=</text:span> Waset <text:span text:style-name="T335">=</text:span> “<text:span text:style-name="T335">The Scepter”</text:span>.</text:p></text:note-body></text:note></text:span><text:span text:style-name="T27">,</text:span></text:p>
      <text:p text:style-name="P11">beloved of the good god, Amun,</text:p>
      <text:p text:style-name="P91"><text:span text:style-name="T3">bo</text:span><text:span text:style-name="T24">[</text:span><text:span text:style-name="T3">r</text:span><text:span text:style-name="T24">]</text:span><text:span text:style-name="T3">n of Re-Horakhty,</text:span></text:p>
      <text:p text:style-name="P91"><text:span text:style-name="T25">seed [F 91] of the </text:span><text:span text:style-name="T47">akh</text:span><text:span text:style-name="T29"> </text:span><text:span text:style-name="T25">of</text:span><text:span text:style-name="T18"> the Lord of </text:span><text:span text:style-name="T25">Ancestors[?</text:span><text:span text:style-name="T26"> F 324</text:span><text:span text:style-name="T25">],</text:span></text:p>
      <text:p text:style-name="P94"><text:span text:style-name="T3">begotten of Ka</text:span><text:span text:style-name="T24">m</text:span><text:span text:style-name="T3">u</text:span><text:span text:style-name="T24">t</text:span><text:span text:style-name="T3">ef,</text:span></text:p>
      <text:p text:style-name="P98"><text:span text:style-name="T28">k</text:span><text:span text:style-name="T3">ing of the Black Land</text:span><text:span text:style-name="T3"><text:note text:id="ftn2" text:note-class="footnote"><text:note-citation>2</text:note-citation><text:note-body><text:p text:style-name="P87"><text:span text:style-name="T271">Km.t</text:span> = Kemet.</text:p></text:note-body></text:note></text:span><text:span text:style-name="T3">, </text:span><text:span text:style-name="T36">ruler </text:span><text:span text:style-name="T3">of the Red Land</text:span><text:span text:style-name="T3"><text:note text:id="ftn3" text:note-class="footnote"><text:note-citation>3</text:note-citation><text:note-body><text:p text:style-name="P87"><text:span text:style-name="T271">_Sr.wt</text:span> = Deshrut.</text:p></text:note-body></text:note></text:span><text:span text:style-name="T3">,</text:span></text:p>
      <text:p text:style-name="P99"><text:soft-page-break/><text:span text:style-name="T3">sovereign </text:span><text:span text:style-name="T59">(3)</text:span><text:span text:style-name="T31"> </text:span><text:span text:style-name="T38">[</text:span><text:span text:style-name="T37">who</text:span><text:span text:style-name="T38">]</text:span><text:span text:style-name="T37"> seized </text:span><text:span text:style-name="T32">the Nine Bows,</text:span></text:p>
      <text:p text:style-name="P100"><text:span text:style-name="T32">t</text:span><text:span text:style-name="T3">hat when he came forth from the womb </text:span><text:span text:style-name="T38">[second tense?]</text:span><text:span text:style-name="T3">,</text:span></text:p>
      <text:p text:style-name="P100"><text:span text:style-name="T34">victories </text:span><text:span text:style-name="T35">[F 139] </text:span><text:span text:style-name="T34">were</text:span><text:span text:style-name="T3"> </text:span><text:span text:style-name="T33">foretold </text:span><text:span text:style-name="T35">[passive] </text:span><text:span text:style-name="T33">[F 235] of him,</text:span></text:p>
      <text:p text:style-name="P101"><text:span text:style-name="T3">command [F 73</text:span><text:span text:style-name="T157">–</text:span><text:span text:style-name="T152">74] [</text:span><text:span text:style-name="T161">g</text:span><text:span text:style-name="T162">iven</text:span><text:span text:style-name="T152">] to him [while] active [F 91] in the egg,</text:span></text:p>
      <text:p text:style-name="P43"/>
      <text:p text:style-name="P43"/>
      <text:p text:style-name="P102"><text:span text:style-name="T262">1</text:span><text:span text:style-name="T263">2</text:span><text:span text:style-name="T261">/</text:span><text:span text:style-name="T263">7</text:span><text:span text:style-name="T261">/25</text:span></text:p>
      <text:p text:style-name="P44"/>
      <text:p text:style-name="P45"/>
      <text:p text:style-name="P109"><text:span text:style-name="T152">kA </text:span><text:span text:style-name="T163">mn ib hb=f mtwn</text:span></text:p>
      <text:p text:style-name="P110"><text:span text:style-name="T169">n</text:span><text:span text:style-name="T152">sw.t n nTr pri nx.t mi MnT(w)</text:span></text:p>
      <text:p text:style-name="P111"><text:span text:style-name="T152">wr pH.t</text:span><text:span text:style-name="T164">y</text:span><text:span text:style-name="T152"> </text:span><text:span text:style-name="T264">(4)</text:span><text:span text:style-name="T174"> </text:span><text:span text:style-name="T152">mi sA Nw.t</text:span></text:p>
      <text:p text:style-name="P124"/>
      <text:p text:style-name="P112"><text:span text:style-name="T152">is Hm=f </text:span><text:span text:style-name="T177">m N</text:span><text:span text:style-name="T152">hr</text:span><text:span text:style-name="T177">n</text:span><text:span text:style-name="T152"> </text:span><text:span text:style-name="T177">mi </text:span><text:span text:style-name="T152">n</text:span><text:span text:style-name="T185">(y)</text:span><text:span text:style-name="T152">t-</text:span><text:span text:style-name="T179">a</text:span><text:span text:style-name="T152">=f </text:span><text:span text:style-name="T175">Tnw rnp.t</text:span></text:p>
      <text:p text:style-name="P113"><text:span text:style-name="T175">w</text:span><text:span text:style-name="T152">r.w </text:span><text:span text:style-name="T175">n </text:span><text:span text:style-name="T152">xAs.</text:span><text:span text:style-name="T175">t nb iw&lt;</text:span><text:span text:style-name="T191">=sn&gt;</text:span><text:span text:style-name="T175"> m ks</text:span><text:span text:style-name="T197">.</text:span><text:span text:style-name="T175">w m Htp.</text:span><text:span text:style-name="T190">w</text:span><text:span text:style-name="T175"> n bA.</text:span><text:span text:style-name="T190">w</text:span><text:span text:style-name="T187"> </text:span><text:span text:style-name="T152">n Hm</text:span><text:span text:style-name="T176">=f S</text:span><text:span text:style-name="T152">Aa &lt;</text:span><text:span text:style-name="T198">r&gt;</text:span><text:span text:style-name="T176"> </text:span><text:span text:style-name="T152">pHw.w</text:span></text:p>
      <text:p text:style-name="P47"/>
      <text:p text:style-name="P46"/>
      <text:p text:style-name="P103"><text:span text:style-name="T152">Bull </text:span><text:span text:style-name="T165">firm [F 106] of heart </text:span><text:span text:style-name="T160">[</text:span><text:span text:style-name="T274">nfr Hr</text:span><text:span text:style-name="T160">]</text:span><text:span text:style-name="T165">, </text:span><text:span text:style-name="T166">when he </text:span><text:span text:style-name="T168">trot</text:span><text:span text:style-name="T166">s </text:span><text:span text:style-name="T167">[circumstantial?] </text:span><text:span text:style-name="T168">[F 158] </text:span><text:span text:style-name="T167">[into] the arena [variant spelling, F 121],</text:span></text:p>
      <text:p text:style-name="P104"><text:span text:style-name="T167">d</text:span><text:span text:style-name="T152">ivine king </text:span><text:span text:style-name="T170">[indirect genitive] [who] c</text:span><text:span text:style-name="T181">a</text:span><text:span text:style-name="T170">me </text:span><text:span text:style-name="T181">[</text:span><text:span text:style-name="T182">no gemination, so </text:span><text:span text:style-name="T181">perfect participle] </text:span><text:span text:style-name="T170">[in] might like Montu,</text:span></text:p>
      <text:p text:style-name="P105"><text:span text:style-name="T152">Great of s</text:span><text:span text:style-name="T171">trength </text:span><text:span text:style-name="T172">[playful spelling of dual </text:span><text:span text:style-name="T275">-ty</text:span><text:span text:style-name="T172">] </text:span><text:span text:style-name="T183">[leopard heads?] </text:span><text:span text:style-name="T160">[</text:span><text:span text:style-name="T274">nfr Hr</text:span><text:span text:style-name="T160">] </text:span><text:span text:style-name="T264">(4)</text:span><text:span text:style-name="T160"> </text:span><text:span text:style-name="T173">like the son of Nut:</text:span></text:p>
      <text:p text:style-name="P48"/>
      <text:p text:style-name="P106"><text:span text:style-name="T173">S</text:span><text:span text:style-name="T152">o, his majesty [was] </text:span><text:span text:style-name="T180">in</text:span><text:span text:style-name="T152"> Naharin</text:span><text:span text:style-name="T184">a</text:span><text:span text:style-name="T152"> </text:span><text:span text:style-name="T178">like </text:span><text:span text:style-name="T180">[</text:span><text:span text:style-name="T184">that</text:span><text:span text:style-name="T180">] </text:span><text:span text:style-name="T184">of</text:span><text:span text:style-name="T180"> his custom </text:span><text:span text:style-name="T185">[</text:span><text:span text:style-name="T48">cf.</text:span><text:span text:style-name="T185"> H 248] </text:span><text:span text:style-name="T180">each [F 305] year.</text:span></text:p>
      <text:p text:style-name="P107"><text:span text:style-name="T152">[As for] the princes of every foreign land </text:span><text:span text:style-name="T195">[F 185]</text:span><text:span text:style-name="T152">, they </text:span><text:span text:style-name="T192">came in </text:span><text:span text:style-name="T196">prostration</text:span><text:span text:style-name="T197">s</text:span><text:span text:style-name="T196"> [F 287]</text:span><text:span text:style-name="T192">, in peace [“peaces”], </text:span><text:span text:style-name="T193">to the might [</text:span><text:span text:style-name="T276">bA.w</text:span><text:span text:style-name="T193"> = mass noun?] </text:span><text:span text:style-name="T194">of his majesty, </text:span><text:span text:style-name="T198">as far as </text:span><text:span text:style-name="T199">the far north [F 92, last variant spelling].</text:span></text:p>
      <text:p text:style-name="P49"/>
      <text:p text:style-name="P49"/>
      <text:p text:style-name="P22"><text:span text:style-name="T180">1</text:span><text:span text:style-name="T152">2/21/25</text:span></text:p>
      <text:p text:style-name="P53"/>
      <text:p text:style-name="P53"/>
      <text:p text:style-name="P114"><text:span text:style-name="T176">in</text:span><text:span text:style-name="T152">w=</text:span><text:span text:style-name="T176">sn nbw xsb</text:span><text:span text:style-name="T152">d</text:span><text:span text:style-name="T176"> </text:span><text:span text:style-name="T265">(5)</text:span><text:span text:style-name="T176"> mfk</text:span><text:span text:style-name="T152">A.t</text:span><text:span text:style-name="T176"> x</text:span><text:span text:style-name="T188">A.</text:span><text:span text:style-name="T176">w nb </text:span><text:span text:style-name="T188">tA-</text:span><text:span text:style-name="T176">nTr </text:span><text:span text:style-name="T188">Hr</text:span><text:span text:style-name="T176"> </text:span><text:span text:style-name="T188">psD=</text:span><text:span text:style-name="T176">sn</text:span></text:p>
      <text:p text:style-name="P114"><text:span text:style-name="T176">wa nb </text:span><text:span text:style-name="T189">Hr xrp sn</text:span><text:span text:style-name="T176">w=f</text:span></text:p>
      <text:p text:style-name="P115"><text:span text:style-name="T176">a</text:span><text:span text:style-name="T152">Ha rdi</text:span><text:span text:style-name="T209">{.t}</text:span><text:span text:style-name="T152"> </text:span><text:span text:style-name="T209">pA </text:span><text:span text:style-name="T152">wr n B</text:span><text:span text:style-name="T204">xtn in</text:span><text:span text:style-name="T209">.</text:span><text:span text:style-name="T204">t</text:span><text:span text:style-name="T209">w</text:span><text:span text:style-name="T204"> </text:span><text:span text:style-name="T205">in.</text:span><text:span text:style-name="T209">w</text:span><text:span text:style-name="T205">=f</text:span></text:p>
      <text:p text:style-name="P116"><text:span text:style-name="T205">d</text:span><text:span text:style-name="T152">i.n=f </text:span><text:span text:style-name="T206">sA.t=f wr.t </text:span><text:span text:style-name="T210">HAt </text:span><text:span text:style-name="T206">i</text:span><text:span text:style-name="T227">r.w[?]</text:span></text:p>
      <text:p text:style-name="P116"><text:span text:style-name="T206">Hr swAS</text:span><text:span text:style-name="T211">{y}</text:span><text:span text:style-name="T206"> Hm=f</text:span></text:p>
      <text:p text:style-name="P117"><text:span text:style-name="T206">H</text:span><text:span text:style-name="T152">r dbH [</text:span><text:span text:style-name="T212">anx</text:span><text:span text:style-name="T152">] xr=f</text:span></text:p>
      <text:p text:style-name="P117"><text:span text:style-name="T152">wn </text:span><text:span text:style-name="T267">(</text:span><text:span text:style-name="T261">6</text:span><text:span text:style-name="T267">)</text:span><text:span text:style-name="T152"> st nfr</text:span><text:span text:style-name="T214">(.ti?)</text:span><text:span text:style-name="T152"> r </text:span><text:span text:style-name="T213">aA</text:span><text:span text:style-name="T152"> wr Hr ib Hm=f r xt nb</text:span></text:p>
      <text:p text:style-name="P49"/>
      <text:p text:style-name="P49"/>
      <text:p text:style-name="P108"><text:span text:style-name="T180">[</text:span><text:span text:style-name="T152">As for] their tribute [F 22]: </text:span><text:span text:style-name="T200">gold, lapis lazuli, </text:span><text:span text:style-name="T266">(5)</text:span><text:span text:style-name="T203"> </text:span><text:span text:style-name="T200">turq</text:span><text:span text:style-name="T203">u</text:span><text:span text:style-name="T200">oise [F 106], </text:span><text:span text:style-name="T201">every herb [F 183] from the gods’ land </text:span><text:span text:style-name="T223">[were] </text:span><text:span text:style-name="T201">upon their back</text:span><text:span text:style-name="T202">[s].</text:span></text:p>
      <text:p text:style-name="P108"><text:span text:style-name="T223">E</text:span><text:span text:style-name="T224">ach one </text:span><text:span text:style-name="T223">was</text:span><text:span text:style-name="T224"> </text:span><text:span text:style-name="T225">outdoing </text:span><text:span text:style-name="T224">[F 196, “</text:span><text:span text:style-name="T225">getting ahead of”</text:span><text:span text:style-name="T224">] </text:span><text:span text:style-name="T226">his companion.</text:span></text:p>
      <text:p text:style-name="P61">Then the chief of Bakhtan <text:span text:style-name="T296">caused t</text:span><text:span text:style-name="T310">hat</text:span><text:span text:style-name="T296"> his tribute </text:span><text:span text:style-name="T310">be brought.</text:span></text:p>
      <text:p text:style-name="P62">[and] put his eldest daughter <text:span text:style-name="T297">in front of </text:span><text:span text:style-name="T311">[?]</text:span><text:span text:style-name="T298">,</text:span></text:p>
      <text:p text:style-name="P63">[and] was praising [F 216] his majesty,</text:p>
      <text:p text:style-name="P64">[and] was pleading [F 311] [for] [life] from [“upon”] him.</text:p>
      <text:p text:style-name="P65"><text:soft-page-break/>[<text:span text:style-name="T278">wn</text:span><text:span text:style-name="T299"> as </text:span><text:span text:style-name="T451">imperfect </text:span>converter? TLA 550129] <text:span text:style-name="T299">The </text:span><text:span text:style-name="T62">(6)</text:span> woman <text:span text:style-name="T312">had been</text:span><text:span text:style-name="T300"> pleasing [stative?] t</text:span><text:span text:style-name="T301">o the utmost greatness upon his majesty’s heart, </text:span><text:span text:style-name="T302">than any thing [else].</text:span></text:p>
      <text:p text:style-name="P68"/>
      <text:p text:style-name="P67"/>
      <text:p text:style-name="P23"><text:span text:style-name="T180">1</text:span><text:span text:style-name="T152">/</text:span><text:span text:style-name="T222">4</text:span><text:span text:style-name="T152">/2</text:span><text:span text:style-name="T222">6</text:span></text:p>
      <text:p text:style-name="P54"/>
      <text:p text:style-name="P54"/>
      <text:p text:style-name="P118"><text:span text:style-name="T152">aHa.n wd</text:span><text:span text:style-name="T215">n</text:span><text:span text:style-name="T217">(.w)</text:span><text:span text:style-name="T152"> nxb</text:span><text:span text:style-name="T216">(.t)</text:span><text:span text:style-name="T215">=s</text:span><text:span text:style-name="T152"> </text:span><text:span text:style-name="T218">N</text:span><text:span text:style-name="T152">sw.t </text:span><text:span text:style-name="T218">W</text:span><text:span text:style-name="T152">r.t Nfr.w-</text:span><text:span text:style-name="T218">Ra</text:span></text:p>
      <text:p text:style-name="P118"><text:span text:style-name="T219">spr</text:span><text:span text:style-name="T207"> Hm=f </text:span><text:span text:style-name="T208">r Km.t</text:span></text:p>
      <text:p text:style-name="P119"><text:span text:style-name="T208">i</text:span><text:span text:style-name="T228">r.n=s irty nb </text:span><text:span text:style-name="T220">Hm.</text:span><text:span text:style-name="T221">t</text:span><text:span text:style-name="T220">-</text:span><text:span text:style-name="T228">nsw</text:span></text:p>
      <text:p text:style-name="P125"/>
      <text:p text:style-name="P119"><text:span text:style-name="T176">x</text:span><text:span text:style-name="T152">pr </text:span><text:span text:style-name="T229">Hsb.t 15 Smw </text:span><text:span text:style-name="T230">(2)</text:span><text:span text:style-name="T229"> sw 22</text:span></text:p>
      <text:p text:style-name="P120"><text:span text:style-name="T229">i</text:span><text:span text:style-name="T152">sk Hm=f </text:span><text:span text:style-name="T236">m </text:span><text:span text:style-name="T152">WAs.t Nx.t </text:span><text:span text:style-name="T237">@m</text:span><text:span text:style-name="T231">.t </text:span><text:span text:style-name="T237">N</text:span><text:span text:style-name="T231">i</text:span><text:span text:style-name="T232">w.wt</text:span></text:p>
      <text:p text:style-name="P121"><text:span text:style-name="T152">Hr ir</text:span><text:span text:style-name="T238">{</text:span><text:span text:style-name="T152">y</text:span><text:span text:style-name="T238">}&lt;.t&gt;</text:span><text:span text:style-name="T152"> </text:span><text:span text:style-name="T268">(7)</text:span><text:span text:style-name="T243"> </text:span><text:span text:style-name="T152">Hs</text:span><text:span text:style-name="T256">(ty)</text:span><text:span text:style-name="T152"> n </text:span><text:span text:style-name="T239">(i)</text:span><text:span text:style-name="T233">t</text:span><text:span text:style-name="T241">=f</text:span><text:span text:style-name="T233"> Imn-</text:span><text:span text:style-name="T240">Ra </text:span><text:span text:style-name="T233">Nb </text:span><text:span text:style-name="T242">Nsw.t</text:span><text:span text:style-name="T234"> &amp;A.wy</text:span></text:p>
      <text:p text:style-name="P122"><text:span text:style-name="T244">m </text:span><text:span text:style-name="T152">hb=f nfr </text:span><text:span text:style-name="T245">n</text:span><text:span text:style-name="T152"> </text:span><text:span text:style-name="T246">I</text:span><text:span text:style-name="T152">p</text:span><text:span text:style-name="T246">(.t)</text:span><text:span text:style-name="T152"> </text:span><text:span text:style-name="T247">s.t</text:span><text:span text:style-name="T235"> ib=f nt sp tp</text:span></text:p>
      <text:p text:style-name="P123"><text:span text:style-name="T152">i</text:span><text:span text:style-name="T248">i</text:span><text:span text:style-name="T152">.tw r Dd n Hm=f</text:span></text:p>
      <text:p text:style-name="P123"><text:span text:style-name="T152">wn wp.</text:span><text:span text:style-name="T251">(</text:span><text:span text:style-name="T250">wt)</text:span><text:span text:style-name="T152"> ii.n pA wr n Bxt</text:span><text:span text:style-name="T249">n</text:span><text:span text:style-name="T152"> </text:span><text:span text:style-name="T252">iw</text:span><text:span text:style-name="T152"> Xr </text:span><text:span text:style-name="T253">in.</text:span><text:span text:style-name="T252">w</text:span><text:span text:style-name="T152"> </text:span><text:span text:style-name="T252">aS(A)</text:span><text:span text:style-name="T255">{</text:span><text:span text:style-name="T254">t</text:span><text:span text:style-name="T255">}</text:span><text:span text:style-name="T152"> n nsw.t</text:span></text:p>
      <text:p text:style-name="P50"/>
      <text:p text:style-name="P50"/>
      <text:p text:style-name="P71">Then <text:span text:style-name="T303">her titulary [F 138] </text:span><text:span text:style-name="T304">was recorded [F 73] [past passive]: </text:span><text:span text:style-name="T305">Great Queen Neferure.</text:span></text:p>
      <text:p text:style-name="P66">As the king returned <text:span text:style-name="T308">[second tense?]</text:span> to <text:span text:style-name="T306">the Black Lan</text:span><text:span text:style-name="T307">d</text:span>,</text:p>
      <text:p text:style-name="P72"><text:span text:style-name="T308">so she did every doing </text:span><text:span text:style-name="T336">[</text:span><text:span text:style-name="T337">wh</text:span><text:span text:style-name="T338">ich</text:span><text:span text:style-name="T337"> </text:span><text:span text:style-name="T336">noun </text:span><text:span text:style-name="T337">form?</text:span><text:span text:style-name="T336">] </text:span><text:span text:style-name="T308">of a king’s wife </text:span><text:span text:style-name="T309">[direct genitive]</text:span><text:span text:style-name="T308">.</text:span></text:p>
      <text:p text:style-name="P72"/>
      <text:p text:style-name="P72">It happened <text:span text:style-name="T313">in regnal year 15, month 2 [playful spelling], </text:span><text:span text:style-name="T314">day 22,</text:span></text:p>
      <text:p text:style-name="P74"><text:span text:style-name="T339">lo</text:span> [“non-enclitic” particle, TLA 31760; see also F 30], <text:span text:style-name="T315">his majesty </text:span><text:span text:style-name="T316">[was] in </text:span><text:span text:style-name="T340">Mighty </text:span><text:span text:style-name="T316">Thebes, </text:span><text:span text:style-name="T318">Wife</text:span><text:span text:style-name="T317"> of </text:span><text:span text:style-name="T319">the </text:span><text:span text:style-name="T317">Cities,</text:span></text:p>
      <text:p text:style-name="P75">[and] was doing <text:span text:style-name="T63">(7)</text:span><text:span text:style-name="T326"> </text:span><text:span text:style-name="T320">the rit</text:span><text:span text:style-name="T321">e</text:span><text:span text:style-name="T320">s </text:span><text:span text:style-name="T345">[F 177] </text:span><text:span text:style-name="T321">for </text:span><text:span text:style-name="T322">his father [</text:span><text:span text:style-name="T279">f</text:span><text:span text:style-name="T322"> for both </text:span><text:span text:style-name="T279">it</text:span><text:span text:style-name="T322"> and </text:span><text:span text:style-name="T279">=f</text:span><text:span text:style-name="T322">?], </text:span><text:span text:style-name="T323">Amun-Re, </text:span><text:span text:style-name="T324">Lord </text:span><text:span text:style-name="T325">of Thrones of the Two Lands [TLA 26200],</text:span></text:p>
      <text:p text:style-name="P76">in his fine feast <text:span text:style-name="T327">of Luxor</text:span><text:span text:style-name="T327"><text:note text:id="ftn4" text:note-class="footnote"><text:note-citation>4</text:note-citation><text:note-body><text:p text:style-name="P150"><text:span text:style-name="T271">Ip</text:span><text:span text:style-name="T280">(.t)</text:span> = Ipet = “The Adyton”.</text:p></text:note-body></text:note></text:span><text:span text:style-name="T327"> </text:span><text:span text:style-name="T341">[F 16]</text:span><text:span text:style-name="T327">, </text:span><text:span text:style-name="T328">his heart’s place [direct genitive] </text:span><text:span text:style-name="T329">since [“from”] the </text:span><text:span text:style-name="T342">beginning of time [“foremost</text:span><text:span text:style-name="T329"> time”</text:span><text:span text:style-name="T328">]</text:span><text:span text:style-name="T329">,</text:span></text:p>
      <text:p text:style-name="P77">[when] one came to say to his majesty:</text:p>
      <text:p text:style-name="P78">There <text:span text:style-name="T332">was </text:span><text:span text:style-name="T333">[</text:span><text:span text:style-name="T451">imperfect</text:span><text:span text:style-name="T333"> converter]</text:span> a <text:span text:style-name="T331">messenger</text:span><text:span text:style-name="T330"> [F 17, 60] </text:span><text:span text:style-name="T331">of the chief of Bakhtan </text:span><text:span text:style-name="T344">that</text:span><text:span text:style-name="T343"> came</text:span><text:span text:style-name="T331">, </text:span><text:span text:style-name="T343">with[?]</text:span><text:span text:style-name="T334"> numerous [F 49] presents have come for the queen.</text:span></text:p>
      <text:p text:style-name="P72"/>
      <text:p text:style-name="P69"/>
      <text:p text:style-name="P24"><text:span text:style-name="T180">1</text:span><text:span text:style-name="T152">/</text:span><text:span text:style-name="T235">18</text:span><text:span text:style-name="T152">/2</text:span><text:span text:style-name="T222">6</text:span></text:p>
      <text:p text:style-name="P55"/>
      <text:p text:style-name="P55"/>
      <text:p text:style-name="P126">aHa.n ms<text:span text:style-name="T356">(.w)</text:span><text:span text:style-name="T383">[?]</text:span>=f <text:span text:style-name="T64">(8)</text:span><text:span text:style-name="T346"> m-b</text:span><text:span text:style-name="T357">AH</text:span><text:span text:style-name="T346"> </text:span><text:span text:style-name="T347">Hm=f </text:span><text:span text:style-name="T348">Hna in.w=f</text:span></text:p>
      <text:p text:style-name="P127">Dd=f m <text:span text:style-name="T363">swAS</text:span> Hm=f</text:p>
      <text:p text:style-name="P128">iw n=k <text:span text:style-name="T366">Ra</text:span> n PDt 9 <text:span text:style-name="T367">i</text:span>m<text:span text:style-name="T367">i</text:span> nn anx <text:span text:style-name="T367">x</text:span>r=k</text:p>
      <text:p text:style-name="P129">aHa.n Dd=f sn-<text:span text:style-name="T365">tA</text:span> <text:span text:style-name="T359">m-</text:span>b<text:span text:style-name="T358">A</text:span>H Hm=f <text:span text:style-name="T368">wH</text:span><text:span text:style-name="T349">m=f Dd xr Hm=f</text:span></text:p>
      <text:p text:style-name="P130">ii<text:span text:style-name="T374">=i </text:span>n=k <text:s/>it- <text:span text:style-name="T65">(9)</text:span><text:span text:style-name="T350"> -</text:span>y <text:span text:style-name="T351">nb Hr </text:span><text:span text:style-name="T371">Bn</text:span><text:span text:style-name="T351">t</text:span><text:span text:style-name="T371">rS</text:span><text:span text:style-name="T351"> </text:span><text:span text:style-name="T372">sn</text:span><text:span text:style-name="T351">w.t </text:span><text:span text:style-name="T373">kt n Hm.</text:span><text:span text:style-name="T352">t-nsw Nfr.w-Ra</text:span></text:p>
      <text:p text:style-name="P130"><text:span text:style-name="T352">mn </text:span><text:span text:style-name="T379">Abx(.w)</text:span><text:span text:style-name="T353"> m H</text:span><text:span text:style-name="T379">aw</text:span><text:span text:style-name="T353">=s</text:span></text:p>
      <text:p text:style-name="P52"/>
      <text:p text:style-name="P51"/>
      <text:p text:style-name="P79">Then <text:span text:style-name="T357">he was </text:span><text:span text:style-name="T381">brought </text:span><text:span text:style-name="T357">[</text:span><text:span text:style-name="T388">F 116</text:span><text:span text:style-name="T357">] (8) </text:span><text:span text:style-name="T361">before [“</text:span><text:span text:style-name="T357">into </text:span><text:span text:style-name="T360">the </text:span><text:span text:style-name="T362">potency</text:span><text:span text:style-name="T360"> of”</text:span><text:span text:style-name="T361">] </text:span><text:span text:style-name="T405">[F 77–78]</text:span><text:span text:style-name="T360"> his majesty, with </text:span><text:span text:style-name="T363">his gifts,</text:span></text:p>
      <text:p text:style-name="P80"><text:soft-page-break/>[and] he said, <text:span text:style-name="T364">in praising [F 216] his majesty,</text:span></text:p>
      <text:p text:style-name="P81">Hail to you, Re of the Nine Bows! Give us life from you!</text:p>
      <text:p text:style-name="P82">Then he <text:span text:style-name="T369">spoke </text:span><text:span text:style-name="T370">[tribute]</text:span><text:span text:style-name="T369">, </text:span><text:span text:style-name="T385">kissin</text:span><text:span text:style-name="T369">g the </text:span>earth <text:span text:style-name="T386">[TLA 888530] </text:span><text:span text:style-name="T375">[typo for </text:span><text:span text:style-name="T281">tA</text:span><text:span text:style-name="T375"> in De Buck?] </text:span>before his majesty, <text:span text:style-name="T370">[and] he continued, saying to his majesty:</text:span></text:p>
      <text:p text:style-name="P83">I have come to <text:span text:style-name="T376">you, sovereign, lord, on [account of] Bentresh, </text:span><text:span text:style-name="T377">the younger [“other”] daughter </text:span><text:span text:style-name="T378">of the king’s wife Neferure.</text:span></text:p>
      <text:p text:style-name="P84">Illness has seized [F 2] her body.</text:p>
      <text:p text:style-name="P73"/>
      <text:p text:style-name="P70"/>
      <text:p text:style-name="P25"><text:span text:style-name="T257">2</text:span><text:span text:style-name="T152">/</text:span><text:span text:style-name="T257">1</text:span><text:span text:style-name="T152">/2</text:span><text:span text:style-name="T222">6</text:span></text:p>
      <text:p text:style-name="P56"/>
      <text:p text:style-name="P56"/>
      <text:p text:style-name="P131">i<text:span text:style-name="T391">m</text:span><text:span text:style-name="T384">{</text:span><text:span text:style-name="T380">t</text:span><text:span text:style-name="T384">}</text:span><text:span text:style-name="T382">[?]</text:span><text:span text:style-name="T380"> wD</text:span><text:span text:style-name="T354"> Hm=k rx-</text:span><text:span text:style-name="T389">(</text:span><text:span text:style-name="T380">i</text:span><text:span text:style-name="T389">)</text:span><text:span text:style-name="T354">x.t r mA=s</text:span></text:p>
      <text:p text:style-name="P132">aHa Dd.n Hm=f</text:p>
      <text:p text:style-name="P134">in <text:span text:style-name="T393">n=i</text:span> T<text:span text:style-name="T395">t(iw)</text:span> nt pr-anx <text:span text:style-name="T396">qnb.(w)t</text:span> <text:span text:style-name="T67">(10)</text:span><text:span text:style-name="T355"> n</text:span><text:span text:style-name="T396">T</text:span><text:span text:style-name="T355"> Tnw</text:span></text:p>
      <text:p text:style-name="P134"><text:span text:style-name="T401">s</text:span><text:span text:style-name="T406">TA.</text:span><text:span text:style-name="T400">n=f </text:span><text:span text:style-name="T401">H</text:span><text:span text:style-name="T406">r-</text:span><text:span text:style-name="T401">a</text:span><text:span text:style-name="T406">(wy)</text:span></text:p>
      <text:p text:style-name="P133">Dd Hm=f</text:p>
      <text:p text:style-name="P135"><text:span text:style-name="T408">mt(n)</text:span> <text:span text:style-name="T408">rti </text:span><text:span text:style-name="T411">(tw)</text:span> aS<text:span text:style-name="T410">{t}</text:span>.tw n <text:span text:style-name="T412">{</text:span><text:span text:style-name="T411">t</text:span><text:span text:style-name="T412">}&lt;T&gt;</text:span>n r sDm<text:span text:style-name="T409">=</text:span>tn mdw Tn</text:p>
      <text:p text:style-name="P136">isk in <text:span text:style-name="T414">n</text:span>=i <text:span text:style-name="T413">Hm</text:span>w.t m ib=f sS m <text:span text:style-name="T416">Dbaw</text:span><text:span text:style-name="T402">=f m q</text:span><text:span text:style-name="T420">(A)</text:span><text:span text:style-name="T402">b=tn</text:span></text:p>
      <text:p text:style-name="P137">ii pw &lt;i<text:span text:style-name="T430">r</text:span>&gt; n sS <text:span text:style-name="T60">(11)</text:span> <text:span text:style-name="T421">n</text:span>sw tn +<text:span text:style-name="T422">H</text:span>wt<text:span text:style-name="T422">y-</text:span>m-<text:span text:style-name="T423">@b</text:span><text:span text:style-name="T403"> m-b</text:span><text:span text:style-name="T404">A</text:span><text:span text:style-name="T403">H Hm=f</text:span></text:p>
      <text:p text:style-name="P138"><text:span text:style-name="T427">w</text:span>D.n Hm=f Smy=f r Bxtn Hna wp.<text:span text:style-name="T429">(wt)</text:span> pn</text:p>
      <text:p text:style-name="P139">spr pw ir n <text:span text:style-name="T354">rx-</text:span><text:span text:style-name="T389">(</text:span><text:span text:style-name="T380">i</text:span><text:span text:style-name="T389">)</text:span><text:span text:style-name="T354">x.t </text:span>r Bxtn</text:p>
      <text:p text:style-name="P140"><text:span text:style-name="T433">gm</text:span>.n=f <text:span text:style-name="T434">B</text:span>nt<text:span text:style-name="T434">rS</text:span> m sxr <text:span text:style-name="T435">X</text:span>r ax.<text:span text:style-name="T436">yw</text:span></text:p>
      <text:p text:style-name="P133"/>
      <text:p text:style-name="P151"/>
      <text:p text:style-name="P161">O<text:span text:style-name="T387"> [that] your majesty </text:span><text:span text:style-name="T391">[would] </text:span><text:span text:style-name="T387">command a wise man [</text:span><text:span text:style-name="T390">missing determinative? F 151</text:span><text:span text:style-name="T387">] </text:span><text:span text:style-name="T389">to </text:span><text:span text:style-name="T392">inspect [F 100] her.</text:span></text:p>
      <text:p text:style-name="P162">Then his majesty spoke:</text:p>
      <text:p text:style-name="P163">Bring <text:span text:style-name="T394">to me </text:span><text:span text:style-name="T395">the staff [TLA 177470] of the temple [“house of life”], </text:span><text:span text:style-name="T397">the councils </text:span><text:span text:style-name="T398">[F 280] </text:span><text:span text:style-name="T66">(10)</text:span><text:span text:style-name="T399"> </text:span><text:span text:style-name="T397">of the residence.</text:span></text:p>
      <text:p text:style-name="P166">They were ushered in [F 255] immediately [F 175].</text:p>
      <text:p text:style-name="P167"><text:span text:style-name="T407">Spoke h</text:span>is majesty:</text:p>
      <text:p text:style-name="P168">Look, <text:span text:style-name="T411">it was caused that you were summoned [F 48] </text:span><text:span text:style-name="T412">to this, in order</text:span><text:span text:style-name="T411"> that you </text:span><text:span text:style-name="T412">hear [prospective] these words.</text:span></text:p>
      <text:p text:style-name="P169">Now, bring to me <text:span text:style-name="T415">a </text:span><text:span text:style-name="T417">craftsman </text:span><text:span text:style-name="T415">[F 170] </text:span><text:span text:style-name="T418">in</text:span><text:span text:style-name="T417"> his heart</text:span><text:span text:style-name="T415">, </text:span><text:span text:style-name="T417">a scribe in his fingers, </text:span><text:span text:style-name="T419">[from] within your midst [F 275].</text:span></text:p>
      <text:p text:style-name="P170">There was a coming by a <text:span text:style-name="T423">royal</text:span> <text:span text:style-name="T68">(11)</text:span><text:span text:style-name="T426"> </text:span>scribe, <text:span text:style-name="T423">this </text:span><text:span text:style-name="T424">Thothemheb [</text:span><text:span text:style-name="T282">Hb</text:span><text:span text:style-name="T424"> on F 167], </text:span><text:span text:style-name="T425">before his majesty.</text:span></text:p>
      <text:p text:style-name="P171">His majesty commanded that he go forth to Bakhtan <text:span text:style-name="T428">with this messenger.</text:span></text:p>
      <text:p text:style-name="P172">There was an arrival <text:span text:style-name="T431">by this wise man </text:span><text:span text:style-name="T432">to Bakhtan,</text:span></text:p>
      <text:p text:style-name="P173">[where] he found Bentresh in the state [F 242–243] of [being] upon <text:span text:style-name="T437">spirits </text:span><text:span text:style-name="T438">[F 4],</text:span></text:p>
      <text:p text:style-name="P164"/>
      <text:p text:style-name="P159"/>
      <text:p text:style-name="P26"><text:span text:style-name="T258">4</text:span><text:span text:style-name="T152">/</text:span><text:span text:style-name="T257">1</text:span><text:span text:style-name="T258">9</text:span><text:span text:style-name="T152">/2</text:span><text:span text:style-name="T222">6</text:span></text:p>
      <text:p text:style-name="P57"/>
      <text:p text:style-name="P57"/>
      <text:p text:style-name="P141"><text:span text:style-name="T439">gm</text:span>.n=f <text:span text:style-name="T60">(12)</text:span> sw <text:span text:style-name="T440">xry </text:span><text:span text:style-name="T441">n aHA Hna=f</text:span></text:p>
      <text:p text:style-name="P142">wn wr n Bxtn <text:span text:style-name="T442">wH</text:span><text:span text:style-name="T444">[</text:span><text:span text:style-name="T442">m=f h</text:span><text:span text:style-name="T443">(A)</text:span><text:span text:style-name="T442">b </text:span><text:span text:style-name="T443">m-bAH</text:span><text:span text:style-name="T444">]</text:span><text:span text:style-name="T443"> Hm=f </text:span><text:span text:style-name="T444">m Dd</text:span></text:p>
      <text:p text:style-name="P143">ity nb=i im wD.<text:span text:style-name="T453">{tw}</text:span> Hm=f rdi in.tw nTr[…]</text:p>
      <text:p text:style-name="P143"/>
      <text:p text:style-name="P144"><text:span text:style-name="T70">(13)</text:span><text:span text:style-name="T473"> </text:span>r Hm=f n rnp.t sp 26 Abd <text:span text:style-name="T474">(1)</text:span> Smw sw ifd <text:span text:style-name="T452">H</text:span>b Imn</text:p>
      <text:p text:style-name="P145"><text:soft-page-break/>iw Hm=f m WAs.t</text:p>
      <text:p text:style-name="P152"/>
      <text:p text:style-name="P152"/>
      <text:p text:style-name="P174"><text:span text:style-name="T447">[where] h</text:span>e found <text:span text:style-name="T69">(12)</text:span><text:span text:style-name="T445"> </text:span>him<text:span text:style-name="T448">[self]</text:span> an enemy [F 195] <text:span text:style-name="T472">[L 370, 372] </text:span><text:span text:style-name="T441">for fight[ing] with him.</text:span></text:p>
      <text:p text:style-name="P175">There was <text:span text:style-name="T333">[</text:span><text:span text:style-name="T451">imperfect</text:span><text:span text:style-name="T333"> converter] </text:span>a chief of Bakhtan <text:span text:style-name="T446">that [“he”] re</text:span><text:span text:style-name="T449">layed the </text:span><text:span text:style-name="T450">message</text:span><text:span text:style-name="T446"> in the presence of his majesty, saying:</text:span></text:p>
      <text:p text:style-name="P176">Sovereign, my lord, may <text:span text:style-name="T538">his</text:span><text:span text:style-name="T454"> majesty command to cause to be brought a god[</text:span><text:span text:style-name="T456">…]</text:span></text:p>
      <text:p text:style-name="P219"/>
      <text:p text:style-name="P177"><text:span text:style-name="T459">(</text:span><text:span text:style-name="T458">13)</text:span><text:span text:style-name="T455"> </text:span><text:span text:style-name="T461">[to] his majesty in year 26, </text:span><text:span text:style-name="T462">the first month of summer,</text:span><text:span text:style-name="T462"><text:note text:id="ftn5" text:note-class="footnote"><text:note-citation>5</text:note-citation><text:note-body><text:p text:style-name="P218"><text:span text:style-name="T271">Smw</text:span> = Shemu = “Harvest”.</text:p></text:note-body></text:note></text:span><text:span text:style-name="T462"> day four [of] the festival of Amun,</text:span></text:p>
      <text:p text:style-name="P178"><text:span text:style-name="T462">w</text:span><text:span text:style-name="T455">hile his majesty was in Thebes:</text:span></text:p>
      <text:p text:style-name="P165"/>
      <text:p text:style-name="P160"/>
      <text:p text:style-name="P27"><text:span text:style-name="T259">5</text:span><text:span text:style-name="T152">/</text:span><text:span text:style-name="T259">3</text:span><text:span text:style-name="T152">/2</text:span><text:span text:style-name="T222">6</text:span></text:p>
      <text:p text:style-name="P58"/>
      <text:p text:style-name="P58"/>
      <text:p text:style-name="P146"><text:span text:style-name="T457">a</text:span><text:span text:style-name="T455">Ha.n wHm.n Hm=f </text:span><text:span text:style-name="T463">m-b(AH) </text:span><text:span text:style-name="T465">#</text:span><text:span text:style-name="T463">nsw-m-W</text:span><text:span text:style-name="T468">A</text:span><text:span text:style-name="T463">s.t </text:span><text:span text:style-name="T466">N</text:span><text:span text:style-name="T463">fr-H[tp] m-Dd</text:span></text:p>
      <text:p text:style-name="P146"><text:span text:style-name="T463">pA nb nfr ir</text:span><text:span text:style-name="T464">=i </text:span><text:span text:style-name="T466">wH</text:span><text:span text:style-name="T464">m m-b(AH)=k Hr sA.t n pA wr n Bx- </text:span><text:span text:style-name="T460">(14)</text:span><text:span text:style-name="T464"> -tn</text:span></text:p>
      <text:p text:style-name="P147"><text:span text:style-name="T455">aHa.n </text:span><text:span text:style-name="T466">s</text:span><text:span text:style-name="T467">t</text:span><text:span text:style-name="T466">A.</text:span><text:span text:style-name="T455">n </text:span><text:span text:style-name="T465">#</text:span><text:span text:style-name="T455">nsw-m-W</text:span><text:span text:style-name="T468">A</text:span><text:span text:style-name="T455">s.t </text:span><text:span text:style-name="T466">N</text:span><text:span text:style-name="T455">fr-Htp r </text:span><text:span text:style-name="T468">#</text:span><text:span text:style-name="T455">nsw-</text:span><text:span text:style-name="T468">pA-ir-sxr </text:span><text:span text:style-name="T455">nTr </text:span><text:span text:style-name="T469">aA </text:span><text:span text:style-name="T455">sHr</text:span><text:span text:style-name="T470">(i)</text:span><text:span text:style-name="T455"> </text:span><text:span text:style-name="T465">SmA.w</text:span></text:p>
      <text:p text:style-name="P148"><text:span text:style-name="T455">aHa.n Dd.n </text:span><text:span text:style-name="T471">H</text:span><text:span text:style-name="T455">m=f m-b(AH) #nsw-</text:span><text:span text:style-name="T468">m-WAs.t Nfr-Htp</text:span></text:p>
      <text:p text:style-name="P153"/>
      <text:p text:style-name="P153"/>
      <text:p text:style-name="P179">Then his majesty relayed <text:span text:style-name="T475">in the presence </text:span><text:span text:style-name="T476">of Khonsu-of-Thebes Neferhotep, saying:</text:span></text:p>
      <text:p text:style-name="P180"><text:span text:style-name="T485">[“</text:span>The”<text:span text:style-name="T485">]</text:span> good lord, I make a report in your presence about [“upon”] [the] daughter of the chief of Bakh- <text:span text:style-name="T60">(14)</text:span> -tan.</text:p>
      <text:p text:style-name="P180"><text:span text:style-name="T480">T</text:span>hen Khonsu-of-Thebes Neferhotep brought [“pulled”] [F 255, <text:span text:style-name="T51">cf.</text:span><text:span text:style-name="T478"> 253</text:span>] <text:span text:style-name="T477">to </text:span>Khonsu-<text:span text:style-name="T477">the-Provider, </text:span><text:span text:style-name="T479">great god that dispels [F 238] disease-demons.</text:span></text:p>
      <text:p text:style-name="P181">Then his majesty said, <text:span text:style-name="T475">in the presence </text:span><text:span text:style-name="T476">of Khonsu-of-Thebes Neferhotep:</text:span></text:p>
      <text:p text:style-name="P181"/>
      <text:p text:style-name="P181"/>
      <text:p text:style-name="P28"><text:span text:style-name="T259">5</text:span><text:span text:style-name="T152">/</text:span><text:span text:style-name="T259">17</text:span><text:span text:style-name="T152">/2</text:span><text:span text:style-name="T222">6</text:span></text:p>
      <text:p text:style-name="P59"/>
      <text:p text:style-name="P59"/>
      <text:p text:style-name="P221">pA nb nfr iw ir <text:span text:style-name="T488">di</text:span>=k <text:span text:style-name="T481">Hr=k r #nsw- </text:span><text:span text:style-name="T71">(15)</text:span><text:span text:style-name="T481"> -</text:span><text:span text:style-name="T484">p</text:span><text:span text:style-name="T486">(A)-</text:span><text:span text:style-name="T489">i</text:span><text:span text:style-name="T481">r-sxr nTr aA sHr</text:span><text:span text:style-name="T530">(i)</text:span><text:span text:style-name="T481"> SmA.w r</text:span><text:span text:style-name="T491">di.t</text:span><text:span text:style-name="T481"> Sm</text:span><text:span text:style-name="T491">i</text:span><text:span text:style-name="T481">=</text:span><text:span text:style-name="T491">f</text:span><text:span text:style-name="T481"> r Bxtn</text:span></text:p>
      <text:p text:style-name="P221"><text:span text:style-name="T482">hn</text:span><text:span text:style-name="T549">(n)</text:span><text:span text:style-name="T482"> wr </text:span><text:span text:style-name="T491">sp 2</text:span></text:p>
      <text:p text:style-name="P222">aHa.n dD.n Hm=f</text:p>
      <text:p text:style-name="P223"><text:span text:style-name="T492">im</text:span> <text:span text:style-name="T495">sA</text:span>=k Hna=f <text:span text:style-name="T494">di=i</text:span> Smi Hm=f r Bxtn r nHm <text:span text:style-name="T493">sA.</text:span>t n wr n Bxtn</text:p>
      <text:p text:style-name="P223"><text:span text:style-name="T60">(16)</text:span> <text:span text:style-name="T483">hn</text:span><text:span text:style-name="T549">(n)</text:span><text:span text:style-name="T483"> tp wr </text:span><text:span text:style-name="T497">sp 2</text:span><text:span text:style-name="T483"> n #nsw-m-WAs.t Nfr-Htp</text:span></text:p>
      <text:p text:style-name="P224">aHa ir.n=f <text:span text:style-name="T499">sA </text:span><text:span text:style-name="T484">n #nsw-p</text:span><text:span text:style-name="T486">(A)-</text:span><text:span text:style-name="T484">ir-sxr-m-WAs.t spr 4</text:span></text:p>
      <text:p text:style-name="P154"/>
      <text:p text:style-name="P154"/>
      <text:p text:style-name="P183"><text:span text:style-name="T485">[“</text:span>The”<text:span text:style-name="T485">]</text:span> good lord, <text:span text:style-name="T487">will[? Middle </text:span><text:span text:style-name="T283">in iw</text:span><text:span text:style-name="T487"> to Late </text:span><text:span text:style-name="T283">iw ir</text:span><text:span text:style-name="T487">?] </text:span><text:span text:style-name="T488">you turn [“give”] your face toward Khonsu- </text:span><text:span text:style-name="T72">(15)</text:span><text:span text:style-name="T488"> -the-Provider, </text:span><text:span text:style-name="T489">the great god </text:span><text:span text:style-name="T490">that dispels disease-demons, </text:span><text:span text:style-name="T491">to cause that he go to Bakhtan?</text:span></text:p>
      <text:p text:style-name="P184">A gr<text:span text:style-name="T502">and</text:span> nod <text:span text:style-name="T548">[F 159] </text:span>[TLA 98810], twice.</text:p>
      <text:p text:style-name="P185">Then his majesty said:</text:p>
      <text:p text:style-name="P186"><text:soft-page-break/>Give your <text:span text:style-name="T500">[magical]</text:span> protection [F 207] [Gardiner sign V16, substituting for V17] <text:span text:style-name="T496">to [“with”] him, [as] I cause his majesty [?] to go to Bakhtan to rescue the daughter of the chief of Bakhtan.</text:span></text:p>
      <text:p text:style-name="P187"><text:span text:style-name="T60">(16)</text:span> <text:span text:style-name="T498">A </text:span><text:span text:style-name="T502">grand</text:span><text:span text:style-name="T498"> nod of the head, twice, of Khonsu-of-Thebes Neferhotep.</text:span></text:p>
      <text:p text:style-name="P188">Then he made <text:span text:style-name="T500">protection for Khonsu-the-Provider-in-Thebes, four times.</text:span></text:p>
      <text:p text:style-name="P182"/>
      <text:p text:style-name="P182"/>
      <text:p text:style-name="P29"><text:span text:style-name="T259">5</text:span><text:span text:style-name="T152">/</text:span><text:span text:style-name="T260">31</text:span><text:span text:style-name="T152">/2</text:span><text:span text:style-name="T222">6</text:span></text:p>
      <text:p text:style-name="P60"/>
      <text:p text:style-name="P60"/>
      <text:p text:style-name="P225">wD.n Hm=f rdi.t wDA #nsw-<text:span text:style-name="T544">pA-</text:span>ir-sxr-m-WAs.t r wi<text:span text:style-name="T501">(A)</text:span> aA</text:p>
      <text:p text:style-name="P225">qAqA.<text:span text:style-name="T502">(w)</text:span> 5</text:p>
      <text:p text:style-name="P225">wrr<text:span text:style-name="T504">(y)</text:span>.t <text:span text:style-name="T73">(17)</text:span></text:p>
      <text:p text:style-name="P226">smsm<text:span text:style-name="T505">[ti]</text:span>.w <text:span text:style-name="T505">aSA.wt imnt.t iAbt.t</text:span></text:p>
      <text:p text:style-name="P227">spr nTr pn <text:span text:style-name="T506">r Bxtn n </text:span><text:span text:style-name="T510">k</text:span><text:span text:style-name="T506">m rnp.t 1 Abd 5</text:span></text:p>
      <text:p text:style-name="P228">aHa.n <text:span text:style-name="T507">ii.n wr n Bxtn H</text:span><text:span text:style-name="T511">n</text:span><text:span text:style-name="T507">a </text:span><text:span text:style-name="T511">mSa</text:span><text:span text:style-name="T507">=f </text:span><text:span text:style-name="T513">sr.(w)</text:span><text:span text:style-name="T508">=f r-H</text:span><text:span text:style-name="T514">A</text:span><text:span text:style-name="T508">t n #nsw-</text:span><text:span text:style-name="T545">pA-</text:span><text:span text:style-name="T508">ir-sxr</text:span></text:p>
      <text:p text:style-name="P229">rdi.n=f sw <text:span text:style-name="T60">(18)</text:span> Hr X.<text:span text:style-name="T516">t</text:span>=f m Dd</text:p>
      <text:p text:style-name="P230">iw=k n<text:span text:style-name="T517">=</text:span>n Htp=k n<text:span text:style-name="T517">=</text:span>n</text:p>
      <text:p text:style-name="P230"><text:span text:style-name="T509">m wD.</text:span><text:span text:style-name="T524">w</text:span><text:span text:style-name="T519">t n</text:span><text:span text:style-name="T509"> Nsw.t Bity </text:span><text:span text:style-name="T105">W</text:span><text:span text:style-name="T106">sr-MaA.t-Ra </text:span><text:span text:style-name="T107">%tp-</text:span><text:span text:style-name="T108">(n)</text:span><text:span text:style-name="T107">-Ra</text:span></text:p>
      <text:p text:style-name="P157"/>
      <text:p text:style-name="P155"/>
      <text:p text:style-name="P189">His majesty commanded to cause Khonsu-the-Provider-in-Thebes to set out [F 75] <text:span text:style-name="T501">toward the great barque, </text:span><text:span text:style-name="T502">[with] </text:span></text:p>
      <text:p text:style-name="P189"><text:span text:style-name="T502">five </text:span><text:span text:style-name="T504">river-</text:span><text:span text:style-name="T502">boats </text:span><text:span text:style-name="T504">[TLA 159600]</text:span><text:span text:style-name="T502">,</text:span></text:p>
      <text:p text:style-name="P189"><text:span text:style-name="T503">a chari- </text:span><text:span text:style-name="T74">(17)</text:span><text:span text:style-name="T503"> -ot </text:span><text:span text:style-name="T504">[F 65]</text:span><text:span text:style-name="T503">,</text:span></text:p>
      <text:p text:style-name="P190">[and] numerous beasts [TLA 135790?] [on] the right [“to the west”] and the left [“east”].</text:p>
      <text:p text:style-name="P191">This god arrived at Bakhtan at the completion [F 308, missing determinative?] of 1 year, 5 months.</text:p>
      <text:p text:style-name="P192">Then the chief of Bakhtan <text:span text:style-name="T514">came</text:span>, <text:span text:style-name="T512">with [</text:span><text:span text:style-name="T523">Dieter: Ptolemaic </text:span><text:span text:style-name="T512">spelling?] his troop </text:span><text:span text:style-name="T513">[and] his noble[s] </text:span><text:span text:style-name="T515">[F 235] [footnote 1 in N: “uncertain”]</text:span><text:span text:style-name="T513">, </text:span><text:span text:style-name="T514">in front of Khonsu-the-Provider.</text:span></text:p>
      <text:p text:style-name="P193">He put himself <text:span text:style-name="T60">(18)</text:span> upon his belly, saying:</text:p>
      <text:p text:style-name="P194"><text:span text:style-name="T518">[When] </text:span>you <text:span text:style-name="T518">come to us</text:span>, <text:span text:style-name="T525">you </text:span>[<text:span text:style-name="T525">are</text:span>] peaceful to us,</text:p>
      <text:p text:style-name="P195">according to [“as”] the command<text:span text:style-name="T526">s</text:span> of the <text:span text:style-name="T520">Dual King, User</text:span><text:span text:style-name="T521">m</text:span><text:span text:style-name="T520">aat</text:span><text:span text:style-name="T521">r</text:span><text:span text:style-name="T520">e </text:span><text:span text:style-name="T521">Setepenre.</text:span></text:p>
      <text:p text:style-name="P196"/>
      <text:p text:style-name="P196"/>
      <text:p text:style-name="P214">6/14/26</text:p>
      <text:p text:style-name="P197"/>
      <text:p text:style-name="P197"/>
      <text:p text:style-name="P231"><text:span text:style-name="T107">a</text:span><text:span text:style-name="T77">Ha.n Smi.n nTr pn r b</text:span><text:span text:style-name="T109">w.(t)</text:span><text:span text:style-name="T77"> nty iw BnTrS im</text:span></text:p>
      <text:p text:style-name="P232">aHa ir.n=f sA n sA.t n wr n Bxtn</text:p>
      <text:p text:style-name="P233">nfr <text:span text:style-name="T75">(19)</text:span><text:span text:style-name="T528"> </text:span>s Hr-a</text:p>
      <text:p text:style-name="P234">aHa.n Dd.n <text:span text:style-name="T529">Ax.t pn nty Hna=s m-bAH #nsw-</text:span><text:span text:style-name="T546">pA-</text:span><text:span text:style-name="T529">ir-sxr-m-WAs.t</text:span></text:p>
      <text:p text:style-name="P235">ii.T<text:span text:style-name="T532">(i)</text:span> im Htp <text:span text:style-name="T530">n</text:span><text:span text:style-name="T543">T</text:span><text:span text:style-name="T530">r aA Hr sHr(i) </text:span><text:span text:style-name="T531">SmAw</text:span></text:p>
      <text:p text:style-name="P237">dmi=k pw Bxtn</text:p>
      <text:p text:style-name="P236">Hm.w=k pw rmT=f</text:p>
      <text:p text:style-name="P236">ink pw Hm=k</text:p>
      <text:p text:style-name="P236"><text:span text:style-name="T60">(20)</text:span> iw=<text:span text:style-name="T536">[</text:span><text:span text:style-name="T533">i</text:span><text:span text:style-name="T536">]</text:span> Smi r b<text:span text:style-name="T535">(</text:span><text:span text:style-name="T534">w</text:span><text:span text:style-name="T535">)</text:span><text:span text:style-name="T534">{</text:span>t<text:span text:style-name="T534">}</text:span> <text:span text:style-name="T533">iw</text:span><text:span text:style-name="T536">=i</text:span><text:span text:style-name="T533"> im r rdi Htp i</text:span><text:span text:style-name="T537">b=</text:span><text:span text:style-name="T533">k Hr iw=k Hr=s</text:span></text:p>
      <text:p text:style-name="P156"/>
      <text:p text:style-name="P156"/>
      <text:p text:style-name="P201"><text:soft-page-break/>Then this god went to the place in which Bentresh was [“therein”].</text:p>
      <text:p text:style-name="P202"><text:span text:style-name="T527">Then he made protection [Gardiner sign V17 this time!] </text:span><text:span text:style-name="T522">for the daughter of the chief of Bakhtan.</text:span></text:p>
      <text:p text:style-name="P202"><text:span text:style-name="T528">Well </text:span><text:span text:style-name="T75">(19)</text:span> she <text:span text:style-name="T528">became [“was”] in an instant.</text:span></text:p>
      <text:p text:style-name="P203">Then this <text:span text:style-name="T50">akh</text:span> that was with her spoke in the presence of Khonsu-the-Provider-in-Thebes:</text:p>
      <text:p text:style-name="P203">Welcome in peace, great god who dispels disease-demons <text:span text:style-name="T539">[Faulkner 266: same spelling as the word for “foreigners”, but would take a different determinative]</text:span>.</text:p>
      <text:p text:style-name="P204">Bakhtan is your home.</text:p>
      <text:p text:style-name="P204">Its people are your servants.</text:p>
      <text:p text:style-name="P204">I am your servant.</text:p>
      <text:p text:style-name="P205"><text:span text:style-name="T60">(20)</text:span> <text:span text:style-name="T540">I </text:span><text:span text:style-name="T541">[spelled with the divine determinative!] </text:span><text:span text:style-name="T540">will </text:span><text:span text:style-name="T541">go to the place that I am from, will cause peace [to] your heart regarding [“upon”] that which you were </text:span><text:span text:style-name="T542">up</text:span><text:span text:style-name="T541">on [“it”].</text:span></text:p>
      <text:p text:style-name="P202"/>
      <text:p text:style-name="P197"/>
      <text:p text:style-name="P215">6/<text:span text:style-name="T537">28</text:span>/26</text:p>
      <text:p text:style-name="P198"/>
      <text:p text:style-name="P198"/>
      <text:p text:style-name="P238"><text:span text:style-name="T107">i</text:span><text:span text:style-name="T113">{w}m</text:span><text:span text:style-name="T107"> wD.</text:span><text:span text:style-name="T114">{</text:span><text:span text:style-name="T110">tw</text:span><text:span text:style-name="T114">}</text:span><text:span text:style-name="T107"> Hm=</text:span><text:span text:style-name="T111">k r ir hrw nfr Hna</text:span><text:span text:style-name="T112">=i Hna p(A) wr n Bxtn</text:span></text:p>
      <text:p text:style-name="P239"><text:span text:style-name="T112">a</text:span><text:span text:style-name="T77">Ha.n</text:span><text:span text:style-name="T135">{n}</text:span><text:span text:style-name="T77"> </text:span><text:span text:style-name="T134">h</text:span><text:span text:style-name="T77">n</text:span><text:span text:style-name="T136">n</text:span><text:span text:style-name="T77"> nTr pn</text:span><text:span text:style-name="T115"> r pA=f </text:span><text:span text:style-name="T137">Hm-</text:span><text:span text:style-name="T115">nTr </text:span><text:span text:style-name="T116">m Dd</text:span></text:p>
      <text:p text:style-name="P240"><text:span text:style-name="T103">(21)</text:span><text:span text:style-name="T77"> </text:span><text:span text:style-name="T138">im</text:span><text:span text:style-name="T117"> ir pA wr n Bxtn </text:span><text:span text:style-name="T138">aAb.t</text:span><text:span text:style-name="T118"> </text:span><text:span text:style-name="T119">a</text:span><text:span text:style-name="T138">A</text:span><text:span text:style-name="T119">.t m-bA</text:span><text:span text:style-name="T128">H</text:span><text:span text:style-name="T119"> Ax.</text:span><text:span text:style-name="T120">t p</text:span><text:span text:style-name="T140">w</text:span></text:p>
      <text:p text:style-name="P241"><text:span text:style-name="T77">ir wnn </text:span><text:span text:style-name="T141">nn</text:span><text:span text:style-name="T121"> </text:span><text:span text:style-name="T142">n </text:span><text:span text:style-name="T121">ir #nsw-</text:span><text:span text:style-name="T122">pA-ir-sxr-m-WAs.t </text:span><text:span text:style-name="T125">H</text:span><text:span text:style-name="T123">na </text:span><text:span text:style-name="T124">p(A) Ax.t</text:span></text:p>
      <text:p text:style-name="P242"><text:span text:style-name="T124">i</text:span><text:span text:style-name="T77">w p(A) wr n Bxtn </text:span><text:span text:style-name="T125">aHa.</text:span><text:span text:style-name="T143">(w) </text:span><text:span text:style-name="T125">Hna </text:span><text:span text:style-name="T126">mSa=f</text:span></text:p>
      <text:p text:style-name="P243"><text:span text:style-name="T126">i</text:span><text:span text:style-name="T77">w</text:span><text:span text:style-name="T144">=[f] </text:span><text:span text:style-name="T77">snD.</text:span><text:span text:style-name="T144">(w) r</text:span><text:span text:style-name="T77"> a[A] </text:span><text:span text:style-name="T127">wr</text:span></text:p>
      <text:p text:style-name="P244"><text:span text:style-name="T145">{</text:span><text:span text:style-name="T77">aHa</text:span><text:span text:style-name="T145">}</text:span><text:span text:style-name="T77"> </text:span><text:span text:style-name="T103">(22)</text:span><text:span text:style-name="T77"> </text:span><text:span text:style-name="T128">aHa.n</text:span><text:span text:style-name="T145">{n}</text:span><text:span text:style-name="T128"> ir.n=f </text:span><text:span text:style-name="T139">aAb.t</text:span><text:span text:style-name="T128"> </text:span><text:span text:style-name="T146">aA</text:span><text:span text:style-name="T128">.t m-bAH </text:span><text:span text:style-name="T129">#nsw-pA-ir-sxr-m-WAs.t </text:span><text:span text:style-name="T130">Hna Ax.t</text:span></text:p>
      <text:p text:style-name="P244"><text:span text:style-name="T148">(w)</text:span><text:span text:style-name="T131">n p(A) wr </text:span><text:span text:style-name="T146">n </text:span><text:span text:style-name="T131">Bxtn </text:span><text:span text:style-name="T132">Hr ir hrw nfr </text:span><text:span text:style-name="T133">Hr</text:span><text:span text:style-name="T146">=</text:span><text:span text:style-name="T132">w</text:span></text:p>
      <text:p text:style-name="P209"/>
      <text:p text:style-name="P158"/>
      <text:p text:style-name="P206">May your majesty command [compare line 12] to <text:span text:style-name="T540">make a celebration day [“great day”] with me, with the chief of Bakhtan.</text:span></text:p>
      <text:p text:style-name="P207">Then this god nodded toward his [LE possessive adjective] <text:span text:style-name="T547">priest, saying:</text:span></text:p>
      <text:p text:style-name="P208"><text:span text:style-name="T60">(21)</text:span> <text:span text:style-name="T550">Cause the chief of Bakhtan to make [prospective] a great offering </text:span><text:span text:style-name="T551">[F 38] [Gardiner sign M19]</text:span><text:span text:style-name="T550"> in the presence of this [Dieter: </text:span><text:span text:style-name="T284">pw</text:span><text:span text:style-name="T550"> can be </text:span><text:span text:style-name="T284">pn</text:span><text:span text:style-name="T550">] </text:span><text:span text:style-name="T52">akh</text:span><text:span text:style-name="T550">.</text:span></text:p>
      <text:p text:style-name="P209"><text:span text:style-name="T558">During [“That there was making of”]</text:span> this [Gardiner sign M22] of [which] Khonsu-the-Provider-in-Thebes with the <text:span text:style-name="T50">akh</text:span> did,</text:p>
      <text:p text:style-name="P210">the chief of Bakhtan stood [stative] with his troop.</text:p>
      <text:p text:style-name="P211">He was frightened to a great [extent?].</text:p>
      <text:p text:style-name="P212"><text:span text:style-name="T60">(22)</text:span> Then he made <text:span text:style-name="T554">a great offering in the presence of </text:span><text:span text:style-name="T553">Khonsu-the-Provider-in-Thebes with </text:span><text:span text:style-name="T559">the</text:span><text:span text:style-name="T553"> </text:span><text:span text:style-name="T53">ak</text:span><text:span text:style-name="T54">h.</text:span></text:p>
      <text:p text:style-name="P212"><text:span text:style-name="T559">[There was then]</text:span><text:span text:style-name="T555"> t</text:span><text:span text:style-name="T554">he chief of Bakhtan making a celebration day for them.</text:span></text:p>
      <text:p text:style-name="P208"/>
      <text:p text:style-name="P189"/>
      <text:p text:style-name="P216"><text:span text:style-name="T552">7</text:span>/<text:span text:style-name="T552">12</text:span>/26</text:p>
      <text:p text:style-name="P199"/>
      <text:p text:style-name="P199"/>
      <text:p text:style-name="P245"><text:span text:style-name="T107">a</text:span><text:span text:style-name="T77">Ha Sm</text:span><text:span text:style-name="T149">i</text:span><text:span text:style-name="T77">.n=f pA Ax.t m Htp r b(w){t} mr=f</text:span></text:p>
      <text:p text:style-name="P245"><text:span text:style-name="T77">m wD.tw n </text:span><text:span text:style-name="T129">#nsw-pA-ir-sxr-m-WAs.t</text:span></text:p>
      <text:p text:style-name="P247"><text:span text:style-name="T104">(</text:span><text:span text:style-name="T103">23)</text:span><text:span text:style-name="T77"> wn pA wr n Bxtn Hr nhm r aA wr Hna s nb nty </text:span><text:span text:style-name="T147">im </text:span><text:span text:style-name="T77">Bxtn</text:span></text:p>
      <text:p text:style-name="P248"><text:soft-page-break/>aHa <text:span text:style-name="T560">a.n w</text:span><text:span text:style-name="T561">A</text:span><text:span text:style-name="T564">wA</text:span><text:span text:style-name="T566">{</text:span><text:span text:style-name="T560">y</text:span><text:span text:style-name="T566">}</text:span><text:span text:style-name="T561">=f Hna ib=f m-</text:span><text:span text:style-name="T565">D</text:span><text:span text:style-name="T561">d</text:span></text:p>
      <text:p text:style-name="P250">iw rdi&lt;<text:span text:style-name="T566">=i&gt;</text:span> xpr nTr pn <text:span text:style-name="T567">d</text:span>y n Bxtn</text:p>
      <text:p text:style-name="P250">bn<text:span text:style-name="T571">=i</text:span> rdi Smi=f r Km.t</text:p>
      <text:p text:style-name="P249">aHa.n <text:span text:style-name="T60">(24)</text:span> <text:span text:style-name="T573">{n}</text:span><text:span text:style-name="T562"> </text:span><text:span text:style-name="T572">Tni</text:span><text:span text:style-name="T574">[?].n</text:span><text:span text:style-name="T562"> nTr pn rnp.t 3 Abd 9 n Bxtn</text:span></text:p>
      <text:p text:style-name="P251">aHa.n <text:span text:style-name="T563">wr n Bxtn </text:span><text:span text:style-name="T577">sDr.(w)</text:span><text:span text:style-name="T563"> Hr [??]=f</text:span></text:p>
      <text:p text:style-name="P252">mr=f nTr pn ii.n=f <text:s/>r rw<text:span text:style-name="T582">dt</text:span>=f</text:p>
      <text:p text:style-name="P253">iw=f m bik <text:span text:style-name="T583">m</text:span> <text:span text:style-name="T583">n</text:span>b<text:span text:style-name="T583">w</text:span> ax<text:span text:style-name="T586">y</text:span>=f r Hr.<text:span text:style-name="T585">t</text:span> r Km.t</text:p>
      <text:p text:style-name="P272"/>
      <text:p text:style-name="P272"/>
      <text:p text:style-name="P272">Then <text:span text:style-name="T556">the </text:span><text:span text:style-name="T55">akh</text:span><text:span text:style-name="T556"> went in peace to the place he desired,</text:span></text:p>
      <text:p text:style-name="P213">as was commanded by Khonsu-the-Provider-in-Thebes.</text:p>
      <text:p text:style-name="P213"><text:span text:style-name="T60">(23)</text:span> There was [then] the chief of Bakhtan rejoicing to a great extent with every man that was in Bakhtan.</text:p>
      <text:p text:style-name="P260">Then <text:span text:style-name="T565">he took counsel [F 53] with his heart, saying,</text:span></text:p>
      <text:p text:style-name="P261">I <text:span text:style-name="T567">will </text:span><text:span text:style-name="T571">allow</text:span><text:span text:style-name="T567"> this god to manifest here [spelled with Gardiner sign D37, as if </text:span><text:span text:style-name="T568">di</text:span><text:span text:style-name="T567"> instead of </text:span><text:span text:style-name="T568">dy</text:span><text:span text:style-name="T567">] </text:span><text:span text:style-name="T570">in Bakhtan.</text:span></text:p>
      <text:p text:style-name="P262">I will not [Late Egyptian negation, H §199] allow that he return to Egypt.</text:p>
      <text:p text:style-name="P263">Then <text:span text:style-name="T60">(24)</text:span> <text:span text:style-name="T573">this god </text:span><text:span text:style-name="T576">ascended to</text:span><text:span text:style-name="T574">[?] </text:span><text:span text:style-name="T575">year 3, month 9 in Bakhtan.</text:span></text:p>
      <text:p text:style-name="P264">Then <text:span text:style-name="T578">as the chief of Bakhtan was sleeping [stative] [non-standard Gardiner sign Q2?] </text:span><text:span text:style-name="T579">on </text:span><text:span text:style-name="T580">his </text:span><text:span text:style-name="T579">[??],</text:span></text:p>
      <text:p text:style-name="P265">he saw this god when he came from his chapel [“sandstone”, Gardiner sign T12] <text:span text:style-name="T586">[F 148]</text:span> <text:span text:style-name="T581">[determinative: Gardiner sign O18?].</text:span></text:p>
      <text:p text:style-name="P266">He was as a falcon <text:span text:style-name="T583">[F 81]</text:span> <text:span text:style-name="T583">in gold, </text:span><text:span text:style-name="T584">when he flew [F 48, spelled with </text:span><text:span text:style-name="T569">x</text:span><text:span text:style-name="T584"> rather than </text:span><text:span text:style-name="T569">X</text:span><text:span text:style-name="T584">] </text:span><text:span text:style-name="T585">towards the heavens [F 175] of Egypt.</text:span></text:p>
      <text:p text:style-name="P213"/>
      <text:p text:style-name="P213"/>
      <text:p text:style-name="P217"><text:span text:style-name="T592">8</text:span>/<text:span text:style-name="T592">2</text:span>/26</text:p>
      <text:p text:style-name="P200"/>
      <text:p text:style-name="P200"/>
      <text:p text:style-name="P254">r- <text:span text:style-name="T76">(25)</text:span><text:span text:style-name="T591"> </text:span>-<text:span text:style-name="T591">{h}</text:span>s <text:span text:style-name="T587">pw</text:span></text:p>
      <text:p text:style-name="P256">ir.n=f m HnH<text:span text:style-name="T588">[??]</text:span></text:p>
      <text:p text:style-name="P256"><text:span text:style-name="T589">a</text:span>h<text:span text:style-name="T589">a</text:span>.n Dd=f n pA Hm-nTr n <text:span text:style-name="T129">#nsw-pA-ir-sxr-m-WAs.t</text:span></text:p>
      <text:p text:style-name="P257"><text:span text:style-name="T129">n</text:span><text:span text:style-name="T77">Tr pn wn.n=f </text:span><text:span text:style-name="T150">di Hna &lt;</text:span><text:span text:style-name="T151">n&gt;n</text:span></text:p>
      <text:p text:style-name="P220"/>
      <text:p text:style-name="P220"/>
      <text:p text:style-name="P267">He a- <text:span text:style-name="T60">(25)</text:span> -woke [“There was waking”] [Gardiner sign D6] [F 152].</text:p>
      <text:p text:style-name="P269">He made as [??].</text:p>
      <text:p text:style-name="P271">Then he said, to the priest of Khonsu-the-Provider-in-Thebes,</text:p>
      <text:p text:style-name="P258">This god, <text:span text:style-name="T590">he is here with [u]s.</text:span></text:p>
      <text:p text:style-name="P2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.5in" fo:margin-right="0in" fo:margin-top="0in" fo:margin-bottom="0in" style:contextual-spacing="false" fo:line-height="100%" fo:text-align="start" style:justify-single-word="false" fo:orphans="2" fo:widows="2" fo:text-indent="-0.5in" style:auto-text-indent="false" style:page-number="auto" style:writing-mode="lr-tb">
        <style:tab-stops/>
      </style:paragraph-properties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9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1292</meta:editing-cycles>
    <meta:print-date>2025-02-09T21:44:00</meta:print-date>
    <meta:creation-date>2025-01-12T21:03:00</meta:creation-date>
    <dc:date>2026-07-12T15:13:25.307079547</dc:date>
    <meta:editing-duration>P6DT2H33M51S</meta:editing-duration>
    <meta:generator>LibreOffice/7.3.7.2$Linux_X86_64 LibreOffice_project/30$Build-2</meta:generator>
    <meta:document-statistic meta:table-count="1" meta:image-count="0" meta:object-count="0" meta:page-count="10" meta:paragraph-count="266" meta:word-count="2655" meta:character-count="14700" meta:non-whitespace-character-count="12303"/>
    <meta:user-defined meta:name="AppVersion">16.0000</meta:user-defined>
    <meta:template xlink:type="simple" xlink:actuate="onRequest" xlink:title="Normal" xlink:href=""/>
  </office:meta>
</office:document-meta>
</file>