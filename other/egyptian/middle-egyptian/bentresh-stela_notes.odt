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881bde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9ead77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bd2d16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6" style:family="paragraph" style:parent-style-name="Footnote">
      <style:text-properties officeooo:rsid="0203bf40" officeooo:paragraph-rsid="0203bf40"/>
    </style:style>
    <style:style style:name="P87" style:family="paragraph" style:parent-style-name="Footnote">
      <style:text-properties officeooo:rsid="020418e5" officeooo:paragraph-rsid="020418e5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e04f9" officeooo:paragraph-rsid="037e04f9" style:font-style-asian="normal" style:font-weight-asian="normal" style:font-name-complex="Times New Roman2" style:font-size-complex="12pt" style:font-style-complex="normal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f484d" officeooo:paragraph-rsid="037f484d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b4acf" officeooo:paragraph-rsid="038b4acf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6cd3d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7786a" officeooo:paragraph-rsid="0397786a" style:font-style-asian="normal" style:font-weight-asian="normal" style:font-name-complex="Times New Roman2" style:font-size-complex="12pt" style:font-style-complex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50" style:family="paragraph" style:parent-style-name="Footnote">
      <style:text-properties officeooo:rsid="02bbbc96" officeooo:paragraph-rsid="02bbbc96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e74641" style:font-style-asian="normal" style:font-weight-asian="normal" style:font-name-complex="Times New Roman2" style:font-size-complex="12pt" style:font-style-complex="normal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d53897" style:font-style-asian="normal" style:font-weight-asian="normal" style:font-name-complex="Times New Roman2" style:font-size-complex="12pt" style:font-style-complex="normal" style:font-weight-complex="normal"/>
    </style:style>
    <style:style style:name="P15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6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6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7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7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7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P17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768f31" officeooo:paragraph-rsid="037d0e1e" style:font-style-asian="normal" style:font-weight-asian="normal" style:font-name-complex="Times New Roman2" style:font-size-complex="12pt" style:font-style-complex="normal" style:font-weight-complex="normal"/>
    </style:style>
    <style:style style:name="P17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1a53c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7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560c0" officeooo:paragraph-rsid="038560c0" style:font-style-asian="normal" style:font-weight-asian="normal" style:font-name-complex="Times New Roman2" style:font-size-complex="12pt" style:font-style-complex="normal" style:font-weight-complex="normal"/>
    </style:style>
    <style:style style:name="P17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b69e0" officeooo:paragraph-rsid="038b69e0" style:font-style-asian="normal" style:font-weight-asian="normal" style:font-name-complex="Times New Roman2" style:font-size-complex="12pt" style:font-style-complex="normal" style:font-weight-complex="normal"/>
    </style:style>
    <style:style style:name="P17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7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80688" officeooo:paragraph-rsid="03980688" style:font-style-asian="normal" style:font-weight-asian="normal" style:font-name-complex="Times New Roman2" style:font-size-complex="12pt" style:font-style-complex="normal" style:font-weight-complex="normal"/>
    </style:style>
    <style:style style:name="P18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9d49a3" style:font-style-asian="normal" style:font-weight-asian="normal" style:font-name-complex="Times New Roman2" style:font-size-complex="12pt" style:font-style-complex="normal" style:font-weight-complex="normal"/>
    </style:style>
    <style:style style:name="P18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8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a1aaa9" officeooo:paragraph-rsid="03a1aaa9" style:font-style-asian="normal" style:font-weight-asian="normal" style:font-name-complex="Times New Roman2" style:font-size-complex="12pt" style:font-style-complex="normal" style:font-weight-complex="normal"/>
    </style:style>
    <style:style style:name="P18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50e1" officeooo:paragraph-rsid="03b450e1" style:font-style-asian="normal" style:font-weight-asian="normal" style:font-name-complex="Times New Roman2" style:font-size-complex="12pt" style:font-style-complex="normal" style:font-weight-complex="normal"/>
    </style:style>
    <style:style style:name="P18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c2c9" officeooo:paragraph-rsid="03b4c2c9" style:font-style-asian="normal" style:font-weight-asian="normal" style:font-name-complex="Times New Roman2" style:font-size-complex="12pt" style:font-style-complex="normal" style:font-weight-complex="normal"/>
    </style:style>
    <style:style style:name="P18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63608" officeooo:paragraph-rsid="03b63608" style:font-style-asian="normal" style:font-weight-asian="normal" style:font-name-complex="Times New Roman2" style:font-size-complex="12pt" style:font-style-complex="normal" style:font-weight-complex="normal"/>
    </style:style>
    <style:style style:name="P18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8331a" officeooo:paragraph-rsid="03b8331a" style:font-style-asian="normal" style:font-weight-asian="normal" style:font-name-complex="Times New Roman2" style:font-size-complex="12pt" style:font-style-complex="normal" style:font-weight-complex="normal"/>
    </style:style>
    <style:style style:name="P18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b4c90" officeooo:paragraph-rsid="03bb4c90" style:font-style-asian="normal" style:font-weight-asian="normal" style:font-name-complex="Times New Roman2" style:font-size-complex="12pt" style:font-style-complex="normal" style:font-weight-complex="normal"/>
    </style:style>
    <style:style style:name="P18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04bd4" officeooo:paragraph-rsid="03c631b4" style:font-style-asian="normal" style:font-weight-asian="normal" style:font-name-complex="Times New Roman2" style:font-size-complex="12pt" style:font-style-complex="normal" style:font-weight-complex="normal"/>
    </style:style>
    <style:style style:name="P18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935fd" officeooo:paragraph-rsid="03c935fd" style:font-style-asian="normal" style:font-weight-asian="normal" style:font-name-complex="Times New Roman2" style:font-size-complex="12pt" style:font-style-complex="normal" style:font-weight-complex="normal"/>
    </style:style>
    <style:style style:name="P19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54a28" officeooo:paragraph-rsid="03d54a28" style:font-style-asian="normal" style:font-weight-asian="normal" style:font-name-complex="Times New Roman2" style:font-size-complex="12pt" style:font-style-complex="normal" style:font-weight-complex="normal"/>
    </style:style>
    <style:style style:name="P19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675a6" officeooo:paragraph-rsid="03d675a6" style:font-style-asian="normal" style:font-weight-asian="normal" style:font-name-complex="Times New Roman2" style:font-size-complex="12pt" style:font-style-complex="normal" style:font-weight-complex="normal"/>
    </style:style>
    <style:style style:name="P19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d85a8" officeooo:paragraph-rsid="03dd85a8" style:font-style-asian="normal" style:font-weight-asian="normal" style:font-name-complex="Times New Roman2" style:font-size-complex="12pt" style:font-style-complex="normal" style:font-weight-complex="normal"/>
    </style:style>
    <style:style style:name="P19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edf2f" officeooo:paragraph-rsid="03dedf2f" style:font-style-asian="normal" style:font-weight-asian="normal" style:font-name-complex="Times New Roman2" style:font-size-complex="12pt" style:font-style-complex="normal" style:font-weight-complex="normal"/>
    </style:style>
    <style:style style:name="P19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13dce" officeooo:paragraph-rsid="03e13dce" style:font-style-asian="normal" style:font-weight-asian="normal" style:font-name-complex="Times New Roman2" style:font-size-complex="12pt" style:font-style-complex="normal" style:font-weight-complex="normal"/>
    </style:style>
    <style:style style:name="P19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5e1e9" officeooo:paragraph-rsid="03e5e1e9" style:font-style-asian="normal" style:font-weight-asian="normal" style:font-name-complex="Times New Roman2" style:font-size-complex="12pt" style:font-style-complex="normal" style:font-weight-complex="normal"/>
    </style:style>
    <style:style style:name="P19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3e74641" style:font-style-asian="normal" style:font-weight-asian="normal" style:font-name-complex="Times New Roman2" style:font-size-complex="12pt" style:font-style-complex="normal" style:font-weight-complex="normal"/>
    </style:style>
    <style:style style:name="P19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2ad21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19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19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3e74641" style:font-style-asian="normal" style:font-weight-asian="bold" style:font-name-complex="Times New Roman2" style:font-size-complex="12pt" style:font-style-complex="normal" style:font-weight-complex="bold"/>
    </style:style>
    <style:style style:name="P200" style:family="paragraph" style:parent-style-name="Footnote">
      <style:text-properties officeooo:rsid="039136cd" officeooo:paragraph-rsid="039136cd"/>
    </style:style>
    <style:style style:name="P20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38348e6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20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00168" officeooo:paragraph-rsid="03b1e0de" style:font-style-asian="normal" style:font-weight-asian="normal" style:font-name-complex="Times New Roman2" style:font-size-complex="12pt" style:font-style-complex="normal" style:font-weight-complex="normal"/>
    </style:style>
    <style:style style:name="P20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3cc6e" officeooo:paragraph-rsid="03a3cc6e" style:font-style-asian="normal" style:font-weight-asian="normal" style:font-name-complex="Times New Roman2" style:font-size-complex="12pt" style:font-style-complex="normal" style:font-weight-complex="normal"/>
    </style:style>
    <style:style style:name="P20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55b8d" officeooo:paragraph-rsid="03a55b8d" style:font-style-asian="normal" style:font-weight-asian="normal" style:font-name-complex="Times New Roman2" style:font-size-complex="12pt" style:font-style-complex="normal" style:font-weight-complex="normal"/>
    </style:style>
    <style:style style:name="P20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74945" officeooo:paragraph-rsid="03a74945" style:font-style-asian="normal" style:font-weight-asian="normal" style:font-name-complex="Times New Roman2" style:font-size-complex="12pt" style:font-style-complex="normal" style:font-weight-complex="normal"/>
    </style:style>
    <style:style style:name="P20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beae98" officeooo:paragraph-rsid="03c61ee7" style:font-style-asian="normal" style:font-weight-asian="normal" style:font-name-complex="Times New Roman2" style:font-size-complex="12pt" style:font-style-complex="normal" style:font-weight-complex="normal"/>
    </style:style>
    <style:style style:name="P20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75b06" officeooo:paragraph-rsid="03c75b06" style:font-style-asian="normal" style:font-weight-asian="normal" style:font-name-complex="Times New Roman2" style:font-size-complex="12pt" style:font-style-complex="normal" style:font-weight-complex="normal"/>
    </style:style>
    <style:style style:name="P20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d937d" officeooo:paragraph-rsid="03cd937d" style:font-style-asian="normal" style:font-weight-asian="normal" style:font-name-complex="Times New Roman2" style:font-size-complex="12pt" style:font-style-complex="normal" style:font-weight-complex="normal"/>
    </style:style>
    <style:style style:name="P20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e5325" officeooo:paragraph-rsid="03ce5325" style:font-style-asian="normal" style:font-weight-asian="normal" style:font-name-complex="Times New Roman2" style:font-size-complex="12pt" style:font-style-complex="normal" style:font-weight-complex="normal"/>
    </style:style>
    <style:style style:name="P21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282a3" officeooo:paragraph-rsid="03d282a3" style:font-style-asian="normal" style:font-weight-asian="normal" style:font-name-complex="Times New Roman2" style:font-size-complex="12pt" style:font-style-complex="normal" style:font-weight-complex="normal"/>
    </style:style>
    <style:style style:name="P21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282a3" officeooo:paragraph-rsid="03e07f23" style:font-style-asian="normal" style:font-weight-asian="normal" style:font-name-complex="Times New Roman2" style:font-size-complex="12pt" style:font-style-complex="normal" style:font-weight-complex="normal"/>
    </style:style>
    <style:style style:name="P21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53897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13" style:family="paragraph" style:parent-style-name="Heading_20_1" style:master-page-name="First_20_Page">
      <style:paragraph-properties style:page-number="auto"/>
    </style:style>
    <style:style style:name="P21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5e1e9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1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1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f9c24" officeooo:paragraph-rsid="03ef9c24" style:font-style-asian="normal" style:font-weight-asian="normal" style:font-name-complex="Times New Roman2" style:font-size-complex="12pt" style:font-style-complex="normal" style:font-weight-complex="normal"/>
    </style:style>
    <style:style style:name="P21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0877d" officeooo:paragraph-rsid="03f5165e" style:font-style-asian="normal" style:font-weight-asian="normal" style:font-name-complex="Times New Roman2" style:font-size-complex="12pt" style:font-style-complex="normal" style:font-weight-complex="normal"/>
    </style:style>
    <style:style style:name="P21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585b0" officeooo:paragraph-rsid="03f585b0" style:font-style-asian="normal" style:font-weight-asian="normal" style:font-name-complex="Times New Roman2" style:font-size-complex="12pt" style:font-style-complex="normal" style:font-weight-complex="normal"/>
    </style:style>
    <style:style style:name="P21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7e04f9" officeooo:paragraph-rsid="03fb8374" style:font-style-asian="normal" style:font-weight-asian="normal" style:font-name-complex="Times New Roman2" style:font-size-complex="12pt" style:font-style-complex="normal" style:font-weight-complex="normal"/>
    </style:style>
    <style:style style:name="P22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2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3fad3bf" style:font-style-asian="normal" style:font-weight-asian="normal" style:font-name-complex="Times New Roman2" style:font-size-complex="12pt" style:font-style-complex="normal" style:font-weight-complex="normal"/>
    </style:style>
    <style:style style:name="P22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fad3bf" style:font-style-asian="normal" style:font-weight-asian="normal" style:font-name-complex="Times New Roman2" style:font-size-complex="12pt" style:font-style-complex="normal" style:font-weight-complex="normal"/>
    </style:style>
    <style:style style:name="P22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160f0" officeooo:paragraph-rsid="040160f0" style:font-style-asian="normal" style:font-weight-asian="normal" style:font-name-complex="Times New Roman2" style:font-size-complex="12pt" style:font-style-complex="normal" style:font-weight-complex="normal"/>
    </style:style>
    <style:style style:name="P22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1b4fb" officeooo:paragraph-rsid="0401b4fb" style:font-style-asian="normal" style:font-weight-asian="normal" style:font-name-complex="Times New Roman2" style:font-size-complex="12pt" style:font-style-complex="normal" style:font-weight-complex="normal"/>
    </style:style>
    <style:style style:name="P22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3ae36" officeooo:paragraph-rsid="0403ae36" style:font-style-asian="normal" style:font-weight-asian="normal" style:font-name-complex="Times New Roman2" style:font-size-complex="12pt" style:font-style-complex="normal" style:font-weight-complex="normal"/>
    </style:style>
    <style:style style:name="P22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45408" officeooo:paragraph-rsid="04045408" style:font-style-asian="normal" style:font-weight-asian="normal" style:font-name-complex="Times New Roman2" style:font-size-complex="12pt" style:font-style-complex="normal" style:font-weight-complex="normal"/>
    </style:style>
    <style:style style:name="P22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3fad3bf" style:font-style-asian="normal" style:font-weight-asian="bold" style:font-name-complex="Times New Roman2" style:font-size-complex="12pt" style:font-style-complex="normal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39a861e" style:font-style-asian="italic" style:font-style-complex="italic"/>
    </style:style>
    <style:style style:name="T52" style:family="text">
      <style:text-properties fo:font-style="italic" officeooo:rsid="0405ca6a" style:font-style-asian="italic" style:font-style-complex="italic"/>
    </style:style>
    <style:style style:name="T53" style:family="text">
      <style:text-properties fo:font-weight="bold" style:font-weight-asian="bold" style:font-name-complex="Times New Roman2" style:font-size-complex="12pt" style:font-weight-complex="bold"/>
    </style:style>
    <style:style style:name="T54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5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6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de14a5" style:font-weight-asian="bold" style:font-weight-complex="bold"/>
    </style:style>
    <style:style style:name="T59" style:family="text">
      <style:text-properties fo:font-weight="bold" officeooo:rsid="025f4ee2" style:font-weight-asian="bold" style:font-weight-complex="bold"/>
    </style:style>
    <style:style style:name="T60" style:family="text">
      <style:text-properties fo:font-weight="bold" officeooo:rsid="02a7088a" style:font-weight-asian="bold" style:font-weight-complex="bold"/>
    </style:style>
    <style:style style:name="T61" style:family="text">
      <style:text-properties fo:font-weight="bold" officeooo:rsid="02d6eabc" style:font-weight-asian="bold" style:font-weight-complex="bold"/>
    </style:style>
    <style:style style:name="T62" style:family="text">
      <style:text-properties fo:font-weight="bold" officeooo:rsid="02dc920d" style:font-weight-asian="bold" style:font-weight-complex="bold"/>
    </style:style>
    <style:style style:name="T63" style:family="text">
      <style:text-properties fo:font-weight="bold" officeooo:rsid="032943d9" style:font-weight-asian="bold" style:font-weight-complex="bold"/>
    </style:style>
    <style:style style:name="T64" style:family="text">
      <style:text-properties fo:font-weight="bold" officeooo:rsid="02e52838" style:font-weight-asian="bold" style:font-weight-complex="bold"/>
    </style:style>
    <style:style style:name="T65" style:family="text">
      <style:text-properties fo:font-weight="bold" officeooo:rsid="03598608" style:font-weight-asian="bold" style:font-weight-complex="bold"/>
    </style:style>
    <style:style style:name="T66" style:family="text">
      <style:text-properties fo:font-weight="bold" officeooo:rsid="03768f31" style:font-weight-asian="bold" style:font-weight-complex="bold"/>
    </style:style>
    <style:style style:name="T67" style:family="text">
      <style:text-properties fo:font-weight="bold" officeooo:rsid="038716e0" style:font-weight-asian="bold" style:font-weight-complex="bold"/>
    </style:style>
    <style:style style:name="T68" style:family="text">
      <style:text-properties fo:font-weight="bold" officeooo:rsid="03a337f2" style:font-weight-asian="bold" style:font-weight-complex="bold"/>
    </style:style>
    <style:style style:name="T69" style:family="text">
      <style:text-properties fo:font-weight="bold" officeooo:rsid="03ae6e70" style:font-weight-asian="bold" style:font-weight-complex="bold"/>
    </style:style>
    <style:style style:name="T70" style:family="text">
      <style:text-properties fo:font-weight="bold" officeooo:rsid="03cb0426" style:font-weight-asian="bold" style:font-weight-complex="bold"/>
    </style:style>
    <style:style style:name="T71" style:family="text">
      <style:text-properties fo:font-weight="bold" officeooo:rsid="03c44ca4" style:font-weight-asian="bold" style:font-weight-complex="bold"/>
    </style:style>
    <style:style style:name="T72" style:family="text">
      <style:text-properties fo:font-weight="bold" officeooo:rsid="03ef9c24" style:font-weight-asian="bold" style:font-weight-complex="bold"/>
    </style:style>
    <style:style style:name="T73" style:family="text">
      <style:text-properties style:font-name="Transliteration1"/>
    </style:style>
    <style:style style:name="T74" style:family="text">
      <style:text-properties style:font-name="Transliteration1" style:font-name-complex="Times New Roman2" style:font-size-complex="12pt"/>
    </style:style>
    <style:style style:name="T75" style:family="text">
      <style:text-properties style:font-name="Transliteration1" officeooo:rsid="01af8865" style:font-name-complex="Times New Roman2" style:font-size-complex="12pt"/>
    </style:style>
    <style:style style:name="T76" style:family="text">
      <style:text-properties style:font-name="Transliteration1" officeooo:rsid="01b6a868" style:font-name-complex="Times New Roman2" style:font-size-complex="12pt"/>
    </style:style>
    <style:style style:name="T77" style:family="text">
      <style:text-properties style:font-name="Transliteration1" officeooo:rsid="01b824db" style:font-name-complex="Times New Roman2" style:font-size-complex="12pt"/>
    </style:style>
    <style:style style:name="T78" style:family="text">
      <style:text-properties style:font-name="Transliteration1" officeooo:rsid="01b903ad" style:font-name-complex="Times New Roman2" style:font-size-complex="12pt"/>
    </style:style>
    <style:style style:name="T79" style:family="text">
      <style:text-properties style:font-name="Transliteration1" officeooo:rsid="01b9d1b8" style:font-name-complex="Times New Roman2" style:font-size-complex="12pt"/>
    </style:style>
    <style:style style:name="T80" style:family="text">
      <style:text-properties style:font-name="Transliteration1" officeooo:rsid="01ba7b25" style:font-name-complex="Times New Roman2" style:font-size-complex="12pt"/>
    </style:style>
    <style:style style:name="T81" style:family="text">
      <style:text-properties style:font-name="Transliteration1" officeooo:rsid="01bb6611" style:font-name-complex="Times New Roman2" style:font-size-complex="12pt"/>
    </style:style>
    <style:style style:name="T82" style:family="text">
      <style:text-properties style:font-name="Transliteration1" officeooo:rsid="01bd9025" style:font-name-complex="Times New Roman2" style:font-size-complex="12pt"/>
    </style:style>
    <style:style style:name="T83" style:family="text">
      <style:text-properties style:font-name="Transliteration1" officeooo:rsid="01bf10ab" style:font-name-complex="Times New Roman2" style:font-size-complex="12pt"/>
    </style:style>
    <style:style style:name="T84" style:family="text">
      <style:text-properties style:font-name="Transliteration1" officeooo:rsid="01c261d7" style:font-name-complex="Times New Roman2" style:font-size-complex="12pt"/>
    </style:style>
    <style:style style:name="T85" style:family="text">
      <style:text-properties style:font-name="Transliteration1" officeooo:rsid="01c3673a" style:font-name-complex="Times New Roman2" style:font-size-complex="12pt"/>
    </style:style>
    <style:style style:name="T86" style:family="text">
      <style:text-properties style:font-name="Transliteration1" officeooo:rsid="01c3b4d7" style:font-name-complex="Times New Roman2" style:font-size-complex="12pt"/>
    </style:style>
    <style:style style:name="T87" style:family="text">
      <style:text-properties style:font-name="Transliteration1" officeooo:rsid="01c854a0" style:font-name-complex="Times New Roman2" style:font-size-complex="12pt"/>
    </style:style>
    <style:style style:name="T88" style:family="text">
      <style:text-properties style:font-name="Transliteration1" officeooo:rsid="01c972dc" style:font-name-complex="Times New Roman2" style:font-size-complex="12pt"/>
    </style:style>
    <style:style style:name="T89" style:family="text">
      <style:text-properties style:font-name="Transliteration1" officeooo:rsid="01cad4a6" style:font-name-complex="Times New Roman2" style:font-size-complex="12pt"/>
    </style:style>
    <style:style style:name="T90" style:family="text">
      <style:text-properties style:font-name="Transliteration1" officeooo:rsid="01cbb55b" style:font-name-complex="Times New Roman2" style:font-size-complex="12pt"/>
    </style:style>
    <style:style style:name="T91" style:family="text">
      <style:text-properties style:font-name="Transliteration1" officeooo:rsid="01cc98b2" style:font-name-complex="Times New Roman2" style:font-size-complex="12pt"/>
    </style:style>
    <style:style style:name="T92" style:family="text">
      <style:text-properties style:font-name="Transliteration1" officeooo:rsid="01ce2d0b" style:font-name-complex="Times New Roman2" style:font-size-complex="12pt"/>
    </style:style>
    <style:style style:name="T93" style:family="text">
      <style:text-properties style:font-name="Transliteration1" officeooo:rsid="01d35e4c" style:font-name-complex="Times New Roman2" style:font-size-complex="12pt"/>
    </style:style>
    <style:style style:name="T94" style:family="text">
      <style:text-properties style:font-name="Transliteration1" officeooo:rsid="01d77a9b" style:font-name-complex="Times New Roman2" style:font-size-complex="12pt"/>
    </style:style>
    <style:style style:name="T95" style:family="text">
      <style:text-properties style:font-name="Transliteration1" officeooo:rsid="01de14a5" style:font-name-complex="Times New Roman2" style:font-size-complex="12pt"/>
    </style:style>
    <style:style style:name="T96" style:family="text">
      <style:text-properties style:font-name="Transliteration1" officeooo:rsid="02a0c07d" style:font-name-complex="Times New Roman2" style:font-size-complex="12pt"/>
    </style:style>
    <style:style style:name="T97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98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99" style:family="text">
      <style:text-properties style:font-name="Transliteration1" officeooo:rsid="01b9d1b8"/>
    </style:style>
    <style:style style:name="T100" style:family="text">
      <style:text-properties style:font-name="Transliteration1" officeooo:rsid="01c3673a"/>
    </style:style>
    <style:style style:name="T101" style:family="text">
      <style:text-properties style:font-name="Transliteration1" officeooo:rsid="01cbb55b"/>
    </style:style>
    <style:style style:name="T102" style:family="text">
      <style:text-properties style:font-name="Transliteration1" officeooo:rsid="01cc98b2"/>
    </style:style>
    <style:style style:name="T103" style:family="text">
      <style:text-properties style:font-name="Transliteration1" officeooo:rsid="03e2ad21"/>
    </style:style>
    <style:style style:name="T104" style:family="text">
      <style:text-properties style:font-name="Transliteration1" officeooo:rsid="0381a53c"/>
    </style:style>
    <style:style style:name="T105" style:family="text">
      <style:text-properties style:font-name="Transliteration1" officeooo:rsid="03ff6ea9"/>
    </style:style>
    <style:style style:name="T106" style:family="text">
      <style:text-properties style:font-name="Transliteration1" officeooo:rsid="0400760a"/>
    </style:style>
    <style:style style:name="T107" style:family="text">
      <style:text-properties fo:font-style="normal" style:font-style-asian="normal" style:font-name-complex="Times New Roman2" style:font-size-complex="12pt" style:font-style-complex="normal"/>
    </style:style>
    <style:style style:name="T108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109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110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116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117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118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19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20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21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22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23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24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25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26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27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28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29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30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31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32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33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34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35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36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37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38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39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40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41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42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43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44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45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46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47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48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195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196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197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198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199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200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201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202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203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204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205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206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207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208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209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210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211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212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213" style:family="text">
      <style:text-properties fo:font-style="normal" officeooo:rsid="0374bbe6" style:font-style-asian="normal" style:font-name-complex="Times New Roman2" style:font-size-complex="12pt" style:font-style-complex="normal"/>
    </style:style>
    <style:style style:name="T214" style:family="text">
      <style:text-properties fo:font-style="normal" officeooo:rsid="039ead77" style:font-style-asian="normal" style:font-name-complex="Times New Roman2" style:font-size-complex="12pt" style:font-style-complex="normal"/>
    </style:style>
    <style:style style:name="T215" style:family="text">
      <style:text-properties fo:font-style="normal" officeooo:rsid="03bd2d16" style:font-style-asian="normal" style:font-name-complex="Times New Roman2" style:font-size-complex="12pt" style:font-style-complex="normal"/>
    </style:style>
    <style:style style:name="T216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217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218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219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220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21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22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23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24" style:family="text">
      <style:text-properties officeooo:rsid="019bc138"/>
    </style:style>
    <style:style style:name="T225" style:family="text">
      <style:text-properties officeooo:rsid="01a55361"/>
    </style:style>
    <style:style style:name="T226" style:family="text">
      <style:text-properties style:font-name="Transliteration"/>
    </style:style>
    <style:style style:name="T227" style:family="text">
      <style:text-properties style:font-name="Transliteration" officeooo:rsid="01bf10ab" style:font-name-complex="Times New Roman2" style:font-size-complex="12pt"/>
    </style:style>
    <style:style style:name="T228" style:family="text">
      <style:text-properties style:font-name="Transliteration" officeooo:rsid="01cad4a6" style:font-name-complex="Times New Roman2" style:font-size-complex="12pt"/>
    </style:style>
    <style:style style:name="T229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30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31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32" style:family="text">
      <style:text-properties style:font-name="Transliteration" officeooo:rsid="020418e5"/>
    </style:style>
    <style:style style:name="T233" style:family="text">
      <style:text-properties style:font-name="Transliteration" officeooo:rsid="025745bd"/>
    </style:style>
    <style:style style:name="T234" style:family="text">
      <style:text-properties style:font-name="Transliteration" officeooo:rsid="029f16e9"/>
    </style:style>
    <style:style style:name="T235" style:family="text">
      <style:text-properties style:font-name="Transliteration" officeooo:rsid="02bda874"/>
    </style:style>
    <style:style style:name="T236" style:family="text">
      <style:text-properties style:font-name="Transliteration" officeooo:rsid="030046e2"/>
    </style:style>
    <style:style style:name="T237" style:family="text">
      <style:text-properties style:font-name="Transliteration" officeooo:rsid="0357e92b"/>
    </style:style>
    <style:style style:name="T238" style:family="text">
      <style:text-properties style:font-name="Transliteration" officeooo:rsid="03ac884b"/>
    </style:style>
    <style:style style:name="T239" style:family="text">
      <style:text-properties officeooo:rsid="01c3851d"/>
    </style:style>
    <style:style style:name="T240" style:family="text">
      <style:text-properties officeooo:rsid="01c4d4c4"/>
    </style:style>
    <style:style style:name="T241" style:family="text">
      <style:text-properties officeooo:rsid="01d5f246"/>
    </style:style>
    <style:style style:name="T242" style:family="text">
      <style:text-properties officeooo:rsid="01d77a9b"/>
    </style:style>
    <style:style style:name="T243" style:family="text">
      <style:text-properties officeooo:rsid="01db2508"/>
    </style:style>
    <style:style style:name="T244" style:family="text">
      <style:text-properties officeooo:rsid="01de14a5"/>
    </style:style>
    <style:style style:name="T245" style:family="text">
      <style:text-properties officeooo:rsid="01e17e96"/>
    </style:style>
    <style:style style:name="T246" style:family="text">
      <style:text-properties officeooo:rsid="01e3e1e7"/>
    </style:style>
    <style:style style:name="T247" style:family="text">
      <style:text-properties officeooo:rsid="01e5305c"/>
    </style:style>
    <style:style style:name="T248" style:family="text">
      <style:text-properties officeooo:rsid="01e8d8ca"/>
    </style:style>
    <style:style style:name="T249" style:family="text">
      <style:text-properties officeooo:rsid="01ef44e0"/>
    </style:style>
    <style:style style:name="T250" style:family="text">
      <style:text-properties officeooo:rsid="02440f4b"/>
    </style:style>
    <style:style style:name="T251" style:family="text">
      <style:text-properties officeooo:rsid="024a16bb"/>
    </style:style>
    <style:style style:name="T252" style:family="text">
      <style:text-properties officeooo:rsid="024c80cc"/>
    </style:style>
    <style:style style:name="T253" style:family="text">
      <style:text-properties officeooo:rsid="025745bd"/>
    </style:style>
    <style:style style:name="T254" style:family="text">
      <style:text-properties officeooo:rsid="025ad19f"/>
    </style:style>
    <style:style style:name="T255" style:family="text">
      <style:text-properties officeooo:rsid="025bb2fa"/>
    </style:style>
    <style:style style:name="T256" style:family="text">
      <style:text-properties officeooo:rsid="025d0ff2"/>
    </style:style>
    <style:style style:name="T257" style:family="text">
      <style:text-properties officeooo:rsid="0266b04b"/>
    </style:style>
    <style:style style:name="T258" style:family="text">
      <style:text-properties officeooo:rsid="02691be0"/>
    </style:style>
    <style:style style:name="T259" style:family="text">
      <style:text-properties officeooo:rsid="026dc537"/>
    </style:style>
    <style:style style:name="T260" style:family="text">
      <style:text-properties officeooo:rsid="027045c5"/>
    </style:style>
    <style:style style:name="T261" style:family="text">
      <style:text-properties officeooo:rsid="02715978"/>
    </style:style>
    <style:style style:name="T262" style:family="text">
      <style:text-properties officeooo:rsid="0276fbb7"/>
    </style:style>
    <style:style style:name="T263" style:family="text">
      <style:text-properties officeooo:rsid="027887ec"/>
    </style:style>
    <style:style style:name="T264" style:family="text">
      <style:text-properties officeooo:rsid="027eb967"/>
    </style:style>
    <style:style style:name="T265" style:family="text">
      <style:text-properties officeooo:rsid="027eb9e1"/>
    </style:style>
    <style:style style:name="T266" style:family="text">
      <style:text-properties officeooo:rsid="027f1a42"/>
    </style:style>
    <style:style style:name="T267" style:family="text">
      <style:text-properties officeooo:rsid="028ea34d"/>
    </style:style>
    <style:style style:name="T268" style:family="text">
      <style:text-properties officeooo:rsid="028f3e5a"/>
    </style:style>
    <style:style style:name="T269" style:family="text">
      <style:text-properties officeooo:rsid="0293afa3"/>
    </style:style>
    <style:style style:name="T270" style:family="text">
      <style:text-properties officeooo:rsid="02947fdd"/>
    </style:style>
    <style:style style:name="T271" style:family="text">
      <style:text-properties officeooo:rsid="0295c253"/>
    </style:style>
    <style:style style:name="T272" style:family="text">
      <style:text-properties officeooo:rsid="02970406"/>
    </style:style>
    <style:style style:name="T273" style:family="text">
      <style:text-properties officeooo:rsid="0297ec39"/>
    </style:style>
    <style:style style:name="T274" style:family="text">
      <style:text-properties officeooo:rsid="029b59f5"/>
    </style:style>
    <style:style style:name="T275" style:family="text">
      <style:text-properties officeooo:rsid="029d0a25"/>
    </style:style>
    <style:style style:name="T276" style:family="text">
      <style:text-properties officeooo:rsid="029f16e9"/>
    </style:style>
    <style:style style:name="T277" style:family="text">
      <style:text-properties officeooo:rsid="029f95be"/>
    </style:style>
    <style:style style:name="T278" style:family="text">
      <style:text-properties officeooo:rsid="02a02062"/>
    </style:style>
    <style:style style:name="T279" style:family="text">
      <style:text-properties officeooo:rsid="02a2033b"/>
    </style:style>
    <style:style style:name="T280" style:family="text">
      <style:text-properties officeooo:rsid="02a7088a"/>
    </style:style>
    <style:style style:name="T281" style:family="text">
      <style:text-properties officeooo:rsid="02a8c64e"/>
    </style:style>
    <style:style style:name="T282" style:family="text">
      <style:text-properties officeooo:rsid="02a9c9a0"/>
    </style:style>
    <style:style style:name="T283" style:family="text">
      <style:text-properties officeooo:rsid="02aa3e62"/>
    </style:style>
    <style:style style:name="T284" style:family="text">
      <style:text-properties officeooo:rsid="02b0334c"/>
    </style:style>
    <style:style style:name="T285" style:family="text">
      <style:text-properties officeooo:rsid="02b1ff7e"/>
    </style:style>
    <style:style style:name="T286" style:family="text">
      <style:text-properties officeooo:rsid="02b2008c"/>
    </style:style>
    <style:style style:name="T287" style:family="text">
      <style:text-properties officeooo:rsid="0256b750"/>
    </style:style>
    <style:style style:name="T288" style:family="text">
      <style:text-properties officeooo:rsid="02b61928"/>
    </style:style>
    <style:style style:name="T289" style:family="text">
      <style:text-properties officeooo:rsid="02bbbc96"/>
    </style:style>
    <style:style style:name="T290" style:family="text">
      <style:text-properties officeooo:rsid="02bea321"/>
    </style:style>
    <style:style style:name="T291" style:family="text">
      <style:text-properties officeooo:rsid="02c0933e"/>
    </style:style>
    <style:style style:name="T292" style:family="text">
      <style:text-properties officeooo:rsid="02c105d2"/>
    </style:style>
    <style:style style:name="T293" style:family="text">
      <style:text-properties officeooo:rsid="02c22b77"/>
    </style:style>
    <style:style style:name="T294" style:family="text">
      <style:text-properties officeooo:rsid="02c4179b"/>
    </style:style>
    <style:style style:name="T295" style:family="text">
      <style:text-properties officeooo:rsid="02c46c36"/>
    </style:style>
    <style:style style:name="T296" style:family="text">
      <style:text-properties officeooo:rsid="02c77a05"/>
    </style:style>
    <style:style style:name="T297" style:family="text">
      <style:text-properties officeooo:rsid="02caebe4"/>
    </style:style>
    <style:style style:name="T298" style:family="text">
      <style:text-properties officeooo:rsid="02ceda45"/>
    </style:style>
    <style:style style:name="T299" style:family="text">
      <style:text-properties officeooo:rsid="02d184f4"/>
    </style:style>
    <style:style style:name="T300" style:family="text">
      <style:text-properties officeooo:rsid="02d6eabc"/>
    </style:style>
    <style:style style:name="T301" style:family="text">
      <style:text-properties officeooo:rsid="02d87694"/>
    </style:style>
    <style:style style:name="T302" style:family="text">
      <style:text-properties officeooo:rsid="02d93565"/>
    </style:style>
    <style:style style:name="T303" style:family="text">
      <style:text-properties officeooo:rsid="02db814c"/>
    </style:style>
    <style:style style:name="T304" style:family="text">
      <style:text-properties officeooo:rsid="02dc920d"/>
    </style:style>
    <style:style style:name="T305" style:family="text">
      <style:text-properties officeooo:rsid="02dd2b19"/>
    </style:style>
    <style:style style:name="T306" style:family="text">
      <style:text-properties officeooo:rsid="02de82dd"/>
    </style:style>
    <style:style style:name="T307" style:family="text">
      <style:text-properties officeooo:rsid="02e00fd6"/>
    </style:style>
    <style:style style:name="T308" style:family="text">
      <style:text-properties officeooo:rsid="02e20158"/>
    </style:style>
    <style:style style:name="T309" style:family="text">
      <style:text-properties officeooo:rsid="02e52838"/>
    </style:style>
    <style:style style:name="T310" style:family="text">
      <style:text-properties officeooo:rsid="02e5b47d"/>
    </style:style>
    <style:style style:name="T311" style:family="text">
      <style:text-properties officeooo:rsid="02e67a3b"/>
    </style:style>
    <style:style style:name="T312" style:family="text">
      <style:text-properties officeooo:rsid="02e7dd85"/>
    </style:style>
    <style:style style:name="T313" style:family="text">
      <style:text-properties officeooo:rsid="02e9158c"/>
    </style:style>
    <style:style style:name="T314" style:family="text">
      <style:text-properties officeooo:rsid="02eac353"/>
    </style:style>
    <style:style style:name="T315" style:family="text">
      <style:text-properties officeooo:rsid="02ed24ae"/>
    </style:style>
    <style:style style:name="T316" style:family="text">
      <style:text-properties officeooo:rsid="02ee767e"/>
    </style:style>
    <style:style style:name="T317" style:family="text">
      <style:text-properties officeooo:rsid="02efcf31"/>
    </style:style>
    <style:style style:name="T318" style:family="text">
      <style:text-properties officeooo:rsid="02f0c0de"/>
    </style:style>
    <style:style style:name="T319" style:family="text">
      <style:text-properties officeooo:rsid="02f2e21f"/>
    </style:style>
    <style:style style:name="T320" style:family="text">
      <style:text-properties officeooo:rsid="02f3688d"/>
    </style:style>
    <style:style style:name="T321" style:family="text">
      <style:text-properties officeooo:rsid="02f592de"/>
    </style:style>
    <style:style style:name="T322" style:family="text">
      <style:text-properties officeooo:rsid="02f8fadd"/>
    </style:style>
    <style:style style:name="T323" style:family="text">
      <style:text-properties officeooo:rsid="02fab54e"/>
    </style:style>
    <style:style style:name="T324" style:family="text">
      <style:text-properties officeooo:rsid="02fb3f60"/>
    </style:style>
    <style:style style:name="T325" style:family="text">
      <style:text-properties officeooo:rsid="02fcbabe"/>
    </style:style>
    <style:style style:name="T326" style:family="text">
      <style:text-properties officeooo:rsid="02fd969a"/>
    </style:style>
    <style:style style:name="T327" style:family="text">
      <style:text-properties officeooo:rsid="02fe0376"/>
    </style:style>
    <style:style style:name="T328" style:family="text">
      <style:text-properties officeooo:rsid="02ff76fe"/>
    </style:style>
    <style:style style:name="T329" style:family="text">
      <style:text-properties officeooo:rsid="030046e2"/>
    </style:style>
    <style:style style:name="T330" style:family="text">
      <style:text-properties officeooo:rsid="03022d1d"/>
    </style:style>
    <style:style style:name="T331" style:family="text">
      <style:text-properties officeooo:rsid="0303ef5e"/>
    </style:style>
    <style:style style:name="T332" style:family="text">
      <style:text-properties officeooo:rsid="03046fb2"/>
    </style:style>
    <style:style style:name="T333" style:family="text">
      <style:text-properties officeooo:rsid="03064108"/>
    </style:style>
    <style:style style:name="T334" style:family="text">
      <style:text-properties officeooo:rsid="030f8e93"/>
    </style:style>
    <style:style style:name="T335" style:family="text">
      <style:text-properties officeooo:rsid="0310f661"/>
    </style:style>
    <style:style style:name="T336" style:family="text">
      <style:text-properties officeooo:rsid="031277d4"/>
    </style:style>
    <style:style style:name="T337" style:family="text">
      <style:text-properties officeooo:rsid="0312fcc4"/>
    </style:style>
    <style:style style:name="T338" style:family="text">
      <style:text-properties officeooo:rsid="0314c907"/>
    </style:style>
    <style:style style:name="T339" style:family="text">
      <style:text-properties officeooo:rsid="03163ce8"/>
    </style:style>
    <style:style style:name="T340" style:family="text">
      <style:text-properties officeooo:rsid="031819a2"/>
    </style:style>
    <style:style style:name="T341" style:family="text">
      <style:text-properties officeooo:rsid="03188350"/>
    </style:style>
    <style:style style:name="T342" style:family="text">
      <style:text-properties officeooo:rsid="03195f85"/>
    </style:style>
    <style:style style:name="T343" style:family="text">
      <style:text-properties officeooo:rsid="0319edd6"/>
    </style:style>
    <style:style style:name="T344" style:family="text">
      <style:text-properties officeooo:rsid="031bcf75"/>
    </style:style>
    <style:style style:name="T345" style:family="text">
      <style:text-properties officeooo:rsid="031cb3fc"/>
    </style:style>
    <style:style style:name="T346" style:family="text">
      <style:text-properties officeooo:rsid="031cd793"/>
    </style:style>
    <style:style style:name="T347" style:family="text">
      <style:text-properties officeooo:rsid="032080b1"/>
    </style:style>
    <style:style style:name="T348" style:family="text">
      <style:text-properties officeooo:rsid="0324a5dd"/>
    </style:style>
    <style:style style:name="T349" style:family="text">
      <style:text-properties officeooo:rsid="03252e67"/>
    </style:style>
    <style:style style:name="T350" style:family="text">
      <style:text-properties officeooo:rsid="03259599"/>
    </style:style>
    <style:style style:name="T351" style:family="text">
      <style:text-properties officeooo:rsid="0325eac1"/>
    </style:style>
    <style:style style:name="T352" style:family="text">
      <style:text-properties officeooo:rsid="0327bc17"/>
    </style:style>
    <style:style style:name="T353" style:family="text">
      <style:text-properties officeooo:rsid="032943d9"/>
    </style:style>
    <style:style style:name="T354" style:family="text">
      <style:text-properties officeooo:rsid="032c9a73"/>
    </style:style>
    <style:style style:name="T355" style:family="text">
      <style:text-properties officeooo:rsid="032d69bf"/>
    </style:style>
    <style:style style:name="T356" style:family="text">
      <style:text-properties officeooo:rsid="033158a2"/>
    </style:style>
    <style:style style:name="T357" style:family="text">
      <style:text-properties officeooo:rsid="0331da63"/>
    </style:style>
    <style:style style:name="T358" style:family="text">
      <style:text-properties officeooo:rsid="03338d99"/>
    </style:style>
    <style:style style:name="T359" style:family="text">
      <style:text-properties officeooo:rsid="03357423"/>
    </style:style>
    <style:style style:name="T360" style:family="text">
      <style:text-properties officeooo:rsid="033b4b47"/>
    </style:style>
    <style:style style:name="T361" style:family="text">
      <style:text-properties officeooo:rsid="033d6cd5"/>
    </style:style>
    <style:style style:name="T362" style:family="text">
      <style:text-properties officeooo:rsid="033dea4f"/>
    </style:style>
    <style:style style:name="T363" style:family="text">
      <style:text-properties officeooo:rsid="034192ee"/>
    </style:style>
    <style:style style:name="T364" style:family="text">
      <style:text-properties officeooo:rsid="0345faf9"/>
    </style:style>
    <style:style style:name="T365" style:family="text">
      <style:text-properties officeooo:rsid="03475744"/>
    </style:style>
    <style:style style:name="T366" style:family="text">
      <style:text-properties officeooo:rsid="0348e06e"/>
    </style:style>
    <style:style style:name="T367" style:family="text">
      <style:text-properties officeooo:rsid="034a4b42"/>
    </style:style>
    <style:style style:name="T368" style:family="text">
      <style:text-properties officeooo:rsid="034aa78b"/>
    </style:style>
    <style:style style:name="T369" style:family="text">
      <style:text-properties officeooo:rsid="034c25e5"/>
    </style:style>
    <style:style style:name="T370" style:family="text">
      <style:text-properties officeooo:rsid="034e75c0"/>
    </style:style>
    <style:style style:name="T371" style:family="text">
      <style:text-properties officeooo:rsid="034f0e4c"/>
    </style:style>
    <style:style style:name="T372" style:family="text">
      <style:text-properties officeooo:rsid="0350a5b5"/>
    </style:style>
    <style:style style:name="T373" style:family="text">
      <style:text-properties officeooo:rsid="03511110"/>
    </style:style>
    <style:style style:name="T374" style:family="text">
      <style:text-properties officeooo:rsid="0352a33b"/>
    </style:style>
    <style:style style:name="T375" style:family="text">
      <style:text-properties officeooo:rsid="03542469"/>
    </style:style>
    <style:style style:name="T376" style:family="text">
      <style:text-properties officeooo:rsid="0354fed6"/>
    </style:style>
    <style:style style:name="T377" style:family="text">
      <style:text-properties officeooo:rsid="03566a6b"/>
    </style:style>
    <style:style style:name="T378" style:family="text">
      <style:text-properties officeooo:rsid="0357e92b"/>
    </style:style>
    <style:style style:name="T379" style:family="text">
      <style:text-properties officeooo:rsid="0358f4de"/>
    </style:style>
    <style:style style:name="T380" style:family="text">
      <style:text-properties officeooo:rsid="03598608"/>
    </style:style>
    <style:style style:name="T381" style:family="text">
      <style:text-properties officeooo:rsid="035a6ce8"/>
    </style:style>
    <style:style style:name="T382" style:family="text">
      <style:text-properties officeooo:rsid="035d07c8"/>
    </style:style>
    <style:style style:name="T383" style:family="text">
      <style:text-properties officeooo:rsid="035ea621"/>
    </style:style>
    <style:style style:name="T384" style:family="text">
      <style:text-properties officeooo:rsid="03620837"/>
    </style:style>
    <style:style style:name="T385" style:family="text">
      <style:text-properties officeooo:rsid="0362c918"/>
    </style:style>
    <style:style style:name="T386" style:family="text">
      <style:text-properties officeooo:rsid="03633187"/>
    </style:style>
    <style:style style:name="T387" style:family="text">
      <style:text-properties officeooo:rsid="0363feaf"/>
    </style:style>
    <style:style style:name="T388" style:family="text">
      <style:text-properties officeooo:rsid="0364dcde"/>
    </style:style>
    <style:style style:name="T389" style:family="text">
      <style:text-properties officeooo:rsid="0364ebdd"/>
    </style:style>
    <style:style style:name="T390" style:family="text">
      <style:text-properties officeooo:rsid="03682c8f"/>
    </style:style>
    <style:style style:name="T391" style:family="text">
      <style:text-properties officeooo:rsid="0368e650"/>
    </style:style>
    <style:style style:name="T392" style:family="text">
      <style:text-properties officeooo:rsid="0369d67a"/>
    </style:style>
    <style:style style:name="T393" style:family="text">
      <style:text-properties officeooo:rsid="036ae07b"/>
    </style:style>
    <style:style style:name="T394" style:family="text">
      <style:text-properties officeooo:rsid="036c28de"/>
    </style:style>
    <style:style style:name="T395" style:family="text">
      <style:text-properties officeooo:rsid="036d5a91"/>
    </style:style>
    <style:style style:name="T396" style:family="text">
      <style:text-properties officeooo:rsid="036ffe92"/>
    </style:style>
    <style:style style:name="T397" style:family="text">
      <style:text-properties officeooo:rsid="03715fd1"/>
    </style:style>
    <style:style style:name="T398" style:family="text">
      <style:text-properties officeooo:rsid="03722fdc"/>
    </style:style>
    <style:style style:name="T399" style:family="text">
      <style:text-properties officeooo:rsid="03768f31"/>
    </style:style>
    <style:style style:name="T400" style:family="text">
      <style:text-properties officeooo:rsid="0376c958"/>
    </style:style>
    <style:style style:name="T401" style:family="text">
      <style:text-properties officeooo:rsid="0377af81"/>
    </style:style>
    <style:style style:name="T402" style:family="text">
      <style:text-properties officeooo:rsid="03781abe"/>
    </style:style>
    <style:style style:name="T403" style:family="text">
      <style:text-properties officeooo:rsid="037a156a"/>
    </style:style>
    <style:style style:name="T404" style:family="text">
      <style:text-properties officeooo:rsid="037ba93b"/>
    </style:style>
    <style:style style:name="T405" style:family="text">
      <style:text-properties officeooo:rsid="037d0e1e"/>
    </style:style>
    <style:style style:name="T406" style:family="text">
      <style:text-properties officeooo:rsid="037f7bfa"/>
    </style:style>
    <style:style style:name="T407" style:family="text">
      <style:text-properties officeooo:rsid="0381a53c"/>
    </style:style>
    <style:style style:name="T408" style:family="text">
      <style:text-properties officeooo:rsid="038348e6"/>
    </style:style>
    <style:style style:name="T409" style:family="text">
      <style:text-properties fo:font-variant="normal" fo:text-transform="none" fo:color="#404040" loext:opacity="100%" fo:letter-spacing="normal"/>
    </style:style>
    <style:style style:name="T410" style:family="text">
      <style:text-properties fo:font-variant="normal" fo:text-transform="none" fo:color="#404040" loext:opacity="100%" fo:letter-spacing="normal" officeooo:rsid="038348e6"/>
    </style:style>
    <style:style style:name="T411" style:family="text">
      <style:text-properties fo:font-variant="normal" fo:text-transform="none" fo:color="#404040" loext:opacity="100%" fo:letter-spacing="normal" officeooo:rsid="036ae07b"/>
    </style:style>
    <style:style style:name="T412" style:family="text">
      <style:text-properties fo:font-variant="normal" fo:text-transform="none" fo:color="#404040" loext:opacity="100%" fo:letter-spacing="normal" fo:font-weight="bold" style:font-weight-asian="bold" style:font-weight-complex="bold"/>
    </style:style>
    <style:style style:name="T413" style:family="text">
      <style:text-properties fo:font-variant="normal" fo:text-transform="none" fo:color="#404040" loext:opacity="100%" fo:letter-spacing="normal" fo:font-weight="bold" officeooo:rsid="038348e6" style:font-weight-asian="bold" style:font-weight-complex="bold"/>
    </style:style>
    <style:style style:name="T414" style:family="text">
      <style:text-properties fo:font-variant="normal" fo:text-transform="none" fo:color="#404040" loext:opacity="100%" fo:letter-spacing="normal" fo:font-weight="bold" officeooo:rsid="0396cd3d" style:font-weight-asian="bold" style:font-weight-complex="bold"/>
    </style:style>
    <style:style style:name="T415" style:family="text">
      <style:text-properties fo:font-variant="normal" fo:text-transform="none" fo:color="#404040" loext:opacity="100%" fo:letter-spacing="normal" officeooo:rsid="038a0833"/>
    </style:style>
    <style:style style:name="T416" style:family="text">
      <style:text-properties fo:font-variant="normal" fo:text-transform="none" fo:color="#404040" loext:opacity="100%" fo:letter-spacing="normal" officeooo:rsid="038a7561"/>
    </style:style>
    <style:style style:name="T417" style:family="text">
      <style:text-properties fo:font-variant="normal" fo:text-transform="none" fo:color="#404040" loext:opacity="100%" fo:letter-spacing="normal" officeooo:rsid="0396745c"/>
    </style:style>
    <style:style style:name="T418" style:family="text">
      <style:text-properties fo:font-variant="normal" fo:text-transform="none" fo:color="#404040" loext:opacity="100%" fo:letter-spacing="normal" officeooo:rsid="0396cd3d"/>
    </style:style>
    <style:style style:name="T419" style:family="text">
      <style:text-properties fo:font-variant="normal" fo:text-transform="none" fo:color="#404040" loext:opacity="100%" fo:letter-spacing="normal" officeooo:rsid="0397786a"/>
    </style:style>
    <style:style style:name="T420" style:family="text">
      <style:text-properties fo:font-variant="normal" fo:text-transform="none" fo:color="#404040" loext:opacity="100%" fo:letter-spacing="normal" officeooo:rsid="0397f5b4"/>
    </style:style>
    <style:style style:name="T421" style:family="text">
      <style:text-properties fo:font-variant="normal" fo:text-transform="none" fo:color="#404040" loext:opacity="100%" fo:letter-spacing="normal" officeooo:rsid="03980688"/>
    </style:style>
    <style:style style:name="T422" style:family="text">
      <style:text-properties fo:font-variant="normal" fo:text-transform="none" fo:color="#404040" loext:opacity="100%" fo:letter-spacing="normal" officeooo:rsid="0398471c"/>
    </style:style>
    <style:style style:name="T423" style:family="text">
      <style:text-properties fo:font-variant="normal" fo:text-transform="none" fo:color="#404040" loext:opacity="100%" fo:letter-spacing="normal" officeooo:rsid="039bbb72"/>
    </style:style>
    <style:style style:name="T424" style:family="text">
      <style:text-properties fo:font-variant="normal" fo:text-transform="none" fo:color="#404040" loext:opacity="100%" fo:letter-spacing="normal" officeooo:rsid="039c96ba"/>
    </style:style>
    <style:style style:name="T425" style:family="text">
      <style:text-properties fo:font-variant="normal" fo:text-transform="none" fo:color="#404040" loext:opacity="100%" fo:letter-spacing="normal" officeooo:rsid="039d49a3"/>
    </style:style>
    <style:style style:name="T426" style:family="text">
      <style:text-properties officeooo:rsid="03848180"/>
    </style:style>
    <style:style style:name="T427" style:family="text">
      <style:text-properties officeooo:rsid="038716e0"/>
    </style:style>
    <style:style style:name="T428" style:family="text">
      <style:text-properties officeooo:rsid="038a0833"/>
    </style:style>
    <style:style style:name="T429" style:family="text">
      <style:text-properties officeooo:rsid="0397f5b4"/>
    </style:style>
    <style:style style:name="T430" style:family="text">
      <style:text-properties officeooo:rsid="03980688"/>
    </style:style>
    <style:style style:name="T431" style:family="text">
      <style:text-properties officeooo:rsid="03999ab4"/>
    </style:style>
    <style:style style:name="T432" style:family="text">
      <style:text-properties officeooo:rsid="039a861e"/>
    </style:style>
    <style:style style:name="T433" style:family="text">
      <style:text-properties officeooo:rsid="039c96ba"/>
    </style:style>
    <style:style style:name="T434" style:family="text">
      <style:text-properties officeooo:rsid="039d49a3"/>
    </style:style>
    <style:style style:name="T435" style:family="text">
      <style:text-properties officeooo:rsid="03a337f2"/>
    </style:style>
    <style:style style:name="T436" style:family="text">
      <style:text-properties officeooo:rsid="03a34191"/>
    </style:style>
    <style:style style:name="T437" style:family="text">
      <style:text-properties officeooo:rsid="03a74945"/>
    </style:style>
    <style:style style:name="T438" style:family="text">
      <style:text-properties officeooo:rsid="03a7527b"/>
    </style:style>
    <style:style style:name="T439" style:family="text">
      <style:text-properties officeooo:rsid="03a82f38"/>
    </style:style>
    <style:style style:name="T440" style:family="text">
      <style:text-properties officeooo:rsid="03aa03c3"/>
    </style:style>
    <style:style style:name="T441" style:family="text">
      <style:text-properties officeooo:rsid="03ac884b"/>
    </style:style>
    <style:style style:name="T442" style:family="text">
      <style:text-properties officeooo:rsid="03ae6e70"/>
    </style:style>
    <style:style style:name="T443" style:family="text">
      <style:text-properties officeooo:rsid="03aed037"/>
    </style:style>
    <style:style style:name="T444" style:family="text">
      <style:text-properties officeooo:rsid="03b082ae"/>
    </style:style>
    <style:style style:name="T445" style:family="text">
      <style:text-properties officeooo:rsid="03b1e0de"/>
    </style:style>
    <style:style style:name="T446" style:family="text">
      <style:text-properties officeooo:rsid="03b1eeed"/>
    </style:style>
    <style:style style:name="T447" style:family="text">
      <style:text-properties officeooo:rsid="03b2b877"/>
    </style:style>
    <style:style style:name="T448" style:family="text">
      <style:text-properties officeooo:rsid="03b362cd"/>
    </style:style>
    <style:style style:name="T449" style:family="text">
      <style:text-properties officeooo:rsid="03b63608"/>
    </style:style>
    <style:style style:name="T450" style:family="text">
      <style:text-properties officeooo:rsid="03b8331a"/>
    </style:style>
    <style:style style:name="T451" style:family="text">
      <style:text-properties officeooo:rsid="03b87c44"/>
    </style:style>
    <style:style style:name="T452" style:family="text">
      <style:text-properties officeooo:rsid="03b9a2eb"/>
    </style:style>
    <style:style style:name="T453" style:family="text">
      <style:text-properties officeooo:rsid="03bb4c90"/>
    </style:style>
    <style:style style:name="T454" style:family="text">
      <style:text-properties officeooo:rsid="03bcbd4d"/>
    </style:style>
    <style:style style:name="T455" style:family="text">
      <style:text-properties officeooo:rsid="03c13dfc"/>
    </style:style>
    <style:style style:name="T456" style:family="text">
      <style:text-properties officeooo:rsid="03c2857a"/>
    </style:style>
    <style:style style:name="T457" style:family="text">
      <style:text-properties officeooo:rsid="03c44ca4"/>
    </style:style>
    <style:style style:name="T458" style:family="text">
      <style:text-properties officeooo:rsid="03c5692a"/>
    </style:style>
    <style:style style:name="T459" style:family="text">
      <style:text-properties officeooo:rsid="03c935fd"/>
    </style:style>
    <style:style style:name="T460" style:family="text">
      <style:text-properties officeooo:rsid="03ce5325"/>
    </style:style>
    <style:style style:name="T461" style:family="text">
      <style:text-properties officeooo:rsid="03cfa467"/>
    </style:style>
    <style:style style:name="T462" style:family="text">
      <style:text-properties officeooo:rsid="03d1839f"/>
    </style:style>
    <style:style style:name="T463" style:family="text">
      <style:text-properties officeooo:rsid="03d3972d"/>
    </style:style>
    <style:style style:name="T464" style:family="text">
      <style:text-properties officeooo:rsid="03d54a28"/>
    </style:style>
    <style:style style:name="T465" style:family="text">
      <style:text-properties officeooo:rsid="03d675a6"/>
    </style:style>
    <style:style style:name="T466" style:family="text">
      <style:text-properties officeooo:rsid="03d83db3"/>
    </style:style>
    <style:style style:name="T467" style:family="text">
      <style:text-properties officeooo:rsid="03dbcf27"/>
    </style:style>
    <style:style style:name="T468" style:family="text">
      <style:text-properties officeooo:rsid="03dc7e5e"/>
    </style:style>
    <style:style style:name="T469" style:family="text">
      <style:text-properties officeooo:rsid="03dd45b5"/>
    </style:style>
    <style:style style:name="T470" style:family="text">
      <style:text-properties officeooo:rsid="03dd85a8"/>
    </style:style>
    <style:style style:name="T471" style:family="text">
      <style:text-properties officeooo:rsid="03dedf2f"/>
    </style:style>
    <style:style style:name="T472" style:family="text">
      <style:text-properties officeooo:rsid="03e0266e"/>
    </style:style>
    <style:style style:name="T473" style:family="text">
      <style:text-properties officeooo:rsid="03e13dce"/>
    </style:style>
    <style:style style:name="T474" style:family="text">
      <style:text-properties officeooo:rsid="01c261d7"/>
    </style:style>
    <style:style style:name="T475" style:family="text">
      <style:text-properties officeooo:rsid="01ce2d0b"/>
    </style:style>
    <style:style style:name="T476" style:family="text">
      <style:text-properties officeooo:rsid="03e72ab9"/>
    </style:style>
    <style:style style:name="T477" style:family="text">
      <style:text-properties officeooo:rsid="03e9db9e"/>
    </style:style>
    <style:style style:name="T478" style:family="text">
      <style:text-properties officeooo:rsid="03ea2148"/>
    </style:style>
    <style:style style:name="T479" style:family="text">
      <style:text-properties officeooo:rsid="03ebefc3"/>
    </style:style>
    <style:style style:name="T480" style:family="text">
      <style:text-properties officeooo:rsid="03ed6248"/>
    </style:style>
    <style:style style:name="T481" style:family="text">
      <style:text-properties officeooo:rsid="03e5e1e9"/>
    </style:style>
    <style:style style:name="T482" style:family="text">
      <style:text-properties officeooo:rsid="03ef9c24"/>
    </style:style>
    <style:style style:name="T483" style:family="text">
      <style:text-properties officeooo:rsid="03f0877d"/>
    </style:style>
    <style:style style:name="T484" style:family="text">
      <style:text-properties officeooo:rsid="03f1286c"/>
    </style:style>
    <style:style style:name="T485" style:family="text">
      <style:text-properties officeooo:rsid="03f306ae"/>
    </style:style>
    <style:style style:name="T486" style:family="text">
      <style:text-properties officeooo:rsid="03f463ac"/>
    </style:style>
    <style:style style:name="T487" style:family="text">
      <style:text-properties officeooo:rsid="03f5165e"/>
    </style:style>
    <style:style style:name="T488" style:family="text">
      <style:text-properties officeooo:rsid="03f6f752"/>
    </style:style>
    <style:style style:name="T489" style:family="text">
      <style:text-properties officeooo:rsid="03f88351"/>
    </style:style>
    <style:style style:name="T490" style:family="text">
      <style:text-properties officeooo:rsid="03fa0815"/>
    </style:style>
    <style:style style:name="T491" style:family="text">
      <style:text-properties officeooo:rsid="03fa9d80"/>
    </style:style>
    <style:style style:name="T492" style:family="text">
      <style:text-properties officeooo:rsid="03fad3bf"/>
    </style:style>
    <style:style style:name="T493" style:family="text">
      <style:text-properties officeooo:rsid="03ff6ea9"/>
    </style:style>
    <style:style style:name="T494" style:family="text">
      <style:text-properties officeooo:rsid="0402baf2"/>
    </style:style>
    <style:style style:name="T495" style:family="text">
      <style:text-properties officeooo:rsid="04048886"/>
    </style:style>
    <style:style style:name="T496" style:family="text">
      <style:text-properties officeooo:rsid="0405ca6a"/>
    </style:style>
    <style:style style:name="T497" style:family="text">
      <style:text-properties style:font-name="Transliteration" officeooo:rsid="0405ca6a"/>
    </style:style>
    <style:style style:name="T498" style:family="text">
      <style:text-properties officeooo:rsid="0406c5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3" text:outline-level="1"><text:span text:style-name="T224">Bentresh Stela</text:span> (<text:span text:style-name="T224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8"><text:span text:style-name="T3">[B]<text:tab/><text:tab/>M. Broze. </text:span><text:span text:style-name="T43">La princesse de Bakhtan : Essai d’analyse stylistique. </text:span><text:span text:style-name="T107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108">. </text:span><text:span text:style-name="T109">Last updated August 1, 2020. Accessed October 18, 2025.</text:span><text:span text:style-name="T108"> </text:span><text:a xlink:type="simple" xlink:href="https://www.attalus.org/egypt/bentresh_stela.html" text:style-name="Internet_20_link" text:visited-style-name="Visited_20_Internet_20_Link"><text:span text:style-name="T108">https://www.attalus.org/egypt/bentresh_stela.html</text:span></text:a></text:p>
      <text:p text:style-name="P39"/>
      <text:p text:style-name="P95"><text:span text:style-name="T108">[</text:span><text:span text:style-name="T107">DB]<text:tab/><text:tab/></text:span><text:span text:style-name="T112">A story designed to make propaganda for the cult of Khonsu (The Bentresh-Stela…). </text:span><text:span text:style-name="T113">In</text:span><text:span text:style-name="T112"> </text:span><text:span text:style-name="T43">Egyptian Reading Book, Vol. </text:span><text:span text:style-name="T45">I</text:span><text:span text:style-name="T43">: Exercises and Middle Egyptian Texts</text:span><text:span text:style-name="T107">. Ed. A. De Buck. </text:span><text:span text:style-name="T110">Nederlandsch Archaeologisch-Philologisch Instituut. </text:span><text:span text:style-name="T107">Leyden (1948). </text:span><text:span text:style-name="T112">106–109.</text:span></text:p>
      <text:p text:style-name="P41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6"><text:span text:style-name="T112">[G]<text:tab/><text:tab/>A. Gardiner. </text:span><text:span text:style-name="T46">Egyptian Grammar: Being an Introduction to the Study of Hieroglyphs</text:span><text:span text:style-name="T112">. 3rd Edition, Revised. Griffith Institute, Ashmolean Museum, Oxford. Printed at the University Press, Cambridge (2007).</text:span></text:p>
      <text:p text:style-name="P42"/>
      <text:p text:style-name="P149"><text:span text:style-name="T112">[</text:span><text:span text:style-name="T107">H]<text:tab/><text:tab/>J. </text:span><text:span text:style-name="T141">E.</text:span><text:span text:style-name="T107"> Hoch. </text:span><text:span text:style-name="T43">Middle Egyptian Grammar</text:span><text:span text:style-name="T107">. </text:span><text:span text:style-name="T141">Benben Publications. Mississauga (1997).</text:span></text:p>
      <text:p text:style-name="P41"/>
      <text:p text:style-name="P85"><text:soft-page-break/><text:span text:style-name="T112">[</text:span><text:span text:style-name="T107">L]<text:tab/><text:tab/>III. Two Pseudepigrapha: The Bentresh Stela. In </text:span><text:span text:style-name="T43">Ancient Egyptian Literature, </text:span><text:span text:style-name="T45">Vol. III: The Late Period. </text:span><text:span text:style-name="T114">Trans. M. Lichtheim. University of California Press. Berkeley (1980). 90</text:span><text:span text:style-name="T112">–</text:span><text:span text:style-name="T114">93.</text:span></text:p>
      <text:p text:style-name="P40"/>
      <text:p text:style-name="P14"><text:span text:style-name="T111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111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25">1</text:span><text:span text:style-name="T249">1</text:span>/1<text:span text:style-name="T249">7</text:span>/25</text:p>
      <text:p text:style-name="P20"/>
      <text:p text:style-name="P20"/>
      <text:p text:style-name="P15"><text:span text:style-name="T97">(1)</text:span><text:span text:style-name="T74"> @</text:span><text:span text:style-name="T75">r </text:span><text:span text:style-name="T82">K</text:span><text:span text:style-name="T85">A </text:span><text:span text:style-name="T82">N</text:span><text:span text:style-name="T80">x</text:span><text:span text:style-name="T81">t</text:span></text:p>
      <text:p text:style-name="P15"><text:span text:style-name="T87">t</text:span><text:span text:style-name="T82">wt </text:span><text:span text:style-name="T87">x</text:span><text:span text:style-name="T81">a</text:span><text:span text:style-name="T76">.</text:span><text:span text:style-name="T77">w</text:span></text:p>
      <text:p text:style-name="P15"><text:span text:style-name="T87">D</text:span><text:span text:style-name="T81">d</text:span><text:span text:style-name="T77"> </text:span><text:span text:style-name="T87">n</text:span><text:span text:style-name="T81">s.</text:span><text:span text:style-name="T83">y</text:span><text:span text:style-name="T88">(t)</text:span><text:span text:style-name="T77"> mi </text:span><text:span text:style-name="T88">(I)</text:span><text:span text:style-name="T81">tm</text:span></text:p>
      <text:p text:style-name="P35"/>
      <text:p text:style-name="P17"><text:span text:style-name="T77">@r </text:span><text:span text:style-name="T84">Nbw</text:span></text:p>
      <text:p text:style-name="P17"><text:span text:style-name="T87">ws</text:span><text:span text:style-name="T88">(</text:span><text:span text:style-name="T87">r</text:span><text:span text:style-name="T88">)</text:span><text:span text:style-name="T87"> x</text:span><text:span text:style-name="T77">pS</text:span><text:span text:style-name="T84">w</text:span><text:span text:style-name="T77"> </text:span><text:span text:style-name="T87">d</text:span><text:span text:style-name="T78">r </text:span><text:span text:style-name="T89">P</text:span><text:span text:style-name="T87">Dt</text:span><text:span text:style-name="T78"> </text:span><text:span text:style-name="T87">9</text:span></text:p>
      <text:p text:style-name="P36"/>
      <text:p text:style-name="P15"><text:span text:style-name="T78">Nsw Bity </text:span><text:span text:style-name="T84">N</text:span><text:span text:style-name="T79">b </text:span><text:span text:style-name="T84">&amp;</text:span><text:span text:style-name="T79">A.wy </text:span></text:p>
      <text:p text:style-name="P91"><text:span text:style-name="T79">W</text:span><text:span text:style-name="T74">sr-MaA.t-Ra </text:span><text:span text:style-name="T90">%tp-</text:span><text:span text:style-name="T91">(n)</text:span><text:span text:style-name="T90">-Ra</text:span></text:p>
      <text:p text:style-name="P37"/>
      <text:p text:style-name="P92"><text:span text:style-name="T92">%</text:span><text:span text:style-name="T74">A Ra</text:span></text:p>
      <text:p text:style-name="P93"><text:span text:style-name="T74">xt=f Mri-Imn Ra-</text:span><text:span text:style-name="T86">m</text:span><text:span text:style-name="T74">s-</text:span><text:span text:style-name="T86">s(w)</text:span></text:p>
      <text:p text:style-name="P32"/>
      <text:p text:style-name="P93"><text:span text:style-name="T74">Imn-Ra </text:span><text:span text:style-name="T98">(2)</text:span><text:span text:style-name="T95"> </text:span><text:span text:style-name="T74">Nb </text:span><text:span text:style-name="T96">Nsw.t</text:span><text:span text:style-name="T93"> PsD.t Nb.wt </text:span><text:span text:style-name="T74">WAs.t</text:span></text:p>
      <text:p text:style-name="P31">mri nTr nfr Imn</text:p>
      <text:p text:style-name="P91"><text:span text:style-name="T74">ms.</text:span><text:span text:style-name="T94">[</text:span><text:span text:style-name="T74">ti</text:span><text:span text:style-name="T94">]</text:span><text:span text:style-name="T74">w Ra-@r-Ax.ty</text:span></text:p>
      <text:p text:style-name="P31">pr.<text:span text:style-name="T242">w</text:span> ax n <text:span text:style-name="T240">N</text:span>b <text:span text:style-name="T240">+</text:span>r.<text:span text:style-name="T241">(</text:span>t<text:span text:style-name="T241">)</text:span></text:p>
      <text:p text:style-name="P31">wtt n KA-<text:span text:style-name="T239">Mwt=f</text:span></text:p>
      <text:p text:style-name="P33">nsw.t n Km.t <text:span text:style-name="T243">HqA</text:span> _Sr.wt</text:p>
      <text:p text:style-name="P33">iTy <text:span text:style-name="T58">(3)</text:span><text:span text:style-name="T244"> </text:span><text:span text:style-name="T245">iT</text:span> <text:span text:style-name="T245">PDt</text:span> 9</text:p>
      <text:p text:style-name="P34">pri m <text:span text:style-name="T246">X</text:span>t</text:p>
      <text:p text:style-name="P34">s<text:span text:style-name="T247">r(w) </text:span>n=f nx.tw</text:p>
      <text:p text:style-name="P33"><text:span text:style-name="T248">w</text:span>D n=f pri a m swH.t</text:p>
      <text:p text:style-name="P33"/>
      <text:p text:style-name="P30"/>
      <text:p text:style-name="P15"><text:span text:style-name="T53">(</text:span><text:span text:style-name="T54">1</text:span><text:span text:style-name="T53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27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29">nfr Hr</text:span><text:span text:style-name="T14">], </text:span><text:span text:style-name="T16">like Atum,</text:span></text:p>
      <text:p text:style-name="P8"/>
      <text:p text:style-name="P8">Golden Horus,</text:p>
      <text:p text:style-name="P97"><text:span text:style-name="T16">s</text:span><text:span text:style-name="T3">trong </text:span><text:span text:style-name="T19">[F 68] </text:span><text:span text:style-name="T3">of arm </text:span><text:span text:style-name="T14">[</text:span><text:span text:style-name="T229">nfr Hr</text:span><text:span text:style-name="T14">] </text:span><text:span text:style-name="T20">[who] drives away the Nine Bows [</text:span><text:span text:style-name="T228">pD.t psD.t</text:span><text:span text:style-name="T20">],</text:span></text:p>
      <text:p text:style-name="P8"/>
      <text:p text:style-name="P8">Dual King, Lord of the Two Lands,</text:p>
      <text:p text:style-name="P88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90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9"><text:span text:style-name="T17">Amun-Re, </text:span><text:span text:style-name="T55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6"><text:span text:style-name="T232">W</text:span><text:span text:style-name="T226">As.t </text:span><text:span text:style-name="T232">=</text:span> Waset <text:span text:style-name="T289">=</text:span> “<text:span text:style-name="T289">The Scepter”</text:span>.</text:p></text:note-body></text:note></text:span><text:span text:style-name="T27">,</text:span></text:p>
      <text:p text:style-name="P11">beloved of the good god, Amun,</text:p>
      <text:p text:style-name="P91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91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94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8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7"><text:span text:style-name="T226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7"><text:span text:style-name="T226">_Sr.wt</text:span> = Deshrut.</text:p></text:note-body></text:note></text:span><text:span text:style-name="T3">,</text:span></text:p>
      <text:p text:style-name="P99"><text:soft-page-break/><text:span text:style-name="T3">sovereign </text:span><text:span text:style-name="T56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100"><text:span text:style-name="T32">t</text:span><text:span text:style-name="T3">hat when he came forth from the womb </text:span><text:span text:style-name="T38">[second tense?]</text:span><text:span text:style-name="T3">,</text:span></text:p>
      <text:p text:style-name="P100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101"><text:span text:style-name="T3">command [F 73</text:span><text:span text:style-name="T112">–</text:span><text:span text:style-name="T107">74] [</text:span><text:span text:style-name="T116">g</text:span><text:span text:style-name="T117">iven</text:span><text:span text:style-name="T107">] to him [while] active [F 91] in the egg,</text:span></text:p>
      <text:p text:style-name="P43"/>
      <text:p text:style-name="P43"/>
      <text:p text:style-name="P102"><text:span text:style-name="T217">1</text:span><text:span text:style-name="T218">2</text:span><text:span text:style-name="T216">/</text:span><text:span text:style-name="T218">7</text:span><text:span text:style-name="T216">/25</text:span></text:p>
      <text:p text:style-name="P44"/>
      <text:p text:style-name="P45"/>
      <text:p text:style-name="P109"><text:span text:style-name="T107">kA </text:span><text:span text:style-name="T118">mn ib hb=f mtwn</text:span></text:p>
      <text:p text:style-name="P110"><text:span text:style-name="T124">n</text:span><text:span text:style-name="T107">sw.t n nTr pri nx.t mi MnT(w)</text:span></text:p>
      <text:p text:style-name="P111"><text:span text:style-name="T107">wr pH.t</text:span><text:span text:style-name="T119">y</text:span><text:span text:style-name="T107"> </text:span><text:span text:style-name="T219">(4)</text:span><text:span text:style-name="T129"> </text:span><text:span text:style-name="T107">mi sA Nw.t</text:span></text:p>
      <text:p text:style-name="P124"/>
      <text:p text:style-name="P112"><text:span text:style-name="T107">is Hm=f </text:span><text:span text:style-name="T132">m N</text:span><text:span text:style-name="T107">hr</text:span><text:span text:style-name="T132">n</text:span><text:span text:style-name="T107"> </text:span><text:span text:style-name="T132">mi </text:span><text:span text:style-name="T107">n</text:span><text:span text:style-name="T140">(y)</text:span><text:span text:style-name="T107">t-</text:span><text:span text:style-name="T134">a</text:span><text:span text:style-name="T107">=f </text:span><text:span text:style-name="T130">Tnw rnp.t</text:span></text:p>
      <text:p text:style-name="P113"><text:span text:style-name="T130">w</text:span><text:span text:style-name="T107">r.w </text:span><text:span text:style-name="T130">n </text:span><text:span text:style-name="T107">xAs.</text:span><text:span text:style-name="T130">t nb iw&lt;</text:span><text:span text:style-name="T146">=sn&gt;</text:span><text:span text:style-name="T130"> m ks</text:span><text:span text:style-name="T152">.</text:span><text:span text:style-name="T130">w m Htp.</text:span><text:span text:style-name="T145">w</text:span><text:span text:style-name="T130"> n bA.</text:span><text:span text:style-name="T145">w</text:span><text:span text:style-name="T142"> </text:span><text:span text:style-name="T107">n Hm</text:span><text:span text:style-name="T131">=f S</text:span><text:span text:style-name="T107">Aa &lt;</text:span><text:span text:style-name="T153">r&gt;</text:span><text:span text:style-name="T131"> </text:span><text:span text:style-name="T107">pHw.w</text:span></text:p>
      <text:p text:style-name="P47"/>
      <text:p text:style-name="P46"/>
      <text:p text:style-name="P103"><text:span text:style-name="T107">Bull </text:span><text:span text:style-name="T120">firm [F 106] of heart </text:span><text:span text:style-name="T115">[</text:span><text:span text:style-name="T229">nfr Hr</text:span><text:span text:style-name="T115">]</text:span><text:span text:style-name="T120">, </text:span><text:span text:style-name="T121">when he </text:span><text:span text:style-name="T123">trot</text:span><text:span text:style-name="T121">s </text:span><text:span text:style-name="T122">[circumstantial?] </text:span><text:span text:style-name="T123">[F 158] </text:span><text:span text:style-name="T122">[into] the arena [variant spelling, F 121],</text:span></text:p>
      <text:p text:style-name="P104"><text:span text:style-name="T122">d</text:span><text:span text:style-name="T107">ivine king </text:span><text:span text:style-name="T125">[indirect genitive] [who] c</text:span><text:span text:style-name="T136">a</text:span><text:span text:style-name="T125">me </text:span><text:span text:style-name="T136">[</text:span><text:span text:style-name="T137">no gemination, so </text:span><text:span text:style-name="T136">perfect participle] </text:span><text:span text:style-name="T125">[in] might like Montu,</text:span></text:p>
      <text:p text:style-name="P105"><text:span text:style-name="T107">Great of s</text:span><text:span text:style-name="T126">trength </text:span><text:span text:style-name="T127">[playful spelling of dual </text:span><text:span text:style-name="T230">-ty</text:span><text:span text:style-name="T127">] </text:span><text:span text:style-name="T138">[leopard heads?] </text:span><text:span text:style-name="T115">[</text:span><text:span text:style-name="T229">nfr Hr</text:span><text:span text:style-name="T115">] </text:span><text:span text:style-name="T219">(4)</text:span><text:span text:style-name="T115"> </text:span><text:span text:style-name="T128">like the son of Nut:</text:span></text:p>
      <text:p text:style-name="P48"/>
      <text:p text:style-name="P106"><text:span text:style-name="T128">S</text:span><text:span text:style-name="T107">o, his majesty [was] </text:span><text:span text:style-name="T135">in</text:span><text:span text:style-name="T107"> Naharin</text:span><text:span text:style-name="T139">a</text:span><text:span text:style-name="T107"> </text:span><text:span text:style-name="T133">like </text:span><text:span text:style-name="T135">[</text:span><text:span text:style-name="T139">that</text:span><text:span text:style-name="T135">] </text:span><text:span text:style-name="T139">of</text:span><text:span text:style-name="T135"> his custom </text:span><text:span text:style-name="T140">[</text:span><text:span text:style-name="T48">cf.</text:span><text:span text:style-name="T140"> H 248] </text:span><text:span text:style-name="T135">each [F 305] year.</text:span></text:p>
      <text:p text:style-name="P107"><text:span text:style-name="T107">[As for] the princes of every foreign land </text:span><text:span text:style-name="T150">[F 185]</text:span><text:span text:style-name="T107">, they </text:span><text:span text:style-name="T147">came in </text:span><text:span text:style-name="T151">prostration</text:span><text:span text:style-name="T152">s</text:span><text:span text:style-name="T151"> [F 287]</text:span><text:span text:style-name="T147">, in peace [“peaces”], </text:span><text:span text:style-name="T148">to the might [</text:span><text:span text:style-name="T231">bA.w</text:span><text:span text:style-name="T148"> = mass noun?] </text:span><text:span text:style-name="T149">of his majesty, </text:span><text:span text:style-name="T153">as far as </text:span><text:span text:style-name="T154">the far north [F 92, last variant spelling].</text:span></text:p>
      <text:p text:style-name="P49"/>
      <text:p text:style-name="P49"/>
      <text:p text:style-name="P22"><text:span text:style-name="T135">1</text:span><text:span text:style-name="T107">2/21/25</text:span></text:p>
      <text:p text:style-name="P53"/>
      <text:p text:style-name="P53"/>
      <text:p text:style-name="P114"><text:span text:style-name="T131">in</text:span><text:span text:style-name="T107">w=</text:span><text:span text:style-name="T131">sn nbw xsb</text:span><text:span text:style-name="T107">d</text:span><text:span text:style-name="T131"> </text:span><text:span text:style-name="T220">(5)</text:span><text:span text:style-name="T131"> mfk</text:span><text:span text:style-name="T107">A.t</text:span><text:span text:style-name="T131"> x</text:span><text:span text:style-name="T143">A.</text:span><text:span text:style-name="T131">w nb </text:span><text:span text:style-name="T143">tA-</text:span><text:span text:style-name="T131">nTr </text:span><text:span text:style-name="T143">Hr</text:span><text:span text:style-name="T131"> </text:span><text:span text:style-name="T143">psD=</text:span><text:span text:style-name="T131">sn</text:span></text:p>
      <text:p text:style-name="P114"><text:span text:style-name="T131">wa nb </text:span><text:span text:style-name="T144">Hr xrp sn</text:span><text:span text:style-name="T131">w=f</text:span></text:p>
      <text:p text:style-name="P115"><text:span text:style-name="T131">a</text:span><text:span text:style-name="T107">Ha rdi</text:span><text:span text:style-name="T164">{.t}</text:span><text:span text:style-name="T107"> </text:span><text:span text:style-name="T164">pA </text:span><text:span text:style-name="T107">wr n B</text:span><text:span text:style-name="T159">xtn in</text:span><text:span text:style-name="T164">.</text:span><text:span text:style-name="T159">t</text:span><text:span text:style-name="T164">w</text:span><text:span text:style-name="T159"> </text:span><text:span text:style-name="T160">in.</text:span><text:span text:style-name="T164">w</text:span><text:span text:style-name="T160">=f</text:span></text:p>
      <text:p text:style-name="P116"><text:span text:style-name="T160">d</text:span><text:span text:style-name="T107">i.n=f </text:span><text:span text:style-name="T161">sA.t=f wr.t </text:span><text:span text:style-name="T165">HAt </text:span><text:span text:style-name="T161">i</text:span><text:span text:style-name="T182">r.w[?]</text:span></text:p>
      <text:p text:style-name="P116"><text:span text:style-name="T161">Hr swAS</text:span><text:span text:style-name="T166">{y}</text:span><text:span text:style-name="T161"> Hm=f</text:span></text:p>
      <text:p text:style-name="P117"><text:span text:style-name="T161">H</text:span><text:span text:style-name="T107">r dbH [</text:span><text:span text:style-name="T167">anx</text:span><text:span text:style-name="T107">] xr=f</text:span></text:p>
      <text:p text:style-name="P117"><text:span text:style-name="T107">wn </text:span><text:span text:style-name="T222">(</text:span><text:span text:style-name="T216">6</text:span><text:span text:style-name="T222">)</text:span><text:span text:style-name="T107"> st nfr</text:span><text:span text:style-name="T169">(.ti?)</text:span><text:span text:style-name="T107"> r </text:span><text:span text:style-name="T168">aA</text:span><text:span text:style-name="T107"> wr Hr ib Hm=f r xt nb</text:span></text:p>
      <text:p text:style-name="P49"/>
      <text:p text:style-name="P49"/>
      <text:p text:style-name="P108"><text:span text:style-name="T135">[</text:span><text:span text:style-name="T107">As for] their tribute [F 22]: </text:span><text:span text:style-name="T155">gold, lapis lazuli, </text:span><text:span text:style-name="T221">(5)</text:span><text:span text:style-name="T158"> </text:span><text:span text:style-name="T155">turq</text:span><text:span text:style-name="T158">u</text:span><text:span text:style-name="T155">oise [F 106], </text:span><text:span text:style-name="T156">every herb [F 183] from the gods’ land </text:span><text:span text:style-name="T178">[were] </text:span><text:span text:style-name="T156">upon their back</text:span><text:span text:style-name="T157">[s].</text:span></text:p>
      <text:p text:style-name="P108"><text:span text:style-name="T178">E</text:span><text:span text:style-name="T179">ach one </text:span><text:span text:style-name="T178">was</text:span><text:span text:style-name="T179"> </text:span><text:span text:style-name="T180">outdoing </text:span><text:span text:style-name="T179">[F 196, “</text:span><text:span text:style-name="T180">getting ahead of”</text:span><text:span text:style-name="T179">] </text:span><text:span text:style-name="T181">his companion.</text:span></text:p>
      <text:p text:style-name="P61">Then the chief of Bakhtan <text:span text:style-name="T250">caused t</text:span><text:span text:style-name="T264">hat</text:span><text:span text:style-name="T250"> his tribute </text:span><text:span text:style-name="T264">be brought.</text:span></text:p>
      <text:p text:style-name="P62">[and] put his eldest daughter <text:span text:style-name="T251">in front of </text:span><text:span text:style-name="T265">[?]</text:span><text:span text:style-name="T252">,</text:span></text:p>
      <text:p text:style-name="P63">[and] was praising [F 216] his majesty,</text:p>
      <text:p text:style-name="P64">[and] was pleading [F 311] [for] [life] from [“upon”] him.</text:p>
      <text:p text:style-name="P65"><text:soft-page-break/>[<text:span text:style-name="T233">wn</text:span><text:span text:style-name="T253"> as </text:span><text:span text:style-name="T405">imperfect </text:span>converter? TLA 550129] <text:span text:style-name="T253">The </text:span><text:span text:style-name="T59">(6)</text:span> woman <text:span text:style-name="T266">had been</text:span><text:span text:style-name="T254"> pleasing [stative?] t</text:span><text:span text:style-name="T255">o the utmost greatness upon his majesty’s heart, </text:span><text:span text:style-name="T256">than any thing [else].</text:span></text:p>
      <text:p text:style-name="P68"/>
      <text:p text:style-name="P67"/>
      <text:p text:style-name="P23"><text:span text:style-name="T135">1</text:span><text:span text:style-name="T107">/</text:span><text:span text:style-name="T177">4</text:span><text:span text:style-name="T107">/2</text:span><text:span text:style-name="T177">6</text:span></text:p>
      <text:p text:style-name="P54"/>
      <text:p text:style-name="P54"/>
      <text:p text:style-name="P118"><text:span text:style-name="T107">aHa.n wd</text:span><text:span text:style-name="T170">n</text:span><text:span text:style-name="T172">(.w)</text:span><text:span text:style-name="T107"> nxb</text:span><text:span text:style-name="T171">(.t)</text:span><text:span text:style-name="T170">=s</text:span><text:span text:style-name="T107"> </text:span><text:span text:style-name="T173">N</text:span><text:span text:style-name="T107">sw.t </text:span><text:span text:style-name="T173">W</text:span><text:span text:style-name="T107">r.t Nfr.w-</text:span><text:span text:style-name="T173">Ra</text:span></text:p>
      <text:p text:style-name="P118"><text:span text:style-name="T174">spr</text:span><text:span text:style-name="T162"> Hm=f </text:span><text:span text:style-name="T163">r Km.t</text:span></text:p>
      <text:p text:style-name="P119"><text:span text:style-name="T163">i</text:span><text:span text:style-name="T183">r.n=s irty nb </text:span><text:span text:style-name="T175">Hm.</text:span><text:span text:style-name="T176">t</text:span><text:span text:style-name="T175">-</text:span><text:span text:style-name="T183">nsw</text:span></text:p>
      <text:p text:style-name="P125"/>
      <text:p text:style-name="P119"><text:span text:style-name="T131">x</text:span><text:span text:style-name="T107">pr </text:span><text:span text:style-name="T184">Hsb.t 15 Smw </text:span><text:span text:style-name="T185">(2)</text:span><text:span text:style-name="T184"> sw 22</text:span></text:p>
      <text:p text:style-name="P120"><text:span text:style-name="T184">i</text:span><text:span text:style-name="T107">sk Hm=f </text:span><text:span text:style-name="T191">m </text:span><text:span text:style-name="T107">WAs.t Nx.t </text:span><text:span text:style-name="T192">@m</text:span><text:span text:style-name="T186">.t </text:span><text:span text:style-name="T192">N</text:span><text:span text:style-name="T186">i</text:span><text:span text:style-name="T187">w.wt</text:span></text:p>
      <text:p text:style-name="P121"><text:span text:style-name="T107">Hr ir</text:span><text:span text:style-name="T193">{</text:span><text:span text:style-name="T107">y</text:span><text:span text:style-name="T193">}&lt;.t&gt;</text:span><text:span text:style-name="T107"> </text:span><text:span text:style-name="T223">(7)</text:span><text:span text:style-name="T198"> </text:span><text:span text:style-name="T107">Hs</text:span><text:span text:style-name="T211">(ty)</text:span><text:span text:style-name="T107"> n </text:span><text:span text:style-name="T194">(i)</text:span><text:span text:style-name="T188">t</text:span><text:span text:style-name="T196">=f</text:span><text:span text:style-name="T188"> Imn-</text:span><text:span text:style-name="T195">Ra </text:span><text:span text:style-name="T188">Nb </text:span><text:span text:style-name="T197">Nsw.t</text:span><text:span text:style-name="T189"> &amp;A.wy</text:span></text:p>
      <text:p text:style-name="P122"><text:span text:style-name="T199">m </text:span><text:span text:style-name="T107">hb=f nfr </text:span><text:span text:style-name="T200">n</text:span><text:span text:style-name="T107"> </text:span><text:span text:style-name="T201">I</text:span><text:span text:style-name="T107">p</text:span><text:span text:style-name="T201">(.t)</text:span><text:span text:style-name="T107"> </text:span><text:span text:style-name="T202">s.t</text:span><text:span text:style-name="T190"> ib=f nt sp tp</text:span></text:p>
      <text:p text:style-name="P123"><text:span text:style-name="T107">i</text:span><text:span text:style-name="T203">i</text:span><text:span text:style-name="T107">.tw r Dd n Hm=f</text:span></text:p>
      <text:p text:style-name="P123"><text:span text:style-name="T107">wn wp.</text:span><text:span text:style-name="T206">(</text:span><text:span text:style-name="T205">wt)</text:span><text:span text:style-name="T107"> ii.n pA wr n Bxt</text:span><text:span text:style-name="T204">n</text:span><text:span text:style-name="T107"> </text:span><text:span text:style-name="T207">iw</text:span><text:span text:style-name="T107"> Xr </text:span><text:span text:style-name="T208">in.</text:span><text:span text:style-name="T207">w</text:span><text:span text:style-name="T107"> </text:span><text:span text:style-name="T207">aS(A)</text:span><text:span text:style-name="T210">{</text:span><text:span text:style-name="T209">t</text:span><text:span text:style-name="T210">}</text:span><text:span text:style-name="T107"> n nsw.t</text:span></text:p>
      <text:p text:style-name="P50"/>
      <text:p text:style-name="P50"/>
      <text:p text:style-name="P71">Then <text:span text:style-name="T257">her titulary [F 138] </text:span><text:span text:style-name="T258">was recorded [F 73] [past passive]: </text:span><text:span text:style-name="T259">Great Queen Neferure.</text:span></text:p>
      <text:p text:style-name="P66">As the king returned <text:span text:style-name="T262">[second tense?]</text:span> to <text:span text:style-name="T260">the Black Lan</text:span><text:span text:style-name="T261">d</text:span>,</text:p>
      <text:p text:style-name="P72"><text:span text:style-name="T262">so she did every doing </text:span><text:span text:style-name="T290">[</text:span><text:span text:style-name="T291">wh</text:span><text:span text:style-name="T292">ich</text:span><text:span text:style-name="T291"> </text:span><text:span text:style-name="T290">noun </text:span><text:span text:style-name="T291">form?</text:span><text:span text:style-name="T290">] </text:span><text:span text:style-name="T262">of a king’s wife </text:span><text:span text:style-name="T263">[direct genitive]</text:span><text:span text:style-name="T262">.</text:span></text:p>
      <text:p text:style-name="P72"/>
      <text:p text:style-name="P72">It happened <text:span text:style-name="T267">in regnal year 15, month 2 [playful spelling], </text:span><text:span text:style-name="T268">day 22,</text:span></text:p>
      <text:p text:style-name="P74"><text:span text:style-name="T293">lo</text:span> [“non-enclitic” particle, TLA 31760; see also F 30], <text:span text:style-name="T269">his majesty </text:span><text:span text:style-name="T270">[was] in </text:span><text:span text:style-name="T294">Mighty </text:span><text:span text:style-name="T270">Thebes, </text:span><text:span text:style-name="T272">Wife</text:span><text:span text:style-name="T271"> of </text:span><text:span text:style-name="T273">the </text:span><text:span text:style-name="T271">Cities,</text:span></text:p>
      <text:p text:style-name="P75">[and] was doing <text:span text:style-name="T60">(7)</text:span><text:span text:style-name="T280"> </text:span><text:span text:style-name="T274">the rit</text:span><text:span text:style-name="T275">e</text:span><text:span text:style-name="T274">s </text:span><text:span text:style-name="T299">[F 177] </text:span><text:span text:style-name="T275">for </text:span><text:span text:style-name="T276">his father [</text:span><text:span text:style-name="T234">f</text:span><text:span text:style-name="T276"> for both </text:span><text:span text:style-name="T234">it</text:span><text:span text:style-name="T276"> and </text:span><text:span text:style-name="T234">=f</text:span><text:span text:style-name="T276">?], </text:span><text:span text:style-name="T277">Amun-Re, </text:span><text:span text:style-name="T278">Lord </text:span><text:span text:style-name="T279">of Thrones of the Two Lands [TLA 26200],</text:span></text:p>
      <text:p text:style-name="P76">in his fine feast <text:span text:style-name="T281">of Luxor</text:span><text:span text:style-name="T281"><text:note text:id="ftn4" text:note-class="footnote"><text:note-citation>4</text:note-citation><text:note-body><text:p text:style-name="P150"><text:span text:style-name="T226">Ip</text:span><text:span text:style-name="T235">(.t)</text:span> = Ipet = “The Adyton”.</text:p></text:note-body></text:note></text:span><text:span text:style-name="T281"> </text:span><text:span text:style-name="T295">[F 16]</text:span><text:span text:style-name="T281">, </text:span><text:span text:style-name="T282">his heart’s place [direct genitive] </text:span><text:span text:style-name="T283">since [“from”] the </text:span><text:span text:style-name="T296">beginning of time [“foremost</text:span><text:span text:style-name="T283"> time”</text:span><text:span text:style-name="T282">]</text:span><text:span text:style-name="T283">,</text:span></text:p>
      <text:p text:style-name="P77">[when] one came to say to his majesty:</text:p>
      <text:p text:style-name="P78">There <text:span text:style-name="T286">was </text:span><text:span text:style-name="T287">[</text:span><text:span text:style-name="T405">imperfect</text:span><text:span text:style-name="T287"> converter]</text:span> a <text:span text:style-name="T285">messenger</text:span><text:span text:style-name="T284"> [F 17, 60] </text:span><text:span text:style-name="T285">of the chief of Bakhtan </text:span><text:span text:style-name="T298">that</text:span><text:span text:style-name="T297"> came</text:span><text:span text:style-name="T285">, </text:span><text:span text:style-name="T297">with[?]</text:span><text:span text:style-name="T288"> numerous [F 49] presents have come for the queen.</text:span></text:p>
      <text:p text:style-name="P72"/>
      <text:p text:style-name="P69"/>
      <text:p text:style-name="P24"><text:span text:style-name="T135">1</text:span><text:span text:style-name="T107">/</text:span><text:span text:style-name="T190">18</text:span><text:span text:style-name="T107">/2</text:span><text:span text:style-name="T177">6</text:span></text:p>
      <text:p text:style-name="P55"/>
      <text:p text:style-name="P55"/>
      <text:p text:style-name="P126">aHa.n ms<text:span text:style-name="T310">(.w)</text:span><text:span text:style-name="T337">[?]</text:span>=f <text:span text:style-name="T61">(8)</text:span><text:span text:style-name="T300"> m-b</text:span><text:span text:style-name="T311">AH</text:span><text:span text:style-name="T300"> </text:span><text:span text:style-name="T301">Hm=f </text:span><text:span text:style-name="T302">Hna in.w=f</text:span></text:p>
      <text:p text:style-name="P127">Dd=f m <text:span text:style-name="T317">swAS</text:span> Hm=f</text:p>
      <text:p text:style-name="P128">iw n=k <text:span text:style-name="T320">Ra</text:span> n PDt 9 <text:span text:style-name="T321">i</text:span>m<text:span text:style-name="T321">i</text:span> nn anx <text:span text:style-name="T321">x</text:span>r=k</text:p>
      <text:p text:style-name="P129">aHa.n Dd=f sn-<text:span text:style-name="T319">tA</text:span> <text:span text:style-name="T313">m-</text:span>b<text:span text:style-name="T312">A</text:span>H Hm=f <text:span text:style-name="T322">wH</text:span><text:span text:style-name="T303">m=f Dd xr Hm=f</text:span></text:p>
      <text:p text:style-name="P130">ii<text:span text:style-name="T328">=i </text:span>n=k <text:s/>it- <text:span text:style-name="T62">(9)</text:span><text:span text:style-name="T304"> -</text:span>y <text:span text:style-name="T305">nb Hr </text:span><text:span text:style-name="T325">Bn</text:span><text:span text:style-name="T305">t</text:span><text:span text:style-name="T325">rS</text:span><text:span text:style-name="T305"> </text:span><text:span text:style-name="T326">sn</text:span><text:span text:style-name="T305">w.t </text:span><text:span text:style-name="T327">kt n Hm.</text:span><text:span text:style-name="T306">t-nsw Nfr.w-Ra</text:span></text:p>
      <text:p text:style-name="P130"><text:span text:style-name="T306">mn </text:span><text:span text:style-name="T333">Abx(.w)</text:span><text:span text:style-name="T307"> m H</text:span><text:span text:style-name="T333">aw</text:span><text:span text:style-name="T307">=s</text:span></text:p>
      <text:p text:style-name="P52"/>
      <text:p text:style-name="P51"/>
      <text:p text:style-name="P79">Then <text:span text:style-name="T311">he was </text:span><text:span text:style-name="T335">brought </text:span><text:span text:style-name="T311">[</text:span><text:span text:style-name="T342">F 116</text:span><text:span text:style-name="T311">] (8) </text:span><text:span text:style-name="T315">before [“</text:span><text:span text:style-name="T311">into </text:span><text:span text:style-name="T314">the </text:span><text:span text:style-name="T316">potency</text:span><text:span text:style-name="T314"> of”</text:span><text:span text:style-name="T315">] </text:span><text:span text:style-name="T359">[F 77–78]</text:span><text:span text:style-name="T314"> his majesty, with </text:span><text:span text:style-name="T317">his gifts,</text:span></text:p>
      <text:p text:style-name="P80">[and] he said, <text:span text:style-name="T318">in praising [F 216] his majesty,</text:span></text:p>
      <text:p text:style-name="P81"><text:soft-page-break/>Hail to you, Re of the Nine Bows! Give us life from you!</text:p>
      <text:p text:style-name="P82">Then he <text:span text:style-name="T323">spoke </text:span><text:span text:style-name="T324">[tribute]</text:span><text:span text:style-name="T323">, </text:span><text:span text:style-name="T339">kissin</text:span><text:span text:style-name="T323">g the </text:span>earth <text:span text:style-name="T340">[TLA 888530] </text:span><text:span text:style-name="T329">[typo for </text:span><text:span text:style-name="T236">tA</text:span><text:span text:style-name="T329"> in De Buck?] </text:span>before his majesty, <text:span text:style-name="T324">[and] he continued, saying to his majesty:</text:span></text:p>
      <text:p text:style-name="P83">I have come to <text:span text:style-name="T330">you, sovereign, lord, on [account of] Bentresh, </text:span><text:span text:style-name="T331">the younger [“other”] daughter </text:span><text:span text:style-name="T332">of the king’s wife Neferure.</text:span></text:p>
      <text:p text:style-name="P84">Illness has seized [F 2] her body.</text:p>
      <text:p text:style-name="P73"/>
      <text:p text:style-name="P70"/>
      <text:p text:style-name="P25"><text:span text:style-name="T212">2</text:span><text:span text:style-name="T107">/</text:span><text:span text:style-name="T212">1</text:span><text:span text:style-name="T107">/2</text:span><text:span text:style-name="T177">6</text:span></text:p>
      <text:p text:style-name="P56"/>
      <text:p text:style-name="P56"/>
      <text:p text:style-name="P131">i<text:span text:style-name="T345">m</text:span><text:span text:style-name="T338">{</text:span><text:span text:style-name="T334">t</text:span><text:span text:style-name="T338">}</text:span><text:span text:style-name="T336">[?]</text:span><text:span text:style-name="T334"> wD</text:span><text:span text:style-name="T308"> Hm=k rx-</text:span><text:span text:style-name="T343">(</text:span><text:span text:style-name="T334">i</text:span><text:span text:style-name="T343">)</text:span><text:span text:style-name="T308">x.t r mA=s</text:span></text:p>
      <text:p text:style-name="P132">aHa Dd.n Hm=f</text:p>
      <text:p text:style-name="P134">in <text:span text:style-name="T347">n=i</text:span> T<text:span text:style-name="T349">t(iw)</text:span> nt pr-anx <text:span text:style-name="T350">qnb.(w)t</text:span> <text:span text:style-name="T64">(10)</text:span><text:span text:style-name="T309"> n</text:span><text:span text:style-name="T350">T</text:span><text:span text:style-name="T309"> Tnw</text:span></text:p>
      <text:p text:style-name="P134"><text:span text:style-name="T355">s</text:span><text:span text:style-name="T360">TA.</text:span><text:span text:style-name="T354">n=f </text:span><text:span text:style-name="T355">H</text:span><text:span text:style-name="T360">r-</text:span><text:span text:style-name="T355">a</text:span><text:span text:style-name="T360">(wy)</text:span></text:p>
      <text:p text:style-name="P133">Dd Hm=f</text:p>
      <text:p text:style-name="P135"><text:span text:style-name="T362">mt(n)</text:span> <text:span text:style-name="T362">rti </text:span><text:span text:style-name="T365">(tw)</text:span> aS<text:span text:style-name="T364">{t}</text:span>.tw n <text:span text:style-name="T366">{</text:span><text:span text:style-name="T365">t</text:span><text:span text:style-name="T366">}&lt;T&gt;</text:span>n r sDm<text:span text:style-name="T363">=</text:span>tn mdw Tn</text:p>
      <text:p text:style-name="P136">isk in <text:span text:style-name="T368">n</text:span>=i <text:span text:style-name="T367">Hm</text:span>w.t m ib=f sS m <text:span text:style-name="T370">Dbaw</text:span><text:span text:style-name="T356">=f m q</text:span><text:span text:style-name="T374">(A)</text:span><text:span text:style-name="T356">b=tn</text:span></text:p>
      <text:p text:style-name="P137">ii pw &lt;i<text:span text:style-name="T384">r</text:span>&gt; n sS <text:span text:style-name="T57">(11)</text:span> <text:span text:style-name="T375">n</text:span>sw tn +<text:span text:style-name="T376">H</text:span>wt<text:span text:style-name="T376">y-</text:span>m-<text:span text:style-name="T377">@b</text:span><text:span text:style-name="T357"> m-b</text:span><text:span text:style-name="T358">A</text:span><text:span text:style-name="T357">H Hm=f</text:span></text:p>
      <text:p text:style-name="P138"><text:span text:style-name="T381">w</text:span>D.n Hm=f Smy=f r Bxtn Hna wp.<text:span text:style-name="T383">(wt)</text:span> pn</text:p>
      <text:p text:style-name="P139">spr pw ir n <text:span text:style-name="T308">rx-</text:span><text:span text:style-name="T343">(</text:span><text:span text:style-name="T334">i</text:span><text:span text:style-name="T343">)</text:span><text:span text:style-name="T308">x.t </text:span>r Bxtn</text:p>
      <text:p text:style-name="P140"><text:span text:style-name="T387">gm</text:span>.n=f <text:span text:style-name="T388">B</text:span>nt<text:span text:style-name="T388">rS</text:span> m sxr <text:span text:style-name="T389">X</text:span>r ax.<text:span text:style-name="T390">yw</text:span></text:p>
      <text:p text:style-name="P133"/>
      <text:p text:style-name="P151"/>
      <text:p text:style-name="P160">O<text:span text:style-name="T341"> [that] your majesty </text:span><text:span text:style-name="T345">[would] </text:span><text:span text:style-name="T341">command a wise man [</text:span><text:span text:style-name="T344">missing determinative? F 151</text:span><text:span text:style-name="T341">] </text:span><text:span text:style-name="T343">to </text:span><text:span text:style-name="T346">inspect [F 100] her.</text:span></text:p>
      <text:p text:style-name="P161">Then his majesty spoke:</text:p>
      <text:p text:style-name="P162">Bring <text:span text:style-name="T348">to me </text:span><text:span text:style-name="T349">the staff [TLA 177470] of the temple [“house of life”], </text:span><text:span text:style-name="T351">the councils </text:span><text:span text:style-name="T352">[F 280] </text:span><text:span text:style-name="T63">(10)</text:span><text:span text:style-name="T353"> </text:span><text:span text:style-name="T351">of the residence.</text:span></text:p>
      <text:p text:style-name="P165">They were ushered in [F 255] immediately [F 175].</text:p>
      <text:p text:style-name="P166"><text:span text:style-name="T361">Spoke h</text:span>is majesty:</text:p>
      <text:p text:style-name="P167">Look, <text:span text:style-name="T365">it was caused that you were summoned [F 48] </text:span><text:span text:style-name="T366">to this, in order</text:span><text:span text:style-name="T365"> that you </text:span><text:span text:style-name="T366">hear [prospective] these words.</text:span></text:p>
      <text:p text:style-name="P168">Now, bring to me <text:span text:style-name="T369">a </text:span><text:span text:style-name="T371">craftsman </text:span><text:span text:style-name="T369">[F 170] </text:span><text:span text:style-name="T372">in</text:span><text:span text:style-name="T371"> his heart</text:span><text:span text:style-name="T369">, </text:span><text:span text:style-name="T371">a scribe in his fingers, </text:span><text:span text:style-name="T373">[from] within your midst [F 275].</text:span></text:p>
      <text:p text:style-name="P169">There was a coming by a <text:span text:style-name="T377">royal</text:span> <text:span text:style-name="T65">(11)</text:span><text:span text:style-name="T380"> </text:span>scribe, <text:span text:style-name="T377">this </text:span><text:span text:style-name="T378">Thothemheb [</text:span><text:span text:style-name="T237">Hb</text:span><text:span text:style-name="T378"> on F 167], </text:span><text:span text:style-name="T379">before his majesty.</text:span></text:p>
      <text:p text:style-name="P170">His majesty commanded that he go forth to Bakhtan <text:span text:style-name="T382">with this messenger.</text:span></text:p>
      <text:p text:style-name="P171">There was an arrival <text:span text:style-name="T385">by this wise man </text:span><text:span text:style-name="T386">to Bakhtan,</text:span></text:p>
      <text:p text:style-name="P172">[where] he found Bentresh in the state [F 242–243] of [being] upon <text:span text:style-name="T391">spirits </text:span><text:span text:style-name="T392">[F 4],</text:span></text:p>
      <text:p text:style-name="P163"/>
      <text:p text:style-name="P158"/>
      <text:p text:style-name="P26"><text:span text:style-name="T213">4</text:span><text:span text:style-name="T107">/</text:span><text:span text:style-name="T212">1</text:span><text:span text:style-name="T213">9</text:span><text:span text:style-name="T107">/2</text:span><text:span text:style-name="T177">6</text:span></text:p>
      <text:p text:style-name="P57"/>
      <text:p text:style-name="P57"/>
      <text:p text:style-name="P141"><text:span text:style-name="T393">gm</text:span>.n=f <text:span text:style-name="T57">(12)</text:span> sw <text:span text:style-name="T394">xry </text:span><text:span text:style-name="T395">n aHA Hna=f</text:span></text:p>
      <text:p text:style-name="P142">wn wr n Bxtn <text:span text:style-name="T396">wH</text:span><text:span text:style-name="T398">[</text:span><text:span text:style-name="T396">m=f h</text:span><text:span text:style-name="T397">(A)</text:span><text:span text:style-name="T396">b </text:span><text:span text:style-name="T397">m-bAH</text:span><text:span text:style-name="T398">]</text:span><text:span text:style-name="T397"> Hm=f </text:span><text:span text:style-name="T398">m Dd</text:span></text:p>
      <text:p text:style-name="P143">ity nb=i im wD.<text:span text:style-name="T407">{tw}</text:span> Hm=f rdi in.tw nTr[…]</text:p>
      <text:p text:style-name="P143"/>
      <text:p text:style-name="P144"><text:span text:style-name="T67">(13)</text:span><text:span text:style-name="T427"> </text:span>r Hm=f n rnp.t sp 26 Abd <text:span text:style-name="T428">(1)</text:span> Smw sw ifd <text:span text:style-name="T406">H</text:span>b Imn</text:p>
      <text:p text:style-name="P145">iw Hm=f m WAs.t</text:p>
      <text:p text:style-name="P152"><text:soft-page-break/></text:p>
      <text:p text:style-name="P152"/>
      <text:p text:style-name="P173"><text:span text:style-name="T401">[where] h</text:span>e found <text:span text:style-name="T66">(12)</text:span><text:span text:style-name="T399"> </text:span>him<text:span text:style-name="T402">[self]</text:span> an enemy [F 195] <text:span text:style-name="T426">[L 370, 372] </text:span><text:span text:style-name="T395">for fight[ing] with him.</text:span></text:p>
      <text:p text:style-name="P174">There was <text:span text:style-name="T287">[</text:span><text:span text:style-name="T405">imperfect</text:span><text:span text:style-name="T287"> converter] </text:span>a chief of Bakhtan <text:span text:style-name="T400">that [“he”] re</text:span><text:span text:style-name="T403">layed the </text:span><text:span text:style-name="T404">message</text:span><text:span text:style-name="T400"> in the presence of his majesty, saying:</text:span></text:p>
      <text:p text:style-name="P175">Sovereign, my lord, may <text:span text:style-name="T493">his</text:span><text:span text:style-name="T408"> majesty command to cause to be brought a god[</text:span><text:span text:style-name="T410">…]</text:span></text:p>
      <text:p text:style-name="P201"/>
      <text:p text:style-name="P176"><text:span text:style-name="T413">(</text:span><text:span text:style-name="T412">13)</text:span><text:span text:style-name="T409"> </text:span><text:span text:style-name="T415">[to] his majesty in year 26, </text:span><text:span text:style-name="T416">the first month of summer,</text:span><text:span text:style-name="T416"><text:note text:id="ftn5" text:note-class="footnote"><text:note-citation>5</text:note-citation><text:note-body><text:p text:style-name="P200"><text:span text:style-name="T226">Smw</text:span> = Shemu = “Harvest”.</text:p></text:note-body></text:note></text:span><text:span text:style-name="T416"> day four [of] the festival of Amun,</text:span></text:p>
      <text:p text:style-name="P177"><text:span text:style-name="T416">w</text:span><text:span text:style-name="T409">hile his majesty was in Thebes:</text:span></text:p>
      <text:p text:style-name="P164"/>
      <text:p text:style-name="P159"/>
      <text:p text:style-name="P27"><text:span text:style-name="T214">5</text:span><text:span text:style-name="T107">/</text:span><text:span text:style-name="T214">3</text:span><text:span text:style-name="T107">/2</text:span><text:span text:style-name="T177">6</text:span></text:p>
      <text:p text:style-name="P58"/>
      <text:p text:style-name="P58"/>
      <text:p text:style-name="P146"><text:span text:style-name="T411">a</text:span><text:span text:style-name="T409">Ha.n wHm.n Hm=f </text:span><text:span text:style-name="T417">m-b(AH) </text:span><text:span text:style-name="T419">#</text:span><text:span text:style-name="T417">nsw-m-W</text:span><text:span text:style-name="T422">A</text:span><text:span text:style-name="T417">s.t </text:span><text:span text:style-name="T420">N</text:span><text:span text:style-name="T417">fr-H[tp] m-Dd</text:span></text:p>
      <text:p text:style-name="P146"><text:span text:style-name="T417">pA nb nfr ir</text:span><text:span text:style-name="T418">=i </text:span><text:span text:style-name="T420">wH</text:span><text:span text:style-name="T418">m m-b(AH)=k Hr sA.t n pA wr n Bx- </text:span><text:span text:style-name="T414">(14)</text:span><text:span text:style-name="T418"> -tn</text:span></text:p>
      <text:p text:style-name="P147"><text:span text:style-name="T409">aHa.n </text:span><text:span text:style-name="T420">s</text:span><text:span text:style-name="T421">t</text:span><text:span text:style-name="T420">A.</text:span><text:span text:style-name="T409">n </text:span><text:span text:style-name="T419">#</text:span><text:span text:style-name="T409">nsw-m-W</text:span><text:span text:style-name="T422">A</text:span><text:span text:style-name="T409">s.t </text:span><text:span text:style-name="T420">N</text:span><text:span text:style-name="T409">fr-Htp r </text:span><text:span text:style-name="T422">#</text:span><text:span text:style-name="T409">nsw-</text:span><text:span text:style-name="T422">pA-ir-sxr </text:span><text:span text:style-name="T409">nTr </text:span><text:span text:style-name="T423">aA </text:span><text:span text:style-name="T409">sHr</text:span><text:span text:style-name="T424">(i)</text:span><text:span text:style-name="T409"> </text:span><text:span text:style-name="T419">SmA.w</text:span></text:p>
      <text:p text:style-name="P148"><text:span text:style-name="T409">aHa.n Dd.n </text:span><text:span text:style-name="T425">H</text:span><text:span text:style-name="T409">m=f m-b(AH) #nsw-</text:span><text:span text:style-name="T422">m-WAs.t Nfr-Htp</text:span></text:p>
      <text:p text:style-name="P153"/>
      <text:p text:style-name="P153"/>
      <text:p text:style-name="P178">Then his majesty relayed <text:span text:style-name="T429">in the presence </text:span><text:span text:style-name="T430">of Khonsu-of-Thebes Neferhotep, saying:</text:span></text:p>
      <text:p text:style-name="P179"><text:span text:style-name="T439">[“</text:span>The”<text:span text:style-name="T439">]</text:span> good lord, I make a report in your presence about [“upon”] [the] daughter of the chief of Bakh- <text:span text:style-name="T57">(14)</text:span> -tan.</text:p>
      <text:p text:style-name="P179"><text:span text:style-name="T434">T</text:span>hen Khonsu-of-Thebes Neferhotep brought [“pulled”] [F 255, <text:span text:style-name="T51">cf.</text:span><text:span text:style-name="T432"> 253</text:span>] <text:span text:style-name="T431">to </text:span>Khonsu-<text:span text:style-name="T431">the-Provider, </text:span><text:span text:style-name="T433">great god that dispels [F 238] disease-demons.</text:span></text:p>
      <text:p text:style-name="P180">Then his majesty said, <text:span text:style-name="T429">in the presence </text:span><text:span text:style-name="T430">of Khonsu-of-Thebes Neferhotep:</text:span></text:p>
      <text:p text:style-name="P180"/>
      <text:p text:style-name="P180"/>
      <text:p text:style-name="P28"><text:span text:style-name="T214">5</text:span><text:span text:style-name="T107">/</text:span><text:span text:style-name="T214">17</text:span><text:span text:style-name="T107">/2</text:span><text:span text:style-name="T177">6</text:span></text:p>
      <text:p text:style-name="P59"/>
      <text:p text:style-name="P59"/>
      <text:p text:style-name="P202">pA nb nfr iw ir <text:span text:style-name="T442">di</text:span>=k <text:span text:style-name="T435">Hr=k r #nsw- </text:span><text:span text:style-name="T68">(15)</text:span><text:span text:style-name="T435"> -</text:span><text:span text:style-name="T438">p</text:span><text:span text:style-name="T440">(A)-</text:span><text:span text:style-name="T443">i</text:span><text:span text:style-name="T435">r-sxr nTr aA sHr</text:span><text:span text:style-name="T484">(i)</text:span><text:span text:style-name="T435"> SmA.w r</text:span><text:span text:style-name="T445">di.t</text:span><text:span text:style-name="T435"> Sm</text:span><text:span text:style-name="T445">i</text:span><text:span text:style-name="T435">=</text:span><text:span text:style-name="T445">f</text:span><text:span text:style-name="T435"> r Bxtn</text:span></text:p>
      <text:p text:style-name="P202"><text:span text:style-name="T436">hn wr </text:span><text:span text:style-name="T445">sp 2</text:span></text:p>
      <text:p text:style-name="P203">aHa.n dD.n Hm=f</text:p>
      <text:p text:style-name="P204"><text:span text:style-name="T446">im</text:span> <text:span text:style-name="T449">sA</text:span>=k Hna=f <text:span text:style-name="T448">di=i</text:span> Smi Hm=f r Bxtn r nHm <text:span text:style-name="T447">sA.</text:span>t n wr n Bxtn</text:p>
      <text:p text:style-name="P204"><text:span text:style-name="T57">(16)</text:span> <text:span text:style-name="T437">hn tp wr </text:span><text:span text:style-name="T451">sp 2</text:span><text:span text:style-name="T437"> n #nsw-m-WAs.t Nfr-Htp</text:span></text:p>
      <text:p text:style-name="P205">aHa ir.n=f <text:span text:style-name="T453">sA </text:span><text:span text:style-name="T438">n #nsw-p</text:span><text:span text:style-name="T440">(A)-</text:span><text:span text:style-name="T438">ir-sxr-m-WAs.t spr 4</text:span></text:p>
      <text:p text:style-name="P154"/>
      <text:p text:style-name="P154"/>
      <text:p text:style-name="P182"><text:span text:style-name="T439">[“</text:span>The”<text:span text:style-name="T439">]</text:span> good lord, <text:span text:style-name="T441">will[? Middle </text:span><text:span text:style-name="T238">in iw</text:span><text:span text:style-name="T441"> to Late </text:span><text:span text:style-name="T238">iw ir</text:span><text:span text:style-name="T441">?] </text:span><text:span text:style-name="T442">you turn [“give”] your face toward Khonsu- </text:span><text:span text:style-name="T69">(15)</text:span><text:span text:style-name="T442"> -the-Provider, </text:span><text:span text:style-name="T443">the great god </text:span><text:span text:style-name="T444">that dispels disease-demons, </text:span><text:span text:style-name="T445">to cause that he go to Bakhtan?</text:span></text:p>
      <text:p text:style-name="P183">A gr<text:span text:style-name="T456">and</text:span> nod [TLA 98810], twice.</text:p>
      <text:p text:style-name="P184">Then his majesty said:</text:p>
      <text:p text:style-name="P185"><text:soft-page-break/>Give your <text:span text:style-name="T454">[magical]</text:span> protection [F 207] [Gardiner sign V16, substituting for V17] <text:span text:style-name="T450">to [“with”] him, [as] I cause his majesty [?] to go to Bakhtan to rescue the daughter of the chief of Bakhtan.</text:span></text:p>
      <text:p text:style-name="P186"><text:span text:style-name="T57">(16)</text:span> <text:span text:style-name="T452">A </text:span><text:span text:style-name="T456">grand</text:span><text:span text:style-name="T452"> nod of the head, twice, of Khonsu-of-Thebes Neferhotep.</text:span></text:p>
      <text:p text:style-name="P187">Then he made <text:span text:style-name="T454">protection for Khonsu-the-Provider-in-Thebes, four times.</text:span></text:p>
      <text:p text:style-name="P181"/>
      <text:p text:style-name="P181"/>
      <text:p text:style-name="P29"><text:span text:style-name="T214">5</text:span><text:span text:style-name="T107">/</text:span><text:span text:style-name="T215">31</text:span><text:span text:style-name="T107">/2</text:span><text:span text:style-name="T177">6</text:span></text:p>
      <text:p text:style-name="P60"/>
      <text:p text:style-name="P60"/>
      <text:p text:style-name="P206">wD.n Hm=f rdi.t wDA #nsw-ir-sxr-m-WAs.t r wi<text:span text:style-name="T455">(A)</text:span> aA</text:p>
      <text:p text:style-name="P206">qAqA.<text:span text:style-name="T456">(w)</text:span> 5</text:p>
      <text:p text:style-name="P206">wrr<text:span text:style-name="T458">(y)</text:span>.t <text:span text:style-name="T70">(17)</text:span></text:p>
      <text:p text:style-name="P207">smsm<text:span text:style-name="T459">[ti]</text:span>.w <text:span text:style-name="T459">aSA.wt imnt.t iAbt.t</text:span></text:p>
      <text:p text:style-name="P208">spr nTr pn <text:span text:style-name="T460">r Bxtn n </text:span><text:span text:style-name="T464">k</text:span><text:span text:style-name="T460">m rnp.t 1 Abd 5</text:span></text:p>
      <text:p text:style-name="P209">aHa.n <text:span text:style-name="T461">ii.n wr n Bxtn H</text:span><text:span text:style-name="T465">n</text:span><text:span text:style-name="T461">a </text:span><text:span text:style-name="T465">mSa</text:span><text:span text:style-name="T461">=f </text:span><text:span text:style-name="T467">sr.(w)</text:span><text:span text:style-name="T462">=f r-H</text:span><text:span text:style-name="T468">A</text:span><text:span text:style-name="T462">t n #nsw-ir-sxr</text:span></text:p>
      <text:p text:style-name="P210">rdi.n=f sw <text:span text:style-name="T57">(18)</text:span> Hr X.<text:span text:style-name="T470">t</text:span>=f m Dd</text:p>
      <text:p text:style-name="P211">iw=k n<text:span text:style-name="T471">=</text:span>n Htp=k n<text:span text:style-name="T471">=</text:span>n</text:p>
      <text:p text:style-name="P211"><text:span text:style-name="T463">m wD.</text:span><text:span text:style-name="T478">w</text:span><text:span text:style-name="T473">t n</text:span><text:span text:style-name="T463"> Nsw.t Bity </text:span><text:span text:style-name="T99">W</text:span><text:span text:style-name="T100">sr-MaA.t-Ra </text:span><text:span text:style-name="T101">%tp-</text:span><text:span text:style-name="T102">(n)</text:span><text:span text:style-name="T101">-Ra</text:span></text:p>
      <text:p text:style-name="P157"/>
      <text:p text:style-name="P155"/>
      <text:p text:style-name="P188">His majesty commanded to cause Khonsu-the-Provider-in-Thebes to set out [F 75] <text:span text:style-name="T455">toward the great barque, </text:span><text:span text:style-name="T456">[with] </text:span></text:p>
      <text:p text:style-name="P188"><text:span text:style-name="T456">five </text:span><text:span text:style-name="T458">river-</text:span><text:span text:style-name="T456">boats </text:span><text:span text:style-name="T458">[TLA 159600]</text:span><text:span text:style-name="T456">,</text:span></text:p>
      <text:p text:style-name="P188"><text:span text:style-name="T457">a chari- </text:span><text:span text:style-name="T71">(17)</text:span><text:span text:style-name="T457"> -ot </text:span><text:span text:style-name="T458">[F 65]</text:span><text:span text:style-name="T457">,</text:span></text:p>
      <text:p text:style-name="P189">[and] numerous beasts [TLA 135790?] [on] the right [“to the west”] and the left [“east”].</text:p>
      <text:p text:style-name="P190">This god arrived at Bakhtan at the completion [F 308, missing determinative?] of 1 year, 5 months.</text:p>
      <text:p text:style-name="P191">Then the chief of Bakhtan <text:span text:style-name="T468">came</text:span>, <text:span text:style-name="T466">with [</text:span><text:span text:style-name="T477">Dieter: Ptolemaic </text:span><text:span text:style-name="T466">spelling?] his troop </text:span><text:span text:style-name="T467">[and] his noble[s] </text:span><text:span text:style-name="T469">[F 235] [footnote 1 in N: “uncertain”]</text:span><text:span text:style-name="T467">, </text:span><text:span text:style-name="T468">in front of Khonsu-the-Provider.</text:span></text:p>
      <text:p text:style-name="P192">He put himself <text:span text:style-name="T57">(18)</text:span> upon his belly, saying:</text:p>
      <text:p text:style-name="P193"><text:span text:style-name="T472">[When] </text:span>you <text:span text:style-name="T472">come to us</text:span>, <text:span text:style-name="T479">you </text:span>[<text:span text:style-name="T479">are</text:span>] peaceful to us,</text:p>
      <text:p text:style-name="P194">according to [“as”] the command<text:span text:style-name="T480">s</text:span> of the <text:span text:style-name="T474">Dual King, User</text:span><text:span text:style-name="T475">m</text:span><text:span text:style-name="T474">aat</text:span><text:span text:style-name="T475">r</text:span><text:span text:style-name="T474">e </text:span><text:span text:style-name="T475">Setepenre.</text:span></text:p>
      <text:p text:style-name="P195"/>
      <text:p text:style-name="P195"/>
      <text:p text:style-name="P199">6/14/26</text:p>
      <text:p text:style-name="P196"/>
      <text:p text:style-name="P196"/>
      <text:p text:style-name="P212"><text:span text:style-name="T101">a</text:span><text:span text:style-name="T73">Ha.n Smi.n nTr pn r b</text:span><text:span text:style-name="T103">w.(t)</text:span><text:span text:style-name="T73"> nty iw BnTrS im</text:span></text:p>
      <text:p text:style-name="P214">aHa ir.n=f sA n sA.t n wr n Bxtn</text:p>
      <text:p text:style-name="P215">nfr <text:span text:style-name="T72">(19)</text:span><text:span text:style-name="T482"> </text:span>s Hr-a</text:p>
      <text:p text:style-name="P216">aHa.n Dd.n <text:span text:style-name="T483">Ax.t pn nty Hna=s m-bAH #nsw-ir-sxr-m-WAs.t</text:span></text:p>
      <text:p text:style-name="P217">ii.T<text:span text:style-name="T487">(i)</text:span> im Htp <text:span text:style-name="T484">ntr aA Hr sHr(i) </text:span><text:span text:style-name="T485">SmAw</text:span></text:p>
      <text:p text:style-name="P217"><text:span text:style-name="T486">dmi=k pw Bxtn</text:span></text:p>
      <text:p text:style-name="P218">Hm.w=k pw rmT=f</text:p>
      <text:p text:style-name="P218">ink pw Hm=k</text:p>
      <text:p text:style-name="P218"><text:span text:style-name="T57">(20)</text:span> iw=<text:span text:style-name="T491">[</text:span><text:span text:style-name="T488">i</text:span><text:span text:style-name="T491">]</text:span> Smi r b<text:span text:style-name="T490">(</text:span><text:span text:style-name="T489">w</text:span><text:span text:style-name="T490">)</text:span><text:span text:style-name="T489">{</text:span>t<text:span text:style-name="T489">}</text:span> <text:span text:style-name="T488">iw</text:span><text:span text:style-name="T491">=i</text:span><text:span text:style-name="T488"> im r rdi Htp i</text:span><text:span text:style-name="T492">b=</text:span><text:span text:style-name="T488">k Hr iw=k Hr=s</text:span></text:p>
      <text:p text:style-name="P156"/>
      <text:p text:style-name="P156"/>
      <text:p text:style-name="P197">Then this god went to the place in which Bentresh was [“therein”].</text:p>
      <text:p text:style-name="P198"><text:soft-page-break/><text:span text:style-name="T481">Then he made protection [Gardiner sign V17 this time!] </text:span><text:span text:style-name="T476">for the daughter of the chief of Bakhtan.</text:span></text:p>
      <text:p text:style-name="P198"><text:span text:style-name="T482">Well </text:span><text:span text:style-name="T72">(19)</text:span> she <text:span text:style-name="T482">became [“was”] in an instant.</text:span></text:p>
      <text:p text:style-name="P224">Then this <text:span text:style-name="T50">akh</text:span> that was with her spoke in the presence of Khonsu-the-Provider-in-Thebes:</text:p>
      <text:p text:style-name="P224">Welcome in peace, great god who dispels disease-demons <text:span text:style-name="T494">[Faulkner 266: same spelling as the word for “foreigners”, but would take a different determinative]</text:span>.</text:p>
      <text:p text:style-name="P225">Bakhtan is your home.</text:p>
      <text:p text:style-name="P225">Its people are your servants.</text:p>
      <text:p text:style-name="P225">I am your servant.</text:p>
      <text:p text:style-name="P226">(20) <text:span text:style-name="T495">I </text:span><text:span text:style-name="T496">[spelled with the divine determinative!] </text:span><text:span text:style-name="T495">will </text:span><text:span text:style-name="T496">go to the place that I am from, will cause peace [to] your heart regarding [“upon”] that which you were </text:span><text:span text:style-name="T498">up</text:span><text:span text:style-name="T496">on [“it”].</text:span></text:p>
      <text:p text:style-name="P198"/>
      <text:p text:style-name="P196"/>
      <text:p text:style-name="P227">6/<text:span text:style-name="T492">28</text:span>/26</text:p>
      <text:p text:style-name="P221"/>
      <text:p text:style-name="P221"/>
      <text:p text:style-name="P219"><text:span text:style-name="T101">im wD.</text:span><text:span text:style-name="T104">{tw}</text:span><text:span text:style-name="T101"> Hm=</text:span><text:span text:style-name="T105">k r ir hrw nfr Hna</text:span><text:span text:style-name="T106">=i Hna p(A) wr n Bxtn</text:span></text:p>
      <text:p text:style-name="P222"/>
      <text:p text:style-name="P222"/>
      <text:p text:style-name="P223">May your majesty command [compare line 12] to <text:span text:style-name="T495">make a celebration day [“great day”] with me, with the chief of Bakhtan.</text:span></text:p>
      <text:p text:style-name="P188"/>
      <text:p text:style-name="P183"/>
      <text:p text:style-name="P1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7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178</meta:editing-cycles>
    <meta:print-date>2025-02-09T21:44:00</meta:print-date>
    <meta:creation-date>2025-01-12T21:03:00</meta:creation-date>
    <dc:date>2026-06-14T21:57:25.018480390</dc:date>
    <meta:editing-duration>P5DT21H56M17S</meta:editing-duration>
    <meta:generator>LibreOffice/7.3.7.2$Linux_X86_64 LibreOffice_project/30$Build-2</meta:generator>
    <meta:document-statistic meta:table-count="1" meta:image-count="0" meta:object-count="0" meta:page-count="9" meta:paragraph-count="222" meta:word-count="2197" meta:character-count="12273" meta:non-whitespace-character-count="10291"/>
    <meta:user-defined meta:name="AppVersion">16.0000</meta:user-defined>
    <meta:template xlink:type="simple" xlink:actuate="onRequest" xlink:title="Normal" xlink:href=""/>
  </office:meta>
</office:document-meta>
</file>