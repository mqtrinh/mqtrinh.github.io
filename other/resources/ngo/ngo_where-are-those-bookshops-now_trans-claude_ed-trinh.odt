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2facb" officeooo:paragraph-rsid="01e2facb"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ubtitle">
      <style:text-properties officeooo:paragraph-rsid="015168a3"/>
    </style:style>
    <style:style style:name="P5" style:family="paragraph" style:parent-style-name="Text_20_body">
      <style:text-properties officeooo:paragraph-rsid="015168a3"/>
    </style:style>
    <style:style style:name="P6" style:family="paragraph" style:parent-style-name="Text_20_body">
      <style:text-properties officeooo:paragraph-rsid="01398fa7"/>
    </style:style>
    <style:style style:name="P7" style:family="paragraph" style:parent-style-name="Text_20_body">
      <style:paragraph-properties fo:text-align="center" style:justify-single-word="false"/>
      <style:text-properties fo:font-style="italic" officeooo:rsid="015c9c83" officeooo:paragraph-rsid="015c9c83" style:font-style-asian="italic" style:font-style-complex="italic"/>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center" style:justify-single-word="false"/>
      <style:text-properties fo:font-style="italic" officeooo:rsid="01577485" officeooo:paragraph-rsid="0136cd54" style:font-style-asian="italic" style:font-style-complex="italic"/>
    </style:style>
    <style:style style:name="P10" style:family="paragraph" style:parent-style-name="Text_20_body">
      <style:paragraph-properties fo:text-align="center" style:justify-single-word="false"/>
      <style:text-properties fo:font-style="italic" officeooo:rsid="01d4ea5b" officeooo:paragraph-rsid="01d4ea5b" style:font-style-asian="italic" style:font-style-complex="italic"/>
    </style:style>
    <style:style style:name="P11" style:family="paragraph" style:parent-style-name="Text_20_body">
      <style:paragraph-properties fo:text-align="center" style:justify-single-word="false"/>
      <style:text-properties officeooo:rsid="015c9c83" officeooo:paragraph-rsid="015c9c83"/>
    </style:style>
    <style:style style:name="P12" style:family="paragraph" style:parent-style-name="Title">
      <style:text-properties officeooo:rsid="0181a885" officeooo:paragraph-rsid="0181a885"/>
    </style:style>
    <style:style style:name="P13" style:family="paragraph" style:parent-style-name="Text_20_body">
      <style:text-properties fo:font-style="normal" officeooo:paragraph-rsid="013840d9" style:font-style-asian="normal" style:font-style-complex="normal"/>
    </style:style>
    <style:style style:name="P14" style:family="paragraph" style:parent-style-name="Text_20_body">
      <style:text-properties fo:font-style="normal" officeooo:paragraph-rsid="01d0a8e7" style:font-style-asian="normal" style:font-style-complex="normal"/>
    </style:style>
    <style:style style:name="P15" style:family="paragraph" style:parent-style-name="Text_20_body">
      <style:text-properties fo:font-style="normal" officeooo:paragraph-rsid="01d6d034" style:font-style-asian="normal" style:font-style-complex="normal"/>
    </style:style>
    <style:style style:name="P16" style:family="paragraph" style:parent-style-name="Subtitle">
      <style:text-properties officeooo:paragraph-rsid="0153f6b6"/>
    </style:style>
    <style:style style:name="P17" style:family="paragraph" style:parent-style-name="Text_20_body">
      <style:paragraph-properties fo:text-align="center" style:justify-single-word="false"/>
      <style:text-properties officeooo:paragraph-rsid="013a8899"/>
    </style:style>
    <style:style style:name="P18" style:family="paragraph" style:parent-style-name="Text_20_body">
      <style:paragraph-properties fo:text-align="center" style:justify-single-word="false"/>
      <style:text-properties officeooo:rsid="0136cd54" officeooo:paragraph-rsid="0136cd54"/>
    </style:style>
    <style:style style:name="P19" style:family="paragraph" style:parent-style-name="Title">
      <style:text-properties officeooo:rsid="01d4ea5b" officeooo:paragraph-rsid="01d4ea5b"/>
    </style:style>
    <style:style style:name="P20" style:family="paragraph" style:parent-style-name="Text_20_body">
      <style:text-properties officeooo:paragraph-rsid="01e0dec6"/>
    </style:style>
    <style:style style:name="P21" style:family="paragraph" style:parent-style-name="Text_20_body">
      <style:text-properties officeooo:paragraph-rsid="01426698"/>
    </style:style>
    <style:style style:name="P22" style:family="paragraph" style:parent-style-name="Footnote">
      <style:text-properties officeooo:rsid="01ef3cfa" officeooo:paragraph-rsid="01ef3cfa"/>
    </style:style>
    <style:style style:name="P23" style:family="paragraph" style:parent-style-name="Footnote">
      <style:text-properties officeooo:rsid="01f3139a" officeooo:paragraph-rsid="01f3139a"/>
    </style:style>
    <style:style style:name="P24" style:family="paragraph" style:parent-style-name="Footnote">
      <style:text-properties officeooo:rsid="01fdbf47" officeooo:paragraph-rsid="01fdbf47"/>
    </style:style>
    <style:style style:name="P25" style:family="paragraph" style:parent-style-name="Footnote">
      <style:text-properties officeooo:rsid="01f1dce1" officeooo:paragraph-rsid="020b4260"/>
    </style:style>
    <style:style style:name="T1" style:family="text">
      <style:text-properties officeooo:rsid="0205215e"/>
    </style:style>
    <style:style style:name="T2" style:family="text">
      <style:text-properties fo:font-style="italic" style:font-style-asian="italic" style:font-style-complex="italic"/>
    </style:style>
    <style:style style:name="T3" style:family="text">
      <style:text-properties fo:font-style="italic" officeooo:rsid="013bfe0f" style:font-style-asian="italic" style:font-style-complex="italic"/>
    </style:style>
    <style:style style:name="T4" style:family="text">
      <style:text-properties fo:font-style="italic" officeooo:rsid="0153f6b6" style:font-style-asian="italic" style:font-style-complex="italic"/>
    </style:style>
    <style:style style:name="T5" style:family="text">
      <style:text-properties fo:font-style="italic" officeooo:rsid="01577485" style:font-style-asian="italic" style:font-style-complex="italic"/>
    </style:style>
    <style:style style:name="T6" style:family="text">
      <style:text-properties fo:font-style="italic" officeooo:rsid="0158e3a4" style:font-style-asian="italic" style:font-style-complex="italic"/>
    </style:style>
    <style:style style:name="T7" style:family="text">
      <style:text-properties fo:font-style="italic" officeooo:rsid="013a8899" style:font-style-asian="italic" style:font-style-complex="italic"/>
    </style:style>
    <style:style style:name="T8" style:family="text">
      <style:text-properties fo:font-style="italic" officeooo:rsid="01f1dce1" style:font-style-asian="italic" style:font-style-complex="italic"/>
    </style:style>
    <style:style style:name="T9" style:family="text">
      <style:text-properties fo:font-style="italic" officeooo:rsid="01f51302" style:font-style-asian="italic" style:font-style-complex="italic"/>
    </style:style>
    <style:style style:name="T10" style:family="text">
      <style:text-properties fo:font-style="italic" officeooo:rsid="01fe9a4b" style:font-style-asian="italic" style:font-style-complex="italic"/>
    </style:style>
    <style:style style:name="T11" style:family="text">
      <style:text-properties fo:font-style="italic" officeooo:rsid="020b4260" style:font-style-asian="italic" style:font-style-complex="italic"/>
    </style:style>
    <style:style style:name="T12" style:family="text">
      <style:text-properties officeooo:rsid="01432a59"/>
    </style:style>
    <style:style style:name="T13" style:family="text">
      <style:text-properties officeooo:rsid="015de7d8"/>
    </style:style>
    <style:style style:name="T14" style:family="text">
      <style:text-properties officeooo:rsid="01dade7f"/>
    </style:style>
    <style:style style:name="T15" style:family="text">
      <style:text-properties officeooo:rsid="01e26c76"/>
    </style:style>
    <style:style style:name="T16" style:family="text">
      <style:text-properties officeooo:rsid="01e40743"/>
    </style:style>
    <style:style style:name="T17" style:family="text">
      <style:text-properties officeooo:rsid="01e5bb75"/>
    </style:style>
    <style:style style:name="T18" style:family="text">
      <style:text-properties fo:font-style="normal" style:font-style-asian="normal" style:font-style-complex="normal"/>
    </style:style>
    <style:style style:name="T19" style:family="text">
      <style:text-properties fo:font-style="normal" officeooo:rsid="01f51302" style:font-style-asian="normal" style:font-style-complex="normal"/>
    </style:style>
    <style:style style:name="T20" style:family="text">
      <style:text-properties fo:font-style="normal" officeooo:rsid="020b4260" style:font-style-asian="normal" style:font-style-complex="normal"/>
    </style:style>
    <style:style style:name="T21" style:family="text">
      <style:text-properties officeooo:rsid="01f90f5b"/>
    </style:style>
    <style:style style:name="T22" style:family="text">
      <style:text-properties officeooo:rsid="01fcf593"/>
    </style:style>
    <style:style style:name="T23" style:family="text">
      <style:text-properties officeooo:rsid="01fe9a4b"/>
    </style:style>
    <style:style style:name="T24" style:family="text">
      <style:text-properties officeooo:rsid="02006c03"/>
    </style:style>
    <style:style style:name="T25" style:family="text">
      <style:text-properties officeooo:rsid="0201f058"/>
    </style:style>
    <style:style style:name="T26" style:family="text">
      <style:text-properties officeooo:rsid="020b42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here Are Those Books<text:span text:style-name="T21">hop</text:span>s<text:note text:id="ftn1" text:note-class="footnote"><text:note-citation>1</text:note-citation><text:note-body><text:p text:style-name="P24">Claude consistently translated <text:span text:style-name="T2">tiệm sách</text:span> as <text:span text:style-name="T2">bookshop</text:span>. <text:span text:style-name="T23">I have altered some occur</text:span><text:span text:style-name="T24">r</text:span><text:span text:style-name="T23">ences to </text:span><text:span text:style-name="T10">bookseller</text:span><text:span text:style-name="T23"> or </text:span><text:span text:style-name="T10">bookstore</text:span><text:span text:style-name="T23">, </text:span><text:span text:style-name="T25">to fit the</text:span><text:span text:style-name="T23"> connotation.</text:span></text:p></text:note-body></text:note> Now?</text:p>
      <text:p text:style-name="P16">Châu Ngô</text:p>
      <text:p text:style-name="Text_20_body"/>
      <text:p text:style-name="P10">February 2, 2014</text:p>
      <text:p text:style-name="P9"/>
      <text:p text:style-name="P18"><text:span text:style-name="T5">Translat</text:span><text:span text:style-name="T6">e</text:span><text:span text:style-name="T5">d b</text:span><text:span text:style-name="T2">y Claude Sonnet 4.6</text:span></text:p>
      <text:p text:style-name="P17"><text:span text:style-name="T5">E</text:span><text:span text:style-name="T7">dited by </text:span><text:span text:style-name="T3">Minh-Tâ</text:span><text:span text:style-name="T4">m Quang Trinh</text:span></text:p>
      <text:p text:style-name="P13"/>
      <text:p text:style-name="P15">At the end of October I returned to Paris for a few days on a small piece of business. To make the most of the time, I arranged, on the very first day, to meet several colleagues at the IHES to work together. Eight years earlier I had spent a long stretch working there. In those days, every morning I would take the B line down to the Bures stop, about ten minutes’ walk from the institute. This time I decided to set out earlier than usual, to give myself time to stop at the bookshop near Bures station and buy the newly published edition of Camus’s <text:span text:style-name="T2">Algerian Chronicles</text:span>. The shop was right on the way from the station to the institute, at the exact corner where one turns left. I still remembered the owner, who always looked at you over the rim of her glasses — perched low on her nose — always ready to advise you on books with a seriousness and a professional pride that were entirely her own. I’m not sure how it happened, but this time I searched and searched and couldn’t find the shop anywhere, and perhaps because of that felt genuinely disoriented, the way one feels when suddenly lost. It took me nearly ten minutes to understand that the Bures bookshop had closed. Where there had once been a bright, tidy, clean little shop, there was now a dark room, its glass door plastered crookedly with garish advertisements.</text:p>
      <text:p text:style-name="P14">Last summer, Trương Quý gave me a collection of essays by Nguyễn Việt Hà. Anh Hà’s prose is wry and amusing. <text:span text:style-name="T14">R</text:span>eading it, you occa-sionally feel a quiet smile coming on, but when the smile passes you feel more melancholy than glad. There is one passage about the old bookshops of Hanoi that is rather bleak, yet <text:span text:style-name="T15">upon</text:span> reading it, I felt something like joy. Anh Hà mentions an old bookshop on Hàng Bài Street, just to the left of the Tháng Tám cinema. In the late 1970s, I used to pass it every afternoon and stand lingering at the glass, even knowing I had no money to buy anything, and even if I had, I wouldn’t have understood what I read, because they didn’t sell children’s books there. But this was the place where my grandfather bought me my first book: a volume on the science of animal husbandry. I was enchanted by it solely because the cover was illustrated with some very fine pigs. That bookshop closed long ago. <text:soft-page-break/>My grandfather is gone. Relatives and neighbors of mine — I cannot understand why — have no memory of it ever existing. Reading the book Trương Quý gave me, I discovered there was at least one other person — Nguyễn Việt Hà — who still remembered it. We’ve never met, I don’t know him, and yet I felt an immediate fondness for him. There is one detail, though, that Anh Hà may not know. Behind the Hàng Bài bookshop was the home of Mr. and Mrs. Dực. Mr. Dực was the son of the scholar Nguyễn Văn Vĩnh. I suspect the bookshop had some connection to that scholar.</text:p>
      <text:p text:style-name="P14">People sometimes ask me why, among all my options, I chose to go and teach in Chicago — one of the coldest cities in America. (As I write these lines, the temperature outside has dropped below minus ten degrees Celsius.) I have a stock of reasons I can draw on de-pending on the occasion. One very honest answer that few people believe is that the area around the University of Chicago is full of books<text:span text:style-name="T22">eller</text:span>s. The largest is Seminary Co-op. It has two branches. The main branch can only be described as a paradise of academic books. Whenever I have a few spare minutes after lunch, I wander in to lose myself. There are so many titles in the humanities that I would never have encountered if I hadn’t seen them at Seminary Co-op. The smaller branch sells mainly fiction and children’s books: the favorite haunt of little Nguyên and An,<text:note text:id="ftn2" text:note-class="footnote"><text:note-citation>2</text:note-citation><text:note-body><text:p text:style-name="P22">Two of Ngô’s daughters.</text:p></text:note-body></text:note> and the place I take them whenever I need to get back in their good graces. My own favorite haunt is the secondhand bookshop Powell’s. I have never left Powell’s without cheerfully carrying home two or three old books — rare finds, in my estimation, and always very reasonably priced. There was formerly another shop in the university neighborhood called Borders, which closed two years ago. This was one of the two largest books<text:span text:style-name="T22">tore</text:span> chains in America: wide retail spaces, selling books alongside pastries and coffee, a business model that was hugely popular for a time. In the afternoons after school, children sprawled all over the shop reading. Unfortunately, Borders’ business model did not survive the age of online retail, and it was among the first casualties of the Amazon empire. Right next door to campus, a Barnes &amp; Noble ope-rating on a similar model still hangs on, barely.</text:p>
      <text:p text:style-name="P14">I sincerely believe that life in any given place is more pleasant and more humane if that place has many bookshops. Hanoi now has far too few. The highest concentration is on Đinh Lễ Street, where new books are sold at the <text:span text:style-name="T16">sharpest</text:span> possible discounts. If you need to find a book published even a year ago, you could walk the full length of Đinh Lễ Street and not find it. Đinh Lễ feels more like a market than a bookshop district. You go there to buy cheap books, not to browse unhurriedly for a title you didn’t know you were looking for. Even so, going to Đinh Lễ is pleasant in its own way: you’re suddenly re-minded that there are still quite a few people around you who enjoy reading.</text:p>
      <text:p text:style-name="P14">On Tràng Tiền Street, two state-run books<text:span text:style-name="T22">tore</text:span>s survive. Near the old Bodega ice-cream parlor is the one still called by its old name, the Foreign Languages books<text:span text:style-name="T22">tore</text:span>: <text:span text:style-name="T15">T</text:span>here’s a column outside with the <text:soft-page-break/>Russian word <text:span text:style-name="T2">kniga</text:span> on it. Inside it is always as dark as Chị Dậu’s prospects.<text:note text:id="ftn3" text:note-class="footnote"><text:note-citation>3</text:note-citation><text:note-body><text:p text:style-name="P23">A reference to the 1937 novel <text:span text:style-name="T2">Tắt đè</text:span><text:span text:style-name="T9">n</text:span><text:span text:style-name="T19">: See Claude’s notes.</text:span></text:p></text:note-body></text:note> Across the street, near the old People’s Daily printing house — now the French Cultural Centre — stands the six-story building of the State Book Corporation. This one is brighter, but its business style remains steadfastly loyal to the state-enterprise ideal. For all its large floor space, the number of titles it carries is not much greater than a stall on Đinh Lễ Street, and since there are naturally no discounts, I suspect its revenue isn’t much greater than Chị Hoa’s sidewalk stall either. A decade ago, when the Corporation applied to the state for funds to build this building, I believe the sincere and deep ambition of its directors was to bring the light of culture to the people. But the harsh business environment did not allow that dream to become reality. Before long, the Corporation will be converting part of the building’s use to a fitness and beauty center. Different from the original purpose, certainly, but still a form of serving the people — mainly, of course, the people with money.</text:p>
      <text:p text:style-name="P14">The Little Prince, Saint-Exupéry’s creation, had very little faith in the reasoning capacity of adults. Adults like to draw up business plans, then work steadily to meet the targets they’ve set themselves, then regularly update the balance sheet so they can track their profits. Most of the time we do exactly the same in our own daily work, and so we find it easy to sympathize with them. But human despair has very little to do with business plans or balance sheets. Lately, people like to talk about existentialism in a rather reductive way: that we need concern ourselves with nothing beyond the present moment we are living in. The philosophy sounds appealing, carries a faint Zen quality, but is mistaken. Human despair has its roots in the past and the future: <text:span text:style-name="T17">I</text:span>t is the regret we feel for what is gone and the fear we feel about what is to come. Living entirely in the present may soothe despair for a little while, but despair will come swinging back like a boomerang and strike us in the face with twice the force. Human beings need something elevated to hold onto — something to hoist themselves up by, so they can look back at the past and forward to the future without regret, without fear.</text:p>
      <text:p text:style-name="P14">You can find both the despair and the nobility of the human soul in the pages of books. And that is why you want an old bookshop not too far from where you live.</text:p>
      <text:p text:style-name="P14">(Previously published in <text:span text:style-name="T2">Tuổi Trẻ Cuối Tuần</text:span> and <text:span text:style-name="T2">Học Thế Nào</text:span>)</text:p>
      <text:p text:style-name="P6"/>
      <text:p text:style-name="P12">Những tiệm sách ấy, bây giờ ở đâu</text:p>
      <text:p text:style-name="P4">Ngô Bảo Châu</text:p>
      <text:p text:style-name="P5"/>
      <text:p text:style-name="P7"><text:span text:style-name="T13">Text u</text:span>nedited</text:p>
      <text:p text:style-name="P11"/>
      <text:p text:style-name="P20"><text:soft-page-break/>Cuối tháng mười, tôi quay lại Paris mấy hôm vì chút công việc. Để tiết kiệm thời gian, ngay hôm đầu tiên tôi đã hẹn mấy người đồng nghiệp đến viện IHES cùng làm việc. Tám năm trước, tôi đã từng làm việc ở đây trong một thời gian dài. Dạo ấy, hàng sáng tôi lấy tàu B đi xuống bến Bures cách viện IHES khoảng mười phút đi bộ. Lần này, tôi quyết định đi sớm hơn thường lệ để có thời gian qua tiệm sách gần nhà ga Bures mua quyển Ký sự Algerie của Camus mới xuất bản. Tiệm sách nằm ngay trên đường đi từ nhà ga đến viện, đúng ở chỗ góc phố nơi phải rẽ trái. Tôi còn nhớ bà chủ tiệm luôn nhìn bạn qua cặp kính để trễ xuống mũi, luôn ở trong tư thế sẵn sàng tư vấn sách vở cho bạn với thái độ nghiêm túc và đầy tự hào nghề nghiệp. Không biết làm sao mà lần này tôi tìm mãi không thấy tiệm sách đâu và có lẽ vì thế mà cảm thấy thực sự hoang mang như một người đi lạc đường. Mất tới gần mười phút tôi mới hiểu ra rằng tiệm sách Bures đã đóng cửa. Nơi xưa là một tiệm sách sáng sủa, ngăn nắp và sạch sẽ, nay là một gian nhà tối om, trên cửa kính dán xô lệch những tờ quảng cáo loè loẹt.</text:p>
      <text:p text:style-name="P20">Dịp hè vừa rồi, Trương Quý có cho tôi một quyển tản văn của Nguyễn Việt Hà. Văn anh Hà hóm hỉnh, đọc thỉnh thoảng muốn tủm tỉm cười, nhưng cười xong thì thấy buồn nhiều hơn là vui. Có một đoạn về những tiệm sách cũ của Hà Nội hơi thê lương, nhưng đọc đoạn này tôi lại cảm thấy vui. Anh Hà nhắc đến một tiệm sách cũ ở phố Hàng Bài, ngay phía bên trái rạp Tháng Tám. <text:s/>Vào cuối những năm bảy mươi, chiều nào tôi cũng đi qua, rồi đứng tần ngần nhìn qua cửa kính, dù biết mình không có tiền để mua sách và dù có mua thì đọc cũng không hiểu vì ở đấy không bán sách cho trẻ con. Nhưng đây là nơi ông ngoại mua cho tôi quyển sách đầu tiên, một quyển sách về ngành khoa học chăn nuôi. Tôi mê mẩn quyển sách ấy chỉ vì ngoài bìa có vẽ mấy con lợn rất đẹp. Tiệm sách này đã đóng cửa từ rất lâu. Ông ngoại tôi cũng đã mất. Những người thân và háng xóm của tôi không hiểu tại sao không hề nhớ về sự tồn tại của nó. Đọc sách Trương Quý cho, tôi phát hiện ra rằng có một người nữa là Nguyễn Việt Hà vẫn còn nhớ về nó. Không quen, chưa gặp bao giờ, vậy mà tự nhiên tôi cảm thấy quý anh ấy. Nhưng có một chi tiết mà có lẽ anh Hà chưa biết. Ở phía trong tiệm sách phố Hàng bài là nhà của ông bà Dực. Ông Dực là con trai của học giả Nguyễn Văn Vĩnh. Tôi ngờ rằng tiệm sách có một mối liên hệ nào đó với học giả Nguyễn Văn Vĩnh.</text:p>
      <text:p text:style-name="P20">Một số người hỏi tôi tại sao trong nhiều lựa chọn tôi lại chọn về dạy học ở Chicago, một trong những nơi lạnh nhất nước Mỹ. (Khi tôi viết mấy dòng này, nhiệt độ ngoài trời đã xuống dưới -10 độ C.) Tôi có sẵn một số lý do để tuỳ hoàn cảnh mà trả lời câu hỏi này. Một trong những câu trả lời rất thật mà không mấy người tin là xung quanh đại học Chicago có nhiều tiệm sách. Lớn nhất là tiệm sách Seminary Coop. Tiệm này có hai chi nhánh. Chi nhánh lớn có thể nói là thiên đường của sách hàn lâm. Mỗi khi có ít phút sau giờ ăn trưa, tôi lại rẽ qua đó để đắm đuối. Có rất nhiều đầu sách nhân văn có lẽ tôi sẽ không bao giờ biết nếu không nhìn thấy ở Seminary Coop. Chi nhánh nhỏ chủ yếu bán sách hư cấu và sách cho trẻ con. Đây là địa điểm vui chơi ưa thích của bé Nguyên và bé An và cũng là nơi tôi đưa các bé đến mỗi khi có việc gì cần phải lấy lòng hai bé. Đối với tôi, địa điểm <text:soft-page-break/>vui chơi ưa thích lại là hiệu sách cũ Powell. Không lần nào qua Powell mà tôi không hoan hỉ ra về với vài ba quyển sách cũ, dĩ nhiên theo tôi là quý hiếm, và dĩ nhiên giá cả lại rất phải chăng. Trước đây, trong khu vực xung quanh đại học còn một tiệm nữa là Borders nhưng đã đóng cửa từ hai năm nay. Đây là một trong hai chuỗi tiệm sách lớn nhất ở Mỹ, với cửa hàng với diện tích kinh doanh rộng, vừa bán sách vừa bán bánh ngọt và cà phê, một mô hình kinh doanh một thời đã rất thịnh hành. Buổi chiều sau giờ đi học, trẻ con ngồi đọc sách lốc nhốc khắp cửa hàng. Tiếc là mô hình kinh doanh của Borders không sống sót được trong kỷ nguyên kinh doanh qua mạng và nó đã là một trong những nạn nhân đầu tiên của đế chế Amazon. Ngay sát nách trường vẫn còn một tiệm Barnes and Nobles hoạt động theo mô hình tương tự, hiện tại vẫn thoi thóp sống.</text:p>
      <text:p text:style-name="P20">Tôi thành thật tin rằng cuộc sống ở một nơi nào đó sẽ dễ chịu hơn, nhân văn hơn nếu nơi đó có nhiều tiệm sách. Hà Nội bây giờ còn ít tiệm sách quá. Mật độ tiệm sách đạt cực điểm ở phố Đinh lễ, nơi sách mới được bán với chiết khấu cao nhất có thể. Nếu bạn phải tìm một quyển sách xuất bản chỉ một năm trước đây thôi, có đi dọc cả phố Đinh Lễ bạn cũng không tìm thấy. Đinh Lễ giống cái chợ hơn là một tiệm sách. Bạn đến đó để mua sách giá rẻ chứ không phải để nhẩn nha tìm một đầu sách mà bạn chưa biết. Tuy thế, ra Đinh Lễ vẫn thích, bạn bất chợt nhận ra rằng xung quanh bạn vẫn còn khá nhiều người thích đọc sách.</text:p>
      <text:p text:style-name="P20">Trên phố Tràng Tiền còn sống sót hai tiệm sách mậu dịch. Gần kem bô đê ga là tiệm sách ngày xưa vẫn gọi là ngoại văn vì ngay ngoài cửa có cột chữ tiếng nga kniga. Ở trong đó lúc nào cũng tối om như tiền đồ chị Dậu. Bên đường bên kia, gần nhà in báo nhân dân cũ, bây giờ là trung tâm văn hoá Pháp, là toà nhà sáu tầng của tổng công ty sách. Ở đây sáng sủa hơn, nhưng phong cách kinh doanh thì vẫn kiên định với lý tưởng quốc doanh. Tuy diện tích kinh doanh lớn nhưng số đầu sách không hơn mấy sạp sách ngoài phố Đinh Lễ và vì dĩ nhiên là không có chiết khấu nên tôi ngờ rằng doanh thu của cửa hàng không hơn mấy doanh thu của sạp chị Hoa. Chục năm trước, khi xin nhà nước kinh phí để xây toà nhà này, tôi tin rằng mong muốn sâu thẳm của lãnh đạo tổng công ty sách vẫn là đem ánh sáng văn hoá đến cho nhân dân. Tuy nhiên môi trường kinh doanh khắc nghiệt đã không cho phép giấc mơ của họ trở thành hiện thực. Sắp tới, tổng công ty sách sẽ chuyển đổi một phần mục đich sử dụng của toà sang thành trung tâm thể hình thẩm mỹ. Tuy khác với mục tiêu đặt ra ban đầu, nhưng vẫn là một cách phục vụ nhân dân, tất nhiên chủ yếu là nhân dân có tiền.</text:p>
      <text:p text:style-name="P20">Hoàng tử bé của Saint-Exupéry rất ít tin tưởng vào khả năng tư duy của người lớn. Người lớn thích làm ra kế hoạch kinh doanh, rồi phấn đầu bền bỉ để đảm bảo tiến độ của kế hoạch mà mình đặt ra, rồi thường xuyên cập nhật bảng cân đối thu chi để có thể theo dõi lợi nhuận. Phần lớn thời gian chúng ta cũng làm thế trong công việc hàng ngày của mình, và vì thế chúng ta dễ thông cảm với những người lớn hơn. Nhưng nỗi tuyệt vọng của con người rất ít khi liên quan đến kế hoạch kinh doanh hay bản cân đối thu chi. Gần đây, người ta hay nói về hiện sinh một cách khá là nôm na, rằng chúng ta không cần quan tâm đến cái gì khác ngoài chính cái khoảnh khắc mà <text:soft-page-break/>ta đang sống. Triết lý vậy nghe cũng hay, cũng phảng phất chất thiền, nhưng mà sai. Nỗi tuyệt vọng của con người có nguồn gốc từ quá khứ và tương lai, nó là sự nuối tiếc về quá khứ và sự sợ hãi về tương lai. Sống hoàn toàn trong hiện tại sẽ làm dịu đi nỗi tuyệt vọng trong chốc lát, nhưng nỗi tuyệt vọng sẽ như cái bu mơ răng bay lộn ngược lại đập vào mặt ta với sức tàn phá gấp hai. Con người cần có cái gì đó cao cả mà bám vào, để đu người lên để có thể nhìn về quá khứ và tương lai mà không nuối tiếc, không sợ hãi.</text:p>
      <text:p text:style-name="P20">Bạn có thể tìm thấy cả sự tuyệt vọng, cả sự cao cả của tâm hồn con người trong những trang sách. Vì thế mà bạn muốn có một tiệm sách cũ không quá xa nơi bạn sống.</text:p>
      <text:p text:style-name="P20">Ngô Bảo Châu</text:p>
      <text:p text:style-name="P5">(Bài đã đăng trên Tuổi trẻ cuối tuần và Học thế nào) </text:p>
      <text:p text:style-name="P5"/>
      <text:p text:style-name="P8"><text:span text:style-name="T12">Claude’s </text:span>Notes</text:p>
      <text:p text:style-name="P21"/>
      <text:p text:style-name="Text_20_body"><text:span text:style-name="Strong_20_Emphasis"><text:span text:style-name="T2">Kniga</text:span></text:span><text:span text:style-name="Strong_20_Emphasis"> </text:span>(книга) is Russian for <text:span text:style-name="T2">book</text:span> — I left it transliterated as he uses it, since it’s the word on the actual sign and carries its own period atmosphere. </text:p>
      <text:p text:style-name="Text_20_body"><text:span text:style-name="Strong_20_Emphasis"><text:span text:style-name="T2">Tối om như tiền đồ chị Dậu</text:span></text:span> is a well-known Vietnamese cultural reference — Chị Dậu is the long-suffering peasant heroine of Ngô Tất Tố’s novel <text:span text:style-name="Emphasis">Tắt Đèn</text:span> (<text:span text:style-name="T8">Light Out</text:span>, <text:span text:style-name="T26">1939</text:span><text:note text:id="ftn4" text:note-class="footnote"><text:note-citation>4</text:note-citation><text:note-body><text:p text:style-name="P25">Claude originally <text:span text:style-name="T26">gave the English</text:span> titl<text:span text:style-name="T26">e and publication dat</text:span>e as <text:span text:style-name="T2">Extinguished Lamp</text:span><text:span text:style-name="T18">, </text:span><text:span text:style-name="T20">1937</text:span><text:span text:style-name="T18">. </text:span><text:span text:style-name="T20">My corrections are based on </text:span><text:span text:style-name="T11">Light Out and Modern Vietnamese Stories, 1930–1954</text:span><text:span text:style-name="T20">, by Quan Manh Ha and Paul Christiansen: </text:span><text:a xlink:type="simple" xlink:href="https://doi.org/10.7591/cornell/9781501778025.001.0001" text:style-name="Internet_20_link" text:visited-style-name="Visited_20_Internet_20_Link"><text:span text:style-name="T20">https://doi.org/10.7591/cornell/9781501778025.001.0001</text:span></text:a></text:p></text:note-body></text:note>), whose prospects are famously hopeless. I rendered it as “as dark as Chị Dậu’s prospects,” keeping the name since the simile loses its flavor without the character, and an anglophone reader can absorb the allusion from context. </text:p>
      <text:p text:style-name="Text_20_body"><text:span text:style-name="Strong_20_Emphasis"><text:span text:style-name="T2">Cái bu mơ răng</text:span></text:span> is a <text:span text:style-name="T2">boomerang</text:span>, rendered phonetically in Vietnam-ese. The boomerang image is vivid and I rendered it directly. </text:p>
      <text:p text:style-name="Text_20_body"><text:span text:style-name="Strong_20_Emphasis"><text:span text:style-name="T2">Chị Hoa’s sidewalk stall</text:span></text:span> — Chị Hoa is an unnamed but implied typical small street vendor; the contrast between the grand state building and a pavement stall belonging to an ordinary woman named Hoa is part of the joke, and I kept it. </text:p>
      <text:p text:style-name="Text_20_body">The tone of the penultimate paragraph — on business plans, balance sheets, and the <text:span text:style-name="T18">Little Prince</text:span> — walks a careful line between gentle satire and genuine philosophical reflection. I tried to preserve both registers without tipping too far toward eith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0.5in" style:rel-column-width="7673*"/>
    </style:style>
    <style:style style:name="Table1.B" style:family="table-column">
      <style:table-column-properties style:column-width="3.2736in" style:rel-column-width="50241*"/>
    </style:style>
    <style:style style:name="Table1.C" style:family="table-column">
      <style:table-column-properties style:column-width="0.4965in" style:rel-column-width="7621*"/>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2facb" officeooo:paragraph-rsid="01e2facb"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MT1" style:family="text">
      <style:text-properties officeooo:rsid="0205215e"/>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text:page-number text:select-page="current">6</text:page-number></text:p>
            </table:table-cell>
            <table:table-cell table:style-name="Table1.A1" office:value-type="string">
              <text:p text:style-name="MP2">Where Are Those <text:span text:style-name="MT1">B</text:span>ookshops Now?</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3T19:16:42.575823924</dc:date>
    <meta:editing-duration>PT12H17M27S</meta:editing-duration>
    <meta:editing-cycles>401</meta:editing-cycles>
    <meta:generator>LibreOffice/7.3.7.2$Linux_X86_64 LibreOffice_project/30$Build-2</meta:generator>
    <meta:document-statistic meta:table-count="1" meta:image-count="0" meta:object-count="0" meta:page-count="6" meta:paragraph-count="37" meta:word-count="3367" meta:character-count="17052" meta:non-whitespace-character-count="13700"/>
  </office:meta>
</office:document-meta>
</file>