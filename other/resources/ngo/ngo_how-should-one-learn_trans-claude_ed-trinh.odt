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start" style:justify-single-word="false"/>
      <style:text-properties fo:color="#000000" loext:opacity="100%" style:font-name="Liberation Serif" fo:font-size="11pt" fo:font-style="normal" fo:font-weight="normal" officeooo:rsid="003e21a1" officeooo:paragraph-rsid="0093c614" style:font-size-asian="11pt" style:font-style-asian="normal" style:font-weight-asian="normal" style:font-size-complex="11pt" style:font-style-complex="normal" style:font-weight-complex="normal"/>
    </style:style>
    <style:style style:name="P2" style:family="paragraph" style:parent-style-name="Header">
      <style:paragraph-properties fo:text-align="end" style:justify-single-word="false"/>
      <style:text-properties fo:color="#000000" loext:opacity="100%" style:font-name="Liberation Serif" fo:font-size="11pt" fo:font-style="normal" fo:font-weight="normal" style:font-size-asian="11pt" style:font-style-asian="normal" style:font-weight-asian="normal" style:font-size-complex="11pt" style:font-style-complex="normal" style:font-weight-complex="normal"/>
    </style:style>
    <style:style style:name="P3" style:family="paragraph" style:parent-style-name="Subtitle">
      <style:text-properties officeooo:paragraph-rsid="015168a3"/>
    </style:style>
    <style:style style:name="P4" style:family="paragraph" style:parent-style-name="Text_20_body">
      <style:text-properties officeooo:paragraph-rsid="015168a3"/>
    </style:style>
    <style:style style:name="P5" style:family="paragraph" style:parent-style-name="Text_20_body">
      <style:paragraph-properties fo:text-align="center" style:justify-single-word="false"/>
      <style:text-properties fo:font-style="italic" officeooo:rsid="015c9c83" officeooo:paragraph-rsid="015c9c83" style:font-style-asian="italic" style:font-style-complex="italic"/>
    </style:style>
    <style:style style:name="P6" style:family="paragraph" style:parent-style-name="Text_20_body">
      <style:paragraph-properties fo:text-align="center" style:justify-single-word="false"/>
      <style:text-properties fo:font-style="italic" style:font-style-asian="italic" style:font-style-complex="italic"/>
    </style:style>
    <style:style style:name="P7" style:family="paragraph" style:parent-style-name="Text_20_body">
      <style:paragraph-properties fo:text-align="center" style:justify-single-word="false"/>
      <style:text-properties fo:font-style="italic" officeooo:rsid="01577485" officeooo:paragraph-rsid="0136cd54" style:font-style-asian="italic" style:font-style-complex="italic"/>
    </style:style>
    <style:style style:name="P8" style:family="paragraph" style:parent-style-name="Text_20_body">
      <style:paragraph-properties fo:text-align="center" style:justify-single-word="false"/>
      <style:text-properties fo:font-style="italic" officeooo:rsid="01dfab01" officeooo:paragraph-rsid="01dfab01" style:font-style-asian="italic" style:font-style-complex="italic"/>
    </style:style>
    <style:style style:name="P9" style:family="paragraph" style:parent-style-name="Text_20_body">
      <style:paragraph-properties fo:text-align="center" style:justify-single-word="false"/>
      <style:text-properties officeooo:rsid="015c9c83" officeooo:paragraph-rsid="015c9c83"/>
    </style:style>
    <style:style style:name="P10" style:family="paragraph" style:parent-style-name="Text_20_body">
      <style:text-properties fo:font-style="normal" officeooo:paragraph-rsid="013840d9" style:font-style-asian="normal" style:font-style-complex="normal"/>
    </style:style>
    <style:style style:name="P11" style:family="paragraph" style:parent-style-name="Subtitle">
      <style:text-properties officeooo:paragraph-rsid="0153f6b6"/>
    </style:style>
    <style:style style:name="P12" style:family="paragraph" style:parent-style-name="Text_20_body">
      <style:paragraph-properties fo:text-align="center" style:justify-single-word="false"/>
      <style:text-properties officeooo:paragraph-rsid="013a8899"/>
    </style:style>
    <style:style style:name="P13" style:family="paragraph" style:parent-style-name="Text_20_body">
      <style:paragraph-properties fo:text-align="center" style:justify-single-word="false"/>
      <style:text-properties officeooo:rsid="0136cd54" officeooo:paragraph-rsid="0136cd54"/>
    </style:style>
    <style:style style:name="P14" style:family="paragraph" style:parent-style-name="Footnote">
      <style:text-properties officeooo:rsid="020f6248" officeooo:paragraph-rsid="020f6248"/>
    </style:style>
    <style:style style:name="P15" style:family="paragraph" style:parent-style-name="Header">
      <style:paragraph-properties fo:text-align="center" style:justify-single-word="false"/>
      <style:text-properties fo:color="#000000" loext:opacity="100%" style:font-name="Liberation Serif" fo:font-size="11pt" fo:font-style="normal" fo:font-weight="normal" officeooo:rsid="01efbf79" officeooo:paragraph-rsid="01efbf79" style:font-size-asian="11pt" style:font-style-asian="normal" style:font-weight-asian="normal" style:font-size-complex="11pt" style:font-style-complex="normal" style:font-weight-complex="normal"/>
    </style:style>
    <style:style style:name="P16" style:family="paragraph" style:parent-style-name="Text_20_body">
      <style:text-properties fo:font-style="normal" officeooo:paragraph-rsid="01dfab01" style:font-style-asian="normal" style:font-style-complex="normal"/>
    </style:style>
    <style:style style:name="P17" style:family="paragraph" style:parent-style-name="Text_20_body">
      <style:text-properties fo:font-style="normal" officeooo:paragraph-rsid="01e652d1" style:font-style-asian="normal" style:font-style-complex="normal"/>
    </style:style>
    <style:style style:name="P18" style:family="paragraph" style:parent-style-name="Text_20_body">
      <style:text-properties fo:font-style="normal" officeooo:paragraph-rsid="01f7c570" style:font-style-asian="normal" style:font-style-complex="normal"/>
    </style:style>
    <style:style style:name="P19" style:family="paragraph" style:parent-style-name="Text_20_body">
      <style:text-properties fo:font-style="normal" officeooo:paragraph-rsid="0236a4b3" style:font-style-asian="normal" style:font-style-complex="normal"/>
    </style:style>
    <style:style style:name="P20" style:family="paragraph" style:parent-style-name="Text_20_body">
      <style:text-properties fo:font-style="normal" officeooo:paragraph-rsid="0243390b" style:font-style-asian="normal" style:font-style-complex="normal"/>
    </style:style>
    <style:style style:name="P21" style:family="paragraph" style:parent-style-name="Text_20_body">
      <style:text-properties fo:font-style="normal" officeooo:paragraph-rsid="0247a162" style:font-style-asian="normal" style:font-style-complex="normal"/>
    </style:style>
    <style:style style:name="P22" style:family="paragraph" style:parent-style-name="Text_20_body">
      <style:text-properties fo:font-style="normal" officeooo:paragraph-rsid="0247eda3" style:font-style-asian="normal" style:font-style-complex="normal"/>
    </style:style>
    <style:style style:name="P23" style:family="paragraph" style:parent-style-name="Text_20_body">
      <style:text-properties officeooo:paragraph-rsid="01426698"/>
    </style:style>
    <style:style style:name="P24" style:family="paragraph" style:parent-style-name="Text_20_body">
      <style:text-properties officeooo:paragraph-rsid="024a74f5"/>
    </style:style>
    <style:style style:name="P25" style:family="paragraph" style:parent-style-name="Text_20_body">
      <style:text-properties officeooo:paragraph-rsid="024c0f72"/>
    </style:style>
    <style:style style:name="P26" style:family="paragraph" style:parent-style-name="Text_20_body">
      <style:text-properties officeooo:paragraph-rsid="0255180e"/>
    </style:style>
    <style:style style:name="P27" style:family="paragraph" style:parent-style-name="Title">
      <style:text-properties officeooo:rsid="01e25024" officeooo:paragraph-rsid="01e25024"/>
    </style:style>
    <style:style style:name="P28" style:family="paragraph" style:parent-style-name="Title">
      <style:text-properties officeooo:paragraph-rsid="0181a885"/>
    </style:style>
    <style:style style:name="T1" style:family="text">
      <style:text-properties fo:font-style="italic" style:font-style-asian="italic" style:font-style-complex="italic"/>
    </style:style>
    <style:style style:name="T2" style:family="text">
      <style:text-properties fo:font-style="italic" officeooo:rsid="013bfe0f" style:font-style-asian="italic" style:font-style-complex="italic"/>
    </style:style>
    <style:style style:name="T3" style:family="text">
      <style:text-properties fo:font-style="italic" officeooo:rsid="0153f6b6" style:font-style-asian="italic" style:font-style-complex="italic"/>
    </style:style>
    <style:style style:name="T4" style:family="text">
      <style:text-properties fo:font-style="italic" officeooo:rsid="01577485" style:font-style-asian="italic" style:font-style-complex="italic"/>
    </style:style>
    <style:style style:name="T5" style:family="text">
      <style:text-properties fo:font-style="italic" officeooo:rsid="0158e3a4" style:font-style-asian="italic" style:font-style-complex="italic"/>
    </style:style>
    <style:style style:name="T6" style:family="text">
      <style:text-properties fo:font-style="italic" officeooo:rsid="013a8899" style:font-style-asian="italic" style:font-style-complex="italic"/>
    </style:style>
    <style:style style:name="T7" style:family="text">
      <style:text-properties fo:font-style="italic" officeooo:rsid="01ed40f4" style:font-style-asian="italic" style:font-style-complex="italic"/>
    </style:style>
    <style:style style:name="T8" style:family="text">
      <style:text-properties officeooo:rsid="01432a59"/>
    </style:style>
    <style:style style:name="T9" style:family="text">
      <style:text-properties officeooo:rsid="015de7d8"/>
    </style:style>
    <style:style style:name="T10" style:family="text">
      <style:text-properties officeooo:rsid="01e25ce9"/>
    </style:style>
    <style:style style:name="T11" style:family="text">
      <style:text-properties officeooo:rsid="01eea64a"/>
    </style:style>
    <style:style style:name="T12" style:family="text">
      <style:text-properties officeooo:rsid="01fb69be"/>
    </style:style>
    <style:style style:name="T13" style:family="text">
      <style:text-properties fo:font-style="normal" style:font-style-asian="normal" style:font-style-complex="normal"/>
    </style:style>
    <style:style style:name="T14" style:family="text">
      <style:text-properties officeooo:rsid="02066f1e"/>
    </style:style>
    <style:style style:name="T15" style:family="text">
      <style:text-properties officeooo:rsid="02068d6c"/>
    </style:style>
    <style:style style:name="T16" style:family="text">
      <style:text-properties officeooo:rsid="02099721"/>
    </style:style>
    <style:style style:name="T17" style:family="text">
      <style:text-properties officeooo:rsid="020c2d34"/>
    </style:style>
    <style:style style:name="T18" style:family="text">
      <style:text-properties officeooo:rsid="0211499f"/>
    </style:style>
    <style:style style:name="T19" style:family="text">
      <style:text-properties officeooo:rsid="02189bb2"/>
    </style:style>
    <style:style style:name="T20" style:family="text">
      <style:text-properties officeooo:rsid="021cfa84"/>
    </style:style>
    <style:style style:name="T21" style:family="text">
      <style:text-properties officeooo:rsid="021ef05d"/>
    </style:style>
    <style:style style:name="T22" style:family="text">
      <style:text-properties officeooo:rsid="0220b40f"/>
    </style:style>
    <style:style style:name="T23" style:family="text">
      <style:text-properties officeooo:rsid="0223a760"/>
    </style:style>
    <style:style style:name="T24" style:family="text">
      <style:text-properties officeooo:rsid="022831af"/>
    </style:style>
    <style:style style:name="T25" style:family="text">
      <style:text-properties officeooo:rsid="02294764"/>
    </style:style>
    <style:style style:name="T26" style:family="text">
      <style:text-properties officeooo:rsid="022a8845"/>
    </style:style>
    <style:style style:name="T27" style:family="text">
      <style:text-properties officeooo:rsid="022ce80b"/>
    </style:style>
    <style:style style:name="T28" style:family="text">
      <style:text-properties officeooo:rsid="022e0103"/>
    </style:style>
    <style:style style:name="T29" style:family="text">
      <style:text-properties officeooo:rsid="022ea406"/>
    </style:style>
    <style:style style:name="T30" style:family="text">
      <style:text-properties officeooo:rsid="02331238"/>
    </style:style>
    <style:style style:name="T31" style:family="text">
      <style:text-properties officeooo:rsid="0236a4b3"/>
    </style:style>
    <style:style style:name="T32" style:family="text">
      <style:text-properties officeooo:rsid="02394346"/>
    </style:style>
    <style:style style:name="T33" style:family="text">
      <style:text-properties officeooo:rsid="023abca9"/>
    </style:style>
    <style:style style:name="T34" style:family="text">
      <style:text-properties officeooo:rsid="023e201b"/>
    </style:style>
    <style:style style:name="T35" style:family="text">
      <style:text-properties officeooo:rsid="0240847c"/>
    </style:style>
    <style:style style:name="T36" style:family="text">
      <style:text-properties officeooo:rsid="02416f9b"/>
    </style:style>
    <style:style style:name="T37" style:family="text">
      <style:text-properties officeooo:rsid="0245063d"/>
    </style:style>
    <style:style style:name="T38" style:family="text">
      <style:text-properties officeooo:rsid="0246b7ca"/>
    </style:style>
    <style:style style:name="T39" style:family="text">
      <style:text-properties officeooo:rsid="0247eda3"/>
    </style:style>
    <style:style style:name="T40" style:family="text">
      <style:text-properties officeooo:rsid="02495946"/>
    </style:style>
    <style:style style:name="T41"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How Should One Learn?</text:p>
      <text:p text:style-name="P11">Châu Ngô</text:p>
      <text:p text:style-name="Text_20_body"/>
      <text:p text:style-name="P8"><text:span text:style-name="T10">March 15</text:span>, 20<text:span text:style-name="T10">13</text:span></text:p>
      <text:p text:style-name="P7"/>
      <text:p text:style-name="P13"><text:span text:style-name="T4">Translat</text:span><text:span text:style-name="T5">e</text:span><text:span text:style-name="T4">d b</text:span><text:span text:style-name="T1">y Claude Sonnet 4.6</text:span></text:p>
      <text:p text:style-name="P12"><text:span text:style-name="T4">E</text:span><text:span text:style-name="T6">dited by </text:span><text:span text:style-name="T2">Minh-Tâ</text:span><text:span text:style-name="T3">m Quang Trinh</text:span></text:p>
      <text:p text:style-name="P10"/>
      <text:p text:style-name="P16">Previously published in <text:span text:style-name="T1">Tia Sáng</text:span>.</text:p>
      <text:p text:style-name="P16">———————————————</text:p>
      <text:p text:style-name="P17">Students, university undergraduates, and parents often ask me about the “secrets of learning.” My usual answer is: “There are no secrets. What matters is passion.” That answer is an evasion. Not wrong, but not complete. I gave it because I had never thought carefully about the question. But one cannot evade it forever. Nor can one offload all responsibility by saying: “This is a matter for specialists in educa-tional research.”</text:p>
      <text:p text:style-name="P17">Looking back over my own life, I find that I have done nothing, from first to last, except study — and then teach and do research. In the course of that, I must have formed some thoughts of my own. The trouble is that those thoughts have never been organized systema-tically or expressed with any coherence. Preparing this talk was a valuable opportunity to do exactly that: a task I must admit was quite demanding, but which I hope will prove useful.</text:p>
      <text:p text:style-name="P17">I would like to thank the International Peace Foundation and the Hanoi University of Science and Technology for jointly organizing this event, and to thank everyone here — faculty, students, and pupils — for attending today. Your interest is a powerful motivation for me to see this essay through to completion.</text:p>
      <text:p text:style-name="P17">My outline rests on three questions. First: what is the fundamental <text:span text:style-name="T1">motivation</text:span> for learning? Second: should one learn letters, or learn to be human? I confess I am not fond of this question, because it is vague and ambiguous, but I will make use of precisely that ambiguity to develop a cluster of smaller questions around <text:span text:style-name="T1">what</text:span> one should learn. The final question gives this talk its title: <text:span text:style-name="T7">H</text:span><text:span text:style-name="T1">ow</text:span> should one learn? I have no ambition to give thorough, complete answers to all three, but only to arrange my scattered thoughts into imperfect ones. I hope that by the end we will have time for further discussion.</text:p>
      <text:p text:style-name="Heading">On the Aspiration Toward What Is Higher and Better</text:p>
      <text:p text:style-name="P17">The <text:span text:style-name="T1">Sanzijing</text:span>, the Three Character Classic that scholars of old used to study, begins with the line: “At birth, human nature is funda-<text:soft-page-break/>mentally good.” Is this true? The daily news makes it easy to doubt this “fundamental goodness” of human nature at birth. In January of this year, in India, a twenty-three-year-old woman was gang-raped to death on a bus by six men. At the end of January, in Bắc Ninh, crowds pushed and jostled to attend a festival in which a pig is slaughtered with a single stroke of a blade: the animal split in two, rolling in a pool of blood to the cheers of the celebrating crowd. These are aberrant events, not representative of daily life in India or Vietnam. I cite them as examples precisely because they illustrate human cruelty with uncommon clarity. In the end, killing a pig is only the killing of an animal for food: something human beings must do to sustain their own lives. Rape, too, arises from one of the most basic human instincts: the drive to reproduce. It seems, then, that human beings are born with two fundamental instincts, self-preservation and reproduction, and that within these instincts lies the seed of evil, of terrible evil. If we stop here, it is indeed difficult to believe in the “fundamental goodness” of human nature at birth.</text:p>
      <text:p text:style-name="P17">If human beings were born with only these two instincts, then the events I have described would not be aberrations: <text:span text:style-name="T14">T</text:span>hey would be commonplace, so ordinary as to no longer astonish or move us. I may be an optimist, but I believe that human beings are born with a third instinct as well: the instinct to aspire upward, toward what is better and higher. Looking at a newborn, as beautiful as an angel, one might think this is the embodiment of goodness itself. But what governs every action of the infant is simply its survival instinct. I think that within the child there is no ready-made noble soul, but there is already the potential from which such a soul can be built. For me, if there is such a thing as “fundamental goodness” in the human being at birth, it is precisely that potential.</text:p>
      <text:p text:style-name="P17">That potential is developed through learning, and it is the primary motivation for learning. Some may disagree and argue that one learns in order to have a decent life later, to secure a good position in society. I consider this a one-sided view. First, desiring a decent life is itself an expression of aspiration toward what is higher and better, though naturally, once it has degenerated into aiming for a life of comfort sustained by the labor of others, that upward aspiration has been seriously corrupted. Second, I believe that most people are in fact incapable of striving toward something that lies in the very distant future. Most people learn simply because it is a way of improving themselves: <text:span text:style-name="T15">T</text:span>hat is, they learn from the purest possible motive of aspiration. In many cases, therefore, it is social convention itself that corrupts a motivation that is by nature pure.</text:p>
      <text:p text:style-name="P17">It should be noted that social convention is not the only thing that corrupts the aspiration toward what is higher and better. The cult of personality — whether of a political leader, a football star, or a Korean pop singer — is one form of corruption of this aspiration. The instinct to aspire upward must always wrestle with a host of base instincts: laziness, envy, dishonesty, the lust to win, and arrogance. Once corrupted by these, it has little chance of serving as the engine of learning.</text:p>
      <text:p text:style-name="Heading"><text:soft-page-break/>Learning Letters, or Learning to Be Human?</text:p>
      <text:p text:style-name="P17">In the press recently, many people have raised the question: “Should one learn letters, or learn to be human?” — or, between the two, which should come first. This question is in truth obscure. Learning letters means absorbing knowledge. But what learning to be human means is open to many interpretations. In a narrow sense, it might mean learning life skills, learning the art of living: in short, learning civilized behavior. In a broader sense, learning to be human means learning everything that constitutes the character of a person — but then the phrase becomes so wide that it swallows up learning letters as well. Perhaps because the meaning of the question has not been clearly analyzed, many of the debates it has generated in the press have a somewhat circular quality.</text:p>
      <text:p text:style-name="P17">In the narrow sense, one can reframe the question more usefully as: “Should schools teach knowledge or teach life skills and the art of living?” It seems that more and more people are inclining toward the modern view: “Schools should teach children life skills.” The classical position was stated clearly by the German philosopher Hannah Arendt in her essay “The Crisis in Education” <text:span text:style-name="T16">[1],</text:span> as follows: “The function of the school is to teach children what the world is like, and not to instruct them in the art of living.” I agree with this position, and in what follows it will be developed further.</text:p>
      <text:p text:style-name="P17">Implicit in Arendt’s words is also an answer to the broader question of what it means to learn to be human. Learning to be human is learning about the world, <text:span text:style-name="T17">both </text:span>the natural world and the human world, so that each individual can understand their own place within it, understand all the interactions between themselves and others, develop every one of their potentials, perfect themselves, and at the same time make the world around them a safer and friendlier place to live.</text:p>
      <text:p text:style-name="Heading">For Children to Have Life Skills, Adults Must Be Their Mirror</text:p>
      <text:p text:style-name="P17">I have heard the story of a newborn baby carried off by wolves. The child was found again later. Though it still had the form of a human being, its nature had become the nature of wolves. In this case, the very “instinct to aspire upward toward what is better” had turned the child into a wolf-person. For the child, what represented goodness was its wolf mother, who suckled it, who brought prey home for it to eat. A child growing up among wolves will inevitably become a wolf; what it regards as good is what is good by the standards of wolves. If it were to continue living in the forest with the pack, this would be no great harm. The tragedy comes on the day it is forced to return to live among human beings.</text:p>
      <text:p text:style-name="P17">In Laos and Thailand there is a custom of sending young children to live in a monastery for a time: three days, three weeks, three months, or up to three years. In the monastery, beyond learning to chant sutras, children also learn to love the simple, ordered life of those who practice. When one visits Laos or Thailand, one is always struck <text:soft-page-break/>by the cleanliness and tidiness of the villages, even in the poorest ones.</text:p>
      <text:p text:style-name="P17">Allow me to add a small, mundane personal example. My wife and I rarely watch television — almost never. Perhaps because of this, our children have no interest whatsoever in watching it; we have never needed to forbid or restrict it. When they have free time, they prefer to read. On occasions when I want to watch a film together with the children, I have to negotiate with them.</text:p>
      <text:p text:style-name="P17">These examples remind us — those of us who bear the burden of being adults — never to forget that whether we wish it or not, we are always the mirror in which children see themselves. Beyond the responsibility of giving children a roof over their heads, enough food to eat, and enough clothing to wear, parents must always bear in mind that however they conduct themselves today, tomorrow the children will conduct themselves in the same way. This is the lesson of the story of the wooden trough,<text:note text:id="ftn0" text:note-class="footnote"><text:note-citation>1</text:note-citation><text:note-body><text:p text:style-name="P14">A parable retold by the Brothers Grimm and Tolstoy, among others: <text:a xlink:type="simple" xlink:href="https://www.snopes.com/fact-check/of-no-bowl-intent/" text:style-name="Internet_20_link" text:visited-style-name="Visited_20_Internet_20_Link">https://www.snopes.com/fact-check/of-no-bowl-intent/</text:a>. See Claude’s notes.</text:p></text:note-body></text:note> which I am sure you all know.</text:p>
      <text:p text:style-name="P17">What I want to say is this: <text:span text:style-name="T18">I</text:span>f adults know how to conduct themselves properly, children will not need to attend classes in life skills. And the primary responsibility for educating children in conduct lies with parents and the family, not the school. The lectures of teachers do not shape a child’s behavior to the same degree as the behavior of the child’s own parents.</text:p>
      <text:p text:style-name="P17">Of course I do not mean to say that schools have no role in forming children’s conduct. In a child’s heart, teachers occupy a sacred place, perhaps more sacred than parents, and so the way teachers conduct themselves within school life will directly influence students’ behavior. But this does not mean that parents can transfer the entire burden of their children’s moral education onto the shoulders of teachers.</text:p>
      <text:p text:style-name="Heading">The Role of Humanistic Education in the Formation of Character</text:p>
      <text:p text:style-name="P17">When an infant is born, its survival instinct governs all its activity. For it, the entire world is its mother’s breast. As it grows, it develops an awareness of the world around it and of other people. Gradually it comes to understand that not only does it need to survive, but others need to survive just as it does. This may sound obvious, but it is a great transformation of thought: the child has accepted the existence of the other, of other people, as a force existing alongside itself.</text:p>
      <text:p text:style-name="P17">Accepting the existence of the other is the precondition for distinguishing good from evil. The good is to feel joy in the happiness of others and pain in their misfortune; the evil is the reverse: joy in the misfortune of others and pain in their happiness. Thus, so long as a child has not yet developed an awareness of others in this sense, the concepts of good and evil cannot yet be applied to <text:soft-page-break/>it. Furthermore, the concept of “the other” need not necessarily refer to human beings. It can be a bee, an ant, or the pig in Bắc Ninh. The excitement and exhilaration felt by people in the face of that pig’s wretched death expresses evil in its purest form.</text:p>
      <text:p text:style-name="P17">Learning, according to Hannah Arendt, is the effort to understand the world around us, <text:span text:style-name="T19">both </text:span>the natural world and the human world. It compels one to recognize the existence of others, which is the precondition for distinguishing between good and evil. But knowing how to make that distinction is not enough. A proverb tells us that “the road to hell is paved with good intentions.” Knowing clearly how to distinguish good from evil is necessary, but it would be a serious omission — even a dangerous one — to treat the formation of character as simply a matter of distinguishing between good and evil. In most cases, that is not where the difficulty lies.</text:p>
      <text:p text:style-name="P17">To understand one’s place in the world, each person must pose for themselves the most fundamental questions about the human condition, must find their own answers to those questions, or at the very least learn about the answers that predecessors have offered. Distinguishing between good and evil is one such question, but it is not the only one, and may not even be the most important.</text:p>
      <text:p text:style-name="P17">Some questions that sound naive at first turn out to be profound: “What are the fundamental needs of a human being? Are freedom and equality fundamental human needs?” Human beings also need to live in community, in society, because no individual can produce everything they require. If freedom and equality are also fundamental needs, then how must society be designed so as to guarantee the freedom of each person and the fairness between one person and another? Developed to this point, the question reveals itself to be far more complex than the question of distinguishing good from evil, and perhaps more important.</text:p>
      <text:p text:style-name="P17">Answering the full question of the role of humanistic education lies beyond the scope of this talk and beyond my own capacity. In what follows, I want to narrow the question and discuss more carefully the role of humanistic education in the formation of character.</text:p>
      <text:p text:style-name="P17">The fundamental mechanism for the formation of character is the contemplation of a concrete event that occurred in a concrete situation: reflecting on how the person involved made their decisions, what they did, and what the consequences and effects of their actions were on the lives of others and on their own life. One can observe that human beings contemplate more through feeling than through thought. People contemplate most deeply those things that have happened to themselves, or to those close to them, because those experiences leave the strongest emotions. But in general, the experience of a young person, <text:span text:style-name="T20">even </text:span>including experiences shared within the family, is not rich enough to form a solid character. Their store of experience will be far richer if they learn to place themselves within history, where the stories of the past are recorded honestly, or within literature, where great stories — <text:span text:style-name="T20">possibly</text:span> fictional — always arise from the genuine lived experience of their authors.</text:p>
      <text:p text:style-name="P17"><text:soft-page-break/>In a post on my personal blog, titled “Preserving Memory” <text:span text:style-name="T21">[2],</text:span> I told the story of how secondary school students in Germany learn about the crimes the Nazi regime committed against the Jewish people. German students learn from books; they read the diary of Anne Frank, who spent two years hiding in a concealed space and was in the end discovered and killed. They visit the Buchenwald concen-tration camp. But most striking of all, German students are also required to investigate for themselves whether any Jewish people once lived in the area around their own home, what their names were, in what circumstances they were arrested, and how they were killed, in order to make those experiences as close and immediate as possible. Some months after I wrote that post, I had occasion to discuss the subject with a German photographer, who told me that Germans must do this because otherwise they will commit the same terrible mistakes all over again. Professor Hà Huy Khoái offered this commentary: “The Germans are wise: <text:span text:style-name="T22">T</text:span>hey make their students tho-roughly learn their history lessons. Any people that fails to do so will certainly have to study the same lesson again and again. And each time they have to repeat it and sit the exam again, the price is higher. That price can be paid in blood, not just in money like students who have to retake an exam.”</text:p>
      <text:p text:style-name="P17">I think about this story from a different angle. The genuine lived experience of the truth, however painful, strengthens the character, whereas lies, however sweet, always corrupt the soul. The function of humanistic education is not to praise the good and condemn the evil, but to help human beings seek the truth and remain alert to the deceptions of others and of themselves. Alert to the instincts of laziness, selfishness, and cowardice: instincts that are very skilled at disguising themselves in the garb of good intentions, the better to lead people by the hand to hell, which is nothing other than the complete corruption of the human soul. Serious humanistic education trains in us an attitude of tireless effort in the pursuit of truth, together with the capacity to contemplate through thought, because contemplation through feeling alone leaves human beings very easily deceived.</text:p>
      <text:p text:style-name="P17">I have mentioned that the human instinct to aspire upward and toward the good is easily corrupted into the cult of personality, whether of a political leader or a Korean pop singer. The role of humanistic education is to take human beings by the hand and lead them, following the “signpost of the intellect,” toward the true, the good, and the beautiful.</text:p>
      <text:p text:style-name="Heading">Language and the Scientific Attitude</text:p>
      <text:p text:style-name="P17">If the instinct to aspire upward and toward the good is the engine of learning, it is not its instrument. Human beings express their understanding of the objective world in words. Human beings receive the accumulated knowledge of humanity through language. There are two opposing attitudes toward language, leading to two opposing methods of thought: on one side, the religious attitude, which treats <text:soft-page-break/>words as objects of veneration; on the other, the scientific attitude, which treats words as instruments for shaping thought.</text:p>
      <text:p text:style-name="P17">The definition of the word Tao in the <text:span text:style-name="T1">Tao Te Ching</text:span> is the classic example of a religious attitude toward language. The Tao is described as being this and that; it is not this, not that; but not once is the Tao defined as being any particular thing. Tao is a word standing for a sacred concept that cannot be defined. <text:span text:style-name="T23">O</text:span>ne can only know its attributes, <text:span text:style-name="T23">its “</text:span>this and that”, at best knowing what it is not, constraining the concept through negation, but never what it is, defining the concept through affirmation. The sacred quality of the word Tao lies precisely in the fact that it cannot be pinned down.</text:p>
      <text:p text:style-name="P17">I cite the Tao Te Ching not in any spirit of dismissing its philosophical value. I only want to point out the contrast between its religious attitude toward language and the scientific one. The religious attitude toward language produces propositions of sweeping generality: propositions that can be applied, in any of life’s circum-stances, to interpret whatever is happening to oneself, and to console oneself. And who in this world is there that does not need consolation?</text:p>
      <text:p text:style-name="P17">The greatest contribution of ancient Greek culture to human thought may well be the invention of the scientific attitude toward language, exemplified by Euclid’s <text:span text:style-name="T1">Elements</text:span>. To speak about a circle, one does not say <text:span text:style-name="T24">that</text:span> it is something like the sun, or like the moon at full moon, but defines <text:span text:style-name="T24">a</text:span> circle <text:span text:style-name="T24">to be</text:span> the set of points at a given distance from a given point, called the center. Most noteworthy is that a concept is always built on the basis of affirmation, what it is, rather than on negation, what it is not.</text:p>
      <text:p text:style-name="P17">It should also be noted that the circle is not assigned any sacred quality whatsoever. <text:span text:style-name="T25">I</text:span>t is simply the name given to fix the concept of the set of points at a given distance from a given point. In practice, there exists no perfectly exact circle: only approximate ones. Euclid’s definitions have value only within the domain of geometry. In a certain sense, geometry is a purely intellectual product: a game of thought. The greatest value of this game lies in precisely its limitation. Because the rules of the game consist of a number of axioms and a number of prescribed rules of inference, a geometrical statement can only be either true or false; a proof can only be either fully rigorous or flawed. This is the game in which the logical faculty of the human mind can be freely exercised. To this day, it retains exactly that significance. For training children in rigorous reasoning, there is nothing better than Euclidean geometry.</text:p>
      <text:p text:style-name="P17">The main advantage of an intellectual game whose rules are fixed in advance is that within the scope of that game, everything true and everything false is clear-cut. Another important advantage is that human beings can draw clear, detailed conclusions from the system of axioms and concepts, and then bring those conclusions into contact with objective observation to verify them.</text:p>
      <text:p text:style-name="P17">At this point, the tendency of science is far more humble than the tendency of religion. The propositions of religion typically have a <text:soft-page-break/>high degree of generality, but lack the concreteness needed for verification against objective observation. Religion in every case requires people to believe and to comply. Science, by contrast, puts forward propositions specific enough to be tested against reality, and grants reality the final judgment. This humility — always placing itself in a position to be judged, confirmed, or refuted by reality — is, for Karl Popper, the defining characteristic of science, as opposed to dogma.</text:p>
      <text:p text:style-name="P17">This humility is also what gives science its vitality. Religion dies when people no longer place their faith in its dogmas. But in its very nature, a scientific proposition accepts refutation: <text:span text:style-name="T26">I</text:span>t seems to wait to be refuted by reality in order to be reborn, to shed its skin and become a new scientific theory, more complex and of wider scope than the old one.</text:p>
      <text:p text:style-name="P17">In its nature, every scientific theory describes only a certain domain of the world; the cruder the theory, the narrower its domain of application. To venture beyond that domain is to begin a new game, and human beings must again invent a new system of language and concepts, find new rules. But this does not mean the old theory must necessarily be abolished when a new one arises. In the domain of everyday life, where objects move far more slowly than light, New-tonian mechanics remains valid.</text:p>
      <text:p text:style-name="P17">Anyone who sets out to understand the world is obliged to retrace almost the entire journey that humanity has already made. This is a very large difficulty. There have been some mistaken approaches in education that wanted to bypass earlier scientific theories in order to bring students directly to the most advanced ones. In the West, during the 1970s, there was a movement to rebuild the entire mathematics curriculum according to the modern presentation of mathematics developed by the Bourbaki group. The results of this large-scale experiment were poor. The general sense was that the mathematical level of graduating secondary school students declined considerably.</text:p>
      <text:p text:style-name="P17">More recently, the pendulum appears to have swung to the opposite extreme. People want to strip from the curriculum everything considered unnecessary for daily life. I was astonished by the opinion of one <text:span text:style-name="T27">p</text:span>rofessor who argued that students do not need to learn calculus, because no one uses calculus in everyday life. But it is precisely thanks to the genius of Newton and Leibniz that natural phenomena can be described clearly and explicitly in the form of differential equations. To remove differential and integral calculus from the curriculum is tantamount to voluntarily returning to the vague thinking of medieval metaphysics.</text:p>
      <text:p text:style-name="P17">The problem is not to bring the most advanced scientific knowledge to students, <text:span text:style-name="T27">for</text:span> even if one wished to, it cannot be done. The problem is not to focus on training students’ computational skills to serve their daily needs either. What must be done is to equip students with the method of scientific thought: sharply defining concepts, connecting those concepts to the objective world, knowing how to reason, knowing how to calculate in order to arrive at specific propositions, and verifying those propositions against the objective world.</text:p>
      <text:p text:style-name="P17"><text:soft-page-break/>There is another attribute of a living science: its capacity to produce surprise. Euclidean geometry is no longer capable of yielding any surprising new assertions: <text:span text:style-name="T28">I</text:span>n this sense, it is a dead science. It is now only an intellectual exercise for training students in logical thinking. Einstein’s prediction that light bends when passing close to massive objects, derived through calculation in the theory of relativity, was a genuine surprise, since in our ordinary picture of the world it is light that travels in straight lines. The vitality of a scientific discipline is shown precisely in this: that from an acceptable system of concepts and axioms, through calculation and reasoning, one can arrive at new explanations for phenomena already known, or at predictions about phenomena not yet known.</text:p>
      <text:p text:style-name="P17">When science “accepts a commission” to interpret and prove a predetermined proposition, in the service of some political or reli-gious purpose, however good or bad that purpose may be, it has in substance lost what gives it life. The problem of “accepting commissions” affects the social sciences far more than the natural sciences. As some have observed, in the old socialist countries the natural sciences could flourish while the social sciences left almost no mark on human civilization. Professor Hà Huy Khoái once remarked, half in jest: “In truth, there are no social sciences in Vietnam as yet” <text:span text:style-name="T37">[3].</text:span> That remark provoked fairly fierce reactions. To put it more objectively: <text:span text:style-name="T29">T</text:span>he social sciences exist, but they are anaerobic and lack vitality.</text:p>
      <text:p text:style-name="Heading">How Should One Learn?</text:p>
      <text:p text:style-name="P17">In the old days, to learn the wisdom of the sages, the most important thing was determination: the determination to catch fireflies and put them in a jar to light one’s books through the night. In the work of learning today, in the task of absorbing the seemingly inexhaustible scientific knowledge of humanity, determination alone is surely not enough.</text:p>
      <text:p text:style-name="P17">As I have outlined above, science is not afflicted by the arrogance of regarding its propositions as absolutely and universally true. Every scientific theory is developed through calculation and reasoning from a small number of concepts and a small number of foundational axioms. Each theory has its own internal logic; it does not contradict itself; but the conclusions drawn from it correspond to objective reality only within a certain domain. In a certain sense, every theory is an intellectual game with clearly defined rules, within which the player can deploy their capacity for thought to arrive at results that often exceed initial expectation.</text:p>
      <text:p text:style-name="P17">People rarely play any game alone. For a game to be truly engaging, for the player to fully deploy every capacity for thought and arrive at unexpected results — at genuine creativity — the game must have fellow players and a referee. To illustrate this view, let me offer a small but earnest suggestion.</text:p>
      <text:p text:style-name="P17">Thanks to the internet, enormous quantities of free learning materials can now be found online. A number of prestigious universities such <text:soft-page-break/>as MIT and Stanford have published nearly all their teaching mate-rials freely. Instead of spending fifty thousand dollars a year to study there — and not every student who has fifty thousand dollars is admitted — one can access these materials and follow video lectures free of charge. Is it true, then, that by sitting in Hanoi or Saigon one can learn just as a student at MIT or Stanford?</text:p>
      <text:p text:style-name="P17">I think that unless one possesses an iron will, no matter how much material in the world is provided, no matter how many lectures one can follow without charge, one still cannot learn alone at home. Because following a video lecture alone online is not an engaging game: there is no opponent, no teammate, no itinerary, no visible goal, no visible reward. These things are not directly related to the scientific content of the lecture, but they are what the learner needs in order to keep striving continuously. Studying alone, one might concentrate intensely for a day or two, or even a week. But one needs a group, a class, a teacher, in order to sustain the effort of learning over time.</text:p>
      <text:p text:style-name="P17">My suggestion is this: <text:span text:style-name="T30">W</text:span>hy not organize among yourselves a shared course of study using the curricula made freely available online? Why not use lectures and learning materials provided free of charge directly in regular classes? Teachers do not necessarily have to lecture for the whole session; they can have students watch lectures online, with Vietnamese subtitles prepared in advance, and then devote the time to explanation, answering students’ questions, and guiding them through exercises. And finally, organize assessments with genuine rigor. Of course, suggestions are easy and doing is hard, but I do not believe this cannot be done. The cost of organizing such a class is probably not so great, compared to the fifty thousand dollars a year charged at MIT or Stanford.</text:p>
      <text:p text:style-name="P17">With this somewhat speculative suggestion, I hope to have high-lighted the importance of organized learning. Learning is a collective and organized activity. As I have noted above, without an organized group, human beings are generally incapable of sustaining their own efforts over an extended period. Without debate, people quickly stray into subjectivity — a path that always leads toward a dead end. Human nature is competitive: competitive spirit creates the energy needed to make debate lively, but it also ruins debate, turning it into a battlefield where one person tries to crush another. In any collective endeavor, therefore, a fair set of rules is needed: rules that ensure competition produces only the effort to surpass oneself, and does not become a pretext for satisfying the instinct to dominate. And the game requires a referee who understands the rules thoroughly and has the authority to govern the play. Beyond this, it is precisely the constraints of the rules that compel players toward genuine creativity.</text:p>
      <text:p text:style-name="P17">I notice that people break the rules of the game far too easily. Let me cite a small example: the writing of letters of recommendation. Writing a letter of recommendation is quite demanding work, for which one can expect no reward beyond the sense of having done one’s duty. To recommend a colleague for an associate or full professorship, the recommender is typically required to study the <text:soft-page-break/>candidate’s work carefully — to point out what is strong, what is particularly distinguished, what is merely ordinary — and to articulate the broader significance of the work. A letter that fails to do all this carries little weight, and the letter-writer’s seriousness or competence may be called into question. Writing a letter is very laborious, and no one praises anyone for writing an outstanding recommendation, since letters are in principle confidential. In short, writing a letter of recommendation is demanding work with no tangible reward, yet must be done, in order to support a deserving colleague, or simply to discharge one’s duty. Writing letters for students is also effortful, though less demanding than writing for colleagues.</text:p>
      <text:p text:style-name="P19">On one occasion, a student I had taught in Hanoi asked me to write a letter of recommendation. While I was still hesitating — <text:span text:style-name="T31">as</text:span> I did not consider this student truly exceptional — the student sent me a letter already drafted, asking only for my signature. When I expressed considerable surprise at this approach, the student explained that other teachers had required the student to do the same. Some may regard this as a small matter, but I believe it is precisely from small matters like this that an entire system is corrupted.</text:p>
      <text:p text:style-name="P17">When I was preparing this talk, my intention was to share my scattered thoughts about learning, not to criticize anyone, still less to criticize the state of education in this country. Many people have already pointed out many inadequacies, and I do not feel the need to add my voice to theirs. But if there is one problem to name, the largest problem, it is, in my view, the degree of corruption of the system.</text:p>
      <text:p text:style-name="P17">Let me return to the Đồi Ngô incident, which you will all be familiar with. This was a most extraordinary event: for a candidate to film an <text:span text:style-name="T32">exam invigilator</text:span> violating the exam regulations is something <text:span text:style-name="T32">with</text:span> no precedent in <text:span text:style-name="T32">human </text:span>history. It is a very sad story; <text:span text:style-name="T33">i</text:span>t must ring as a warning bell about the degree to which the system has been corrupted. Rather than assigning blame to any particular agency or individual, let us reflect calmly. For something like this to happen, many people, from the central level down to the local, inside and outside the education sector, must have failed to respect the rules of the game. The result is that the graduation examination, which ought to be a solemn procedure, a sacred milestone marking the entire course of a student’s years of labor and learning, has become a farce: a farce that makes one want to <text:span text:style-name="T11">weep.</text:span></text:p>
      <text:p text:style-name="P17">America can be proud of its universities. American universities are generally relatively young: <text:span text:style-name="T34">T</text:span>he University of Chicago, where I work, is only about a hundred years old, the same age as the Vietnam National University in Hanoi. One must perhaps also answer the question: what is the “secret of their success”? At the present moment one might say that the reason for their success is that they are very wealthy, with many excellent faculty and full, modern facilities. But to say this is to confuse result with cause. In the beginning they were not wealthy, nor did they have many truly exceptional people compared to European universities of the same period. There is no <text:soft-page-break/>single answer, but one cause that is certainly cited is a culture of fair play: every form of cheating is punished with the utmost severity.</text:p>
      <text:p text:style-name="P17">I believe that honesty is a form of conduct that is difficult to learn from books. For children to learn honesty, adults must first learn it themselves, so that they can set the example by their own behavior.</text:p>
      <text:p text:style-name="P17">I have spoken at length about the necessity of organized learning, discipline, and honesty. But you may wonder why, in talking about school, I seem to be talking about a barracks.</text:p>
      <text:p text:style-name="P17">Discipline and honesty are, of course, not sufficient. What is still missing is the “passion” I mentioned at the outset: <text:span text:style-name="T35">p</text:span>assion for seek-ing the new and the unknown, for finding explanations for what is not yet understood. Where does passion come from? Truthfully, I am not sure, and that is why I assume that human beings are born with an instinct to aspire upward: in other words, that the seed of passion is already present within them. I think that the question of where passion comes from is less important than the question of how to preserve it, and how to prevent it from being corrupted. Passion and the aspiration toward what is higher and better are the engine of learning, and genuine learning itself is what nourishes that aspiration: through humane values of the true, the good, and the beautiful; through the love of truth; and through the happiness of discovery, crossing the frontier between the known and the unknown.</text:p>
      <text:p text:style-name="P20">A friend of mine suggested to me that alongside passion, one must not forget to add courage. Courage is what you need so as not to be seduced by laziness and cowardice into turning your back on the truth. Courage is also what you need very much when pursuing the new. You have a group, fellow students with whom to learn and make progress together. But from personal experience, I find that when one has truly crossed the frontier of the known to pursue the unknown, courage is essential <text:span text:style-name="T36">b</text:span>ecause the search for the new is usually a solitary journey — and it can last for many years.</text:p>
      <text:p text:style-name="Heading">Acknowledgments</text:p>
      <text:p text:style-name="P17">Sincere thanks to Bùi Đức Lại, Nguyễn Xuân Long, Hoàng Hồng Minh, and Nguyễn Phương Văn for their valuable comments and suggestions.</text:p>
      <text:p text:style-name="Heading">References</text:p>
      <text:p text:style-name="P18"><text:span text:style-name="T38">[1]<text:tab/></text:span>Hannah Arendt, “La crise de l'éducation”.</text:p>
      <text:p text:style-name="P18"><text:a xlink:type="simple" xlink:href="https://web.archive.org/web/20060625043522/http://meirieu.com/COURSPHILO/textephilo4.pdf" text:style-name="Internet_20_link" text:visited-style-name="Visited_20_Internet_20_Link">https://web.archive.org/web/20060625043522/http://meirieu.com/COURSPHILO/textephilo4.pdf</text:a></text:p>
      <text:p text:style-name="P21"><text:span text:style-name="T38">[2]<text:tab/></text:span>Châu Ngô, “Giữ ký ức” <text:span text:style-name="T40">(“</text:span>Preserving Memory”<text:span text:style-name="T40">).</text:span></text:p>
      <text:p text:style-name="P18"><text:a xlink:type="simple" xlink:href="https://web.archive.org/web/20131105220712/thichhoctoan.net/2013/01/16/giu-ky-uc/" text:style-name="Internet_20_link" text:visited-style-name="Visited_20_Internet_20_Link">https://web.archive.org/web/20131105220712/thichhoctoan.net/2013/01/16/giu-ky-uc/</text:a></text:p>
      <text:p text:style-name="P22"><text:span text:style-name="T39">[3]<text:tab/></text:span>Khoái <text:span text:style-name="T39">Huy Hà,</text:span> “Muốn có ứng dụng, phải có lý thuyết” <text:span text:style-name="T40">(“</text:span>To Have Applications, One Must Have Theory”<text:span text:style-name="T40">).</text:span></text:p>
      <text:p text:style-name="P18"><text:soft-page-break/><text:a xlink:type="simple" xlink:href="https://web.archive.org/web/20240706004126/https://vnn.vietnamnet.vn/giaoduc/vande/2006/04/562806/" text:style-name="Internet_20_link" text:visited-style-name="Visited_20_Internet_20_Link">https://web.archive.org/web/20240706004126/https://vnn.vietnamnet.vn/giaoduc/vande/2006/04/562806/</text:a></text:p>
      <text:p text:style-name="P18"/>
      <text:p text:style-name="P28">Học như thế nào?</text:p>
      <text:p text:style-name="P3">Ngô Bảo Châu</text:p>
      <text:p text:style-name="P4"/>
      <text:p text:style-name="P5"><text:span text:style-name="T9">Text u</text:span>nedited</text:p>
      <text:p text:style-name="P9"/>
      <text:p text:style-name="P24">Bài đã đăng trên Tia Sáng.</text:p>
      <text:p text:style-name="P24">—————————————–</text:p>
      <text:p text:style-name="P24">Tôi rất hay được các em học sinh, sinh viên và các bậc phụ huynh hỏi về “bí quyết học tập”. <text:s/>Tôi thường trả lời “Không có bí quyết gì cả. Quan trọng là niềm say mê.” Trả lời như vậy là một cách né tránh. Không sai nhưng cũng không đầy đủ. Tôi bắt buộc phải trả lời như thế khi mình chưa bao giờ suy nghĩ về vấn đề này một cách thấu đáo. Nhưng không thể nào né tránh được mãi câu hỏi này. Cũng không thể nào trút hết trách nhiệm lên đầu người khác bằng cách nói: “đây là chuyện chuyên môn của những người làm công tác nghiên cứu khoa học giáo dục”.</text:p>
      <text:p text:style-name="P24">Điểm lại cuộc đời mình, tôi thấy cho đến thời điểm này mình không làm gì khác ngoài việc đi học, sau đó dạy học và nghiên cứu khoa học. Trong quá trình ấy, chắc tôi cũng đã từng có những suy nghĩ riêng. Chỉ có điều những suy nghĩ đó chưa bao giờ được được sắp xếp lại một cách hệ thống và được diễn đạt một cách mạch lạc. Chuẩn bị cho buổi nói chuyện này là cơ hội rất tốt để tôi làm việc này, cái việc mà phải thú thật là rất vất vả nhưng hy vọng là có ích.</text:p>
      <text:p text:style-name="P24">Tôi xin cảm ơn International Peace Foundation và trường Đại học bách khoa đã cùng tổ chức sự kiện này. Cảm ơn tất cả các quí vị, các bạn sinh viên, học sinh đã đến dự buổi nói chuyện ngày hôm nay. Sự quan tâm của quí vị là động cơ mạnh để tôi hoàn thành bài trao đổi này.</text:p>
      <text:p text:style-name="P24">Dàn bài của tôi dựa vào ba câu hỏi. Thứ nhất: cái gì là <text:span text:style-name="T41">động cơ</text:span> căn bản cho việc học tập. Thứ hai: học chữ hay học làm người? Thú thực là tôi không thích câu hỏi này, vì nó rất mập mờ và đa nghĩa. Nhưng tôi sử dụng chính tính đa nghĩa của nó để triển khai thành các câu hỏi nhỏ xung quanh việc <text:span text:style-name="T41">học cái gì</text:span>? Câu hỏi cuối cùng làm thành nhan đề của bài nói chuyện này: <text:span text:style-name="T41">học như thế nào</text:span>? Tôi không có tham vọng đưa ra câu trả lời thấu đáo, đầy đủ cho cả ba câu hỏi trên, mà chỉ có ý định sắp xếp lại những suy nghĩ tản mạn của mình thành những câu trả lời không cầu toàn. Tôi hy vọng rằng vào cuối buổi nói chuyện, chúng ta sẽ còn thời gian để trao đổi thêm.</text:p>
      <text:p text:style-name="Heading"><text:soft-page-break/>Về sự hướng thượng và hướng thiện</text:p>
      <text:p text:style-name="P24">Sách Tam Tự Kinh mà các cụ học ngày xưa bắt đầu bằng câu “Nhân chi sơ, tính bản thiện”. Con người được sinh ra có bản tính vốn là hiền lành. Liệu có đúng không nhỉ ? Tin tức hàng ngày dễ làm cho người ta nghi ngờ cái “tính bản thiện” của “nhân chi sơ”. Đầu tháng Một ở Ấn độ, một cô gái 23 tuổi bị sáu người đàn ông hãm hiếp đến chết trên một chiếc xe buýt. Cuối tháng Một, ở Bắc Ninh, người ta nô nức, chen lấn nhau tham gia lễ hội chém lợn. Con lợn bị nhát đao xẻ làm hai mảnh lăn quay trong vũng máu lênh láng và trong tiếng hò reo của những người trảy hội. Đây là những hiện tượng dị biệt, không tiêu biểu cho cuộc sống của người dân Ấn độ và Việt nam. Tôi nêu chúng ra như ví dụ vì chúng cùng phản ánh sự độc ác của con người một cách vô cùng rõ nét. Xét cho cùng, giết lợn cũng chỉ là việc giết động vật để ăn thịt, cái mà con người buộc phải làm để duy trì cuộc sống của chính mình. Hãm hiếp cũng nảy sinh từ một bản năng cơ bản của con người là bản năng duy trì nòi giống. Phải chăng, con người được sinh ra với hai bản năng cơ bản duy trì cuộc sống và duy trì nòi giống, cái mà ở <text:s/>trong đó đã có sẵn mầm mống của cái ác, của cái ác khủng khiếp. Nếu chỉ dừng lại đây thì quả khó mà tin được vào cái “Nhân chi sơ tính bản thiện”.</text:p>
      <text:p text:style-name="P24">Nếu con người được sinh ra chỉ có hai bản năng nói trên thì chắc rằng hai sự việc kể trên sẽ không phải là những hiện tượng dị biệt, mà ngược lại, là phổ biến, đến mức không làm chúng ta kinh ngạc hay xúc động nữa. Có thể tôi còn là một người lạc quan, nhưng tôi tin rằng con người được sinh ra còn có một bản năng khác nữa: đó là bản năng hướng thượng, hướng thiện. Nhìn vào một đứa trẻ sơ sinh, xinh xắn như một thiên thần ta có thể nghĩ rằng đó là hiện thân của sự tốt đẹp. Nhưng cái kiểm soát mọi hành động của đứa trẻ là chỉ đơn thuần bản năng sinh tồn của nó. Tôi nghĩ rằng, trong đứa trẻ không có sẵn một tâm hồn cao thượng, nhưng đã có sẵn tiềm năng để xây dựng nên từ đó cái tâm hồn ấy. Theo tôi, nếu có “tính bản thiện” của “nhân chi sơ”, thì nó chính là cái tiềm năng ấy.</text:p>
      <text:p text:style-name="P24">Cái tiềm năng ấy được triển khai trong học tập và là động cơ chính cho việc học tập. Có thể có người không đồng ý với quan điểm này và cho rằng học là để sau này có một cuộc sống tử tế, để sau này có một vị trí tốt trong xã hội. Tôi cho rằng cách suy nghĩ như vậy là phiến diện. Thứ nhất, để có một cuộc sống tử tế, đó cũng chính là biểu hiện của sự hướng thượng, hướng thiện – tất nhiên một khi nó đã biến thái để nhắm tới cái đích là hưởng thụ một cuộc sống an nhàn nhờ vào sức lao động của người khác, thì cái động cơ hướng thượng hướng thiện đó đã bị tha hoá nghiêm trọng. Thứ hai, tôi tin rằng đa số người ta thực ra không có khả năng phấn đấu vì một cái gì xảy ra trong một tương lai quá xa, phần lớn người ta học chỉ vì đó là cách hoàn thiện bản thân mình, tức là học với một động cơ hướng thượng thuần khiết nhất. Vì vậy, nhiều khi chính quan niệm xã hội lại làm tha hoá một động cơ mà bản chất là thuần khiết.</text:p>
      <text:p text:style-name="P24">Cần lưu ý là quan niệm xã hội không phải là cái duy nhất làm cho sự hướng thượng hướng thiện bị tha hoá. Tôn thờ cá nhân, có thể là lãnh tụ, danh thủ bóng đá, hay là ca sĩ Hàn quốc, là một hình thức tha hoá của sự hướng thượng. Bản năng hướng thượng, hướng thiện luôn <text:soft-page-break/>phải vật lộn với hàng loạt bản năng xấu: tính lười biếng, tính đố kỵ, tính gian dối, tính hiếu thắng, tự phụ. Bị tha hóa, nó không còn mấy cơ hội để làm động cơ cho việc học tập.</text:p>
      <text:p text:style-name="Heading">Học chữ hay học làm người?</text:p>
      <text:p text:style-name="P24">Gần đây, trên báo chí có khá nhiều người ở đặt ra câu hỏi “Cần học chữ hay học làm người?” Hoặc giữa hai cái, cần học cái nào trước. Câu hỏi này thực ra tối nghĩa. Học chữ, là tiếp thu kiến thức. Còn học làm người là như thế nào, hẳn có nhiều cách hiểu khác nhau. Có thể hiểu theo nghĩa hẹp: học làm người như học kỹ năng sống, học nghệ thuật sống, tóm lại là học những hành vi văn minh. <text:s/>Cũng có thể hiểu học làm người theo nghĩa rộng tức là học những gì làm nên cốt cách của một con người – như vậy thì lại quá rộng, và bao hàm nốt cả học chữ rồi. Có lẽ vì ý nghĩa của câu hỏi không được phân tích rạch ròi mà nhiều cuộc thảo luận trên báo chí về đề tài có cái vẻ gì đó hơi luẩn quẩn.</text:p>
      <text:p text:style-name="P24">Trong cái nghĩa hẹp, có thể đặt lại câu hỏi trên khác đi, và làm cho nó rõ nghĩa hơn: “Trường học phải dạy chữ hay dạy kỹ năng sống, nghệ thuật sống?” Có vẻ như càng ngày càng có nhiều người ngả về quan điểm hiện đại “Trường học phải dạy cho trẻ kỹ năng sống”. <text:s/>Quan điểm cổ điển được nhà triết học Đức Hannah Arendt phát biểu rành rọt trong bài viết “Khủng hoảng trong giáo dục” như thế này: “Chức năng của nhà trường là dạy cho trẻ thế nào là thế giới, chứ không phải là rèn cho chúng nghệ thuật sống”. Tôi đồng ý với quan điểm này, và trong phần tiếp theo của bài viết quan điểm này sẽ được làm rõ hơn lên.</text:p>
      <text:p text:style-name="P24">Ẩn trong câu nói của bà Hannah Arendt, có cả câu trả lời cho câu hỏi học làm người theo nghĩa rộng. Học làm người là học về thế giới, trong đó có thế giới tự nhiên và thế giới con người, để mỗi cá nhân nhận thức được vị trí của mình ở trong đó, nhận thức hết các tương tác giữa cá nhân mình với những người khác, để triển khai mọi tiềm năng của mình, để hoàn thiện mình và đồng thời làm cho thế giới xung quanh trở nên một nơi an toàn hơn, thân thiện hơn cho cuộc sống.</text:p>
      <text:p text:style-name="Heading">Để trẻ có kỹ năng sống, người lớn phải là tấm gương</text:p>
      <text:p text:style-name="P24">Tôi từng nghe người ta kể chuyện một đứa bé sơ sinh bị sói tha đi. Sau này người ta tìm lại được đứa bé. Tuy vẫn còn hình hài của một con người, tính nết của nó là tính nết của loài sói. Ở đây, chính cái “tiềm năng hướng thượng, hướng thiện” đã biến nó thành người sói. Đối với nó, cái đại diện cho sự tốt đẹp chính là mẹ sói của nó. Mẹ sói cho nó bú, tha mồi về cho nó ăn. Đứa trẻ lớn lên giữa bày sói tất trở thành một con sói, cái nó coi là tốt là cái tốt của loài sói. Kể ra nếu nó tiếp tục sống trong rừng cùng với bày sói thì như thế cũng không sao. Bi kịch đến với nó vào cái ngày mà người ta buộc nó quay lại sống với con người.</text:p>
      <text:p text:style-name="P24">Ở Lào, ở Thái Lan có phong tục gửi trẻ nhỏ vào sống ở trong chùa một thời gian, từ ba ngày, ba tuần, ba tháng cho đến ba năm. Ở trong chùa, ngoài việc học kinh kệ, trẻ còn học yêu quí cuộc sống thanh <text:soft-page-break/>đạm, ngăn nắp của người tu hành. Khi đi thăm Lào và Thái Lan, người ta luôn cảm thấy ngạc nhiên về sự sạch sẽ, ngăn nắp của làng quê, kể cả ở những nơi nghèo nhất.</text:p>
      <text:p text:style-name="P24">Tôi xin phép dẫn thêm một ví dụ cá nhân, nhỏ nhặt và tầm thường thôi. Vợ chồng tôi ít xem vô tuyến, hầu như không xem bao giờ. Có lẽ vì thế mà mấy đứa con của chúng <text:s/>tôi hoàn toàn không có sở thích xem truyền hình, bố mẹ không cần cấm đoán hay hạn chế gì cả. Nếu có thời gian, chúng nó thích đọc sách hơn. Nhiều khi tôi muốn xem phim cùng với đám trẻ con, tôi lại phải mặc cả với chúng.</text:p>
      <text:p text:style-name="P24">Những ví dụ này nhắc nhở chúng ta, những người có bổn phận làm người lớn, đừng bao giờ quên rằng dù muốn hay không muốn, chúng ta luôn là tấm gương để cho trẻ soi vào. Ngoài trách nhiệm cho trẻ một mái nhà, cung cấp thức ăn cho đủ no, quần áo cho đủ mặc, người làm cha mẹ luôn phải tâm niệm rằng mình cư xử ngày hôm nay như thế nào, ngày mai trẻ sẽ cư xử giống như thế. Đó là bài học của chuyện cái máng gỗ mà chắc các bạn đều biết cả.</text:p>
      <text:p text:style-name="P25">Cái tôi muốn nói là nếu người lớn biết cư xử đúng mực thì trẻ con không cần đi học những lớp kỹ năng sống nữa. Và người có trách nhiệm chính trong việc giáo dục hành vi cho trẻ là cha mẹ, gia đình, chứ không phải nhà trường. Những bài lên lớp của thầy cô giáo không có cùng tác dụng nhiều lên hành vi của đứa trẻ như chính hành vi của cha mẹ nó.</text:p>
      <text:p text:style-name="P25">Tất nhiên tôi không muốn nói rằng trường học hoàn toàn không có chức năng giáo dục hành vi cho trẻ nhỏ. Trong tâm hồn trẻ nhỏ, thầy cô giáo có một vị trí thiêng liêng, có lẽ thiêng liêng hơn bố mẹ, vì thế nên cách ứng xử của các thầy cô trong cuộc sống nhà trường sẽ ảnh hưởng trực tiếp hành vi của học sinh. Nhưng không vì thế mà cha mẹ có thể trút toàn bộ trách nhiệm giáo dục hành vi của trẻ lên vai thầy cô giáo.</text:p>
      <text:p text:style-name="Heading">Vai trò của giáo dục nhân văn trong sự hình thành nhân cách</text:p>
      <text:p text:style-name="P24">Khi đứa bé mới ra đời, bản năng sinh tồn điều khiển mọi hoạt động của nó. Đối với nó, toàn bộ thế giới là bầu sữa mẹ. Khi lớn lên, nó có thêm nhận thức về thế giới xung quanh, về những con người khác. Dần dần nó hiểu rằng không chỉ có nó cần sinh tồn, mà cả những người khác cũng cần sinh tồn như nó. Điều này thoạt nghe thật hiển nhiên, nhưng đó là một bước chuyển hoá vĩ đại của tư duy, đứa trẻ đã chấp nhận sự tồn tại của khách thể, của người khác, như một lực lượng đối lập với bản thân nó.</text:p>
      <text:p text:style-name="P24">Chấp nhận sự tồn tại của khách thể là điều kiện để phân biệt giữa cái thiện và cái ác. Cái thiện là sung sướng trong sự hạnh phúc của người khác, đau khổ trong sự bất hạnh của người khác, còn ngược lại cái ác là sung sướng trong sự bất hạnh của người khác, đau khổ với sự hạnh phúc của người khác. Như vậy, khi đứa trẻ còn chưa nhận thức về người khác, theo nghĩa ở trên, các khái niệm thiện và ác chưa thể áp dụng vào nó. Thêm nữa, khái niệm “người khác” không nhất thiết phải là người. Đó có thể là con ong, cái kiến. Đó cũng có thể là con lợn ở Bắc Ninh. Cái cảm giác phấn khích, hân hoan của con người <text:soft-page-break/>trong cái chết tức tưởi của con lợn biểu đạt cái ác ở trạng thái thuần tuý nhất của nó.</text:p>
      <text:p text:style-name="P24">Việc học, theo Hannah Arendt, đó là cố gắng để hiểu thế giới xung quang, trong đó có thế giới tự nhiên và thế giới con người. Nó bắt người ta phải nhận thức về sự tồn tại của người khác, cái là điều kiện để phân biệt giữa thiện và ác. Chỉ biết phân biệt thiện và ác thôi không đủ. Có một câu ngạn ngữ nói rằng “Đường đến địa ngục lát bằng thiện tâm”. <text:s/>Biết phân biệt rành rọt giữa thiện và ác là cần thiết nhưng sẽ thật thiếu sót, thậm chí nguy hiểm, nếu coi việc hình thành nhân cách chỉ đơn giản là phân biệt giữa thiện và ác. Trong phần lớn các trường hợp, vấn đề không phải là ở chỗ phân biện giữa thiện và ác.</text:p>
      <text:p text:style-name="P24">Để nhận thức được vị trí của mình trong thế giới, mỗi người phải tự đặt ra cho mình những câu hỏi căn bản nhất về thân phận con người, phải tự tìm ra câu trả lời của mình cho những câu hỏi đó, hoặc ít ra cũng biết về những câu trả lời mà tiền bối đã từng đưa ra. Việc phân biệt giữa cái thiện và cái ác là một trong những câu hỏi như thế, nhưng nó không phải là câu hỏi duy nhất và có lẽ cũng không phải là câu hỏi quan trọng nhất.</text:p>
      <text:p text:style-name="P24">Có những câu hỏi thoạt nghe thì có vẻ ngây thơ ví dụ “Những cái gì là nhu cầu căn bản của con người? Tự do và công bằng có phải là như cầu căn bản của con người hay không”. Con người có cả nhu cầu sống trong cộng đồng, trong xã hội, vì mỗi người không thể làm ra được hết tất cả những gì mình cần. Nếu tự do và công bằng cũng là nhu cầu căn bản thì xã hội phải được thiết kế thế nào để cho tự do của mỗi người và sự công bằng giữa người này và người khác được bảo đảm? Triển khai câu hỏi đến đây thì ta thấy câu hỏi này phức tạp hơn nhiều so với câu hỏi phân biệt giữa cái thiện và cái ác, và có lẽ cũng quan trọng hơn.</text:p>
      <text:p text:style-name="P24">Trả lời cho câu hỏi về vai trò của giáo dục nhân văn nói chung vượt ra ngoài khuôn khổ của bài nói chuyện này và khả năng của tôi. <text:s/>Trong phần tiếp theo, tôi muốn thu hẹp câu hỏi lại và trao đổi kỹ hơn về vai trò của giáo dục nhân văn trong sự hình thành nhân cách.</text:p>
      <text:p text:style-name="P24">Cơ chế căn bản cho việc hình thành nhân cách là chiêm nghiệm về một sự việc cụ thể đã xảy ra trong một hoàn cảnh cụ thể, ngẫm xem người ta đã quyết định như thế nào, đã làm gì, và hậu quả, ảnh hưởng của việc đó lên cuộc sống của người khác và của chính người đó như thế nào. Có thể thấy rằng con người chiêm nghiệm bằng xúc cảm nhiều hơn là bằng tư duy. Người ta chiêm nghiệm sâu sắc nhất về những gì xảy ra với chính mình, hoặc là xảy ra với người thân của mình, vì những trải nghiệm đó để lại những xúc cảm mạnh nhất. <text:s/>Nhưng nói chung, trải nghiệm của một người trẻ, kể cả những trải nghiệm được gia đình chia sẻ, không đủ phong phú để người đó hình thành một nhân cách vững vàng. Vốn trải nghiệm của anh ta sẽ giàu có hơn nhiều, nếu anh ta biết đặt mình vào trong lịch sử, nơi những câu chuyện của quá khứ được ghi lại một cách trung thực, hoặc là trong văn học, nơi có những câu chuyện lớn, tuy có thể là được hư cấu, nhưng luôn xuất phát từ sự trải nghiệm chân thực của nhà văn.</text:p>
      <text:p text:style-name="P24"><text:soft-page-break/>Trong một bài viết trên blog cá nhân, đặt tên là Giữ ký ức, tôi có kể câu chuyện về học sinh phổ thông ở Đức học về tội ác của chế độ quốc xã lên người Do thái như thế nào. Học sinh Đức học ở trong sách vở, đọc nhật ký của cô bé Anne Frank viết khi trong thời gian hai năm trốn trong góc tủ để rồi cuối cùng cũng bị bắt rồi bị giết. Họ đi tham quan trại tập trung Buchenwald. Nhưng đáng ngạc nhiên hơn cả là học sinh Đức còn phải tự đi điều tra xem xung quanh nơi mình ở, trước đây đã từng có người Do thái nào sống, họ tên là gì, họ đã bị bắt trong hoàn cảnh nào, đã bị giết chết như thế nào. Làm như thế để cho những trải nghiệm trở nên gần gũi nhất. Một vài tháng sau khi viết bài này, tôi có nói về chuyện với một nhiếp ảnh gia người Đức, ông ấy nói người Đức phải làm như thế vì nếu không họ sẽ lại phạm lại đúng những sai lầm khủng khiếp nhất trong quá khứ. Giáo sư Hà Huy Khoái cũng bình luận như thế này: “Người Đức khôn thật, họ cho học sinh học thuộc bài lịch sử! Dân tộc nào không làm điều đó, chắc chắn phải học đi học lại nhiều lần. Chưa thuộc bài nào, lịch sử sẽ bắt học lại bài đó. Mà mỗi lần học lại, thi lại đều phải trả giá đắt hơn trước. Giá ở đây có thể là máu, không chỉ là tiền như sinh viên thi lại!”.</text:p>
      <text:p text:style-name="P24">Tôi nghĩ về câu chuyện này từ một khía cạnh khác. Trải nghiệm chân thực về những sự thật dù đau đớn đến mấy cũng làm cho cốt cách con người trở nên mạnh mẽ, trái với những sự dối trá, có thể ngọt lịm, nhưng luôn làm tha hoá tâm hồn con người. Chức năng của giáo dục nhân văn không phải là ngợi ca cái thiện, phê bình cái ác mà là giúp con người tìm đến sự thực và để cảnh giác với sự dối trá của người khác và của chính mình. Cảnh giác với bản năng lười nhác, ích kỷ và hèn nhát, những cái rất giỏi ngụy trang trong tấm áo thiện tâm để dắt tay con người đi về địa ngục, cái không phải là gì khác mà chính là sự tha hóa hoàn toàn của tâm hồn con người. Giáo dục nhân văn nghiêm túc rèn cho chúng ta thái độ nỗ lực không mệt mỏi trong cố gắng đi tìm sự thật cùng với khả năng chiêm nghiệm bằng tư duy vì nếu chỉ chiêm nghiệm bằng xúc cảm, con người rất dễ bị đánh lừa.</text:p>
      <text:p text:style-name="P24">Tôi đã nhắc đến chuyện bản năng hướng thượng hướng thiện của con người rất dễ bị tha hoá để trở thành hiện tượng sùng bái cá nhân, có thể xuất hiện dưới dạng là sùng bái lãnh tụ hoặc ca sĩ Hàn quốc. Vai trò của giáo dục nhân văn là dắt tay con người đi theo “tấm biển chỉ đường của trí tuệ” để đi về với cái chân thiện, chân mỹ.</text:p>
      <text:p text:style-name="Heading">Ngôn ngữ và thái độ khoa học</text:p>
      <text:p text:style-name="P24">Nếu bản năng hướng thượng, hướng thiện là động cơ của học tập, nó không phải là công cụ. Con người biểu đạt sự hiểu biết về thế giới khách quan bằng lời. Con người thụ hưởng vốn hiểu biết mà nhân loại tích tụ được thông qua ngôn ngữ. Có hai thái độ ứng xử với ngôn ngữ đối lập nhau, dẫn đến hai phương pháp tư duy đối lập nhau: một bên là thái độ tôn giáo, coi ngôn từ như đối tượng để tôn thờ, một bên là thái độ khoa học, coi ngôn từ như một công cụ để định hình tư tưởng.</text:p>
      <text:p text:style-name="P24">Định nghĩa chữ Đạo trong Đạo Đức Kinh là điển hình của thái độ tôn giáo đối với ngôn từ. Đạo được mô <text:s/>tả như thế này, như thế kia, Đạo không phải là thế này, không phải là thế kia, nhưng không một lần <text:soft-page-break/>Đạo được định nghĩa là cái gì. Đạo là một từ đại diện cho một khái niệm linh thiêng không định nghĩa được, người ta chỉ có thể biết thuộc tính của nó là như thế này, như thế kia, cùng lắm là biết nó không phải là cái gì, tức là hạn chế khái niệm bằng phủ định, chứ không thể nói nó là cái gì, tức là định nghĩa khái niệm bằng khẳng định. <text:s/>Tính linh thiêng của chữ Đạo nằm chính ở chỗ ta không thể định hình được nó.</text:p>
      <text:p text:style-name="P24">Tôi dẫn ví dụ Đạo Đức Kinh không với ý muốn đánh giá thấp giá trị triết học của tác phẩm này. Tôi chỉ muốn chỉ ra sự đối lập với giữa thái độ tôn giáo của nó đối với ngôn ngữ và thái độ khoa học. Thái độ tôn giáo với ngôn ngữ đưa đến những luận điểm bao quát, trong bất kỳ hoàn cảnh nào của cuộc sống, con người cũng có thể vận dụng chúng để diễn giải những gì xảy ra với mình, và tự an ủi mình. Mà trên đời này, ai là người không cần được an ủi.</text:p>
      <text:p text:style-name="P24">Đóng góp lớn nhất của văn hoá Hy lạp cổ đại cho tư duy loài người có lẽ là sự phát minh ra thái độ khoa học với ngôn ngữ mà điển hình là sách Cơ sở của Euclid. Để nói về hình tròn, người ta không nói nó là cái gì đó giống mặt trời, hay mặt trăng vào thời kỳ trăng tròn, mà người ta định nghĩa đường tròn là tập hợp các điểm có một khoảng cách cho trước đến một điểm cho trước, gọi là tâm của đường tròn. Cái đáng lưu ý nhất là khái niệm luôn được xây dựng trên cơ sở khẳng định: nó là cái gì, chứ không phải trên cơ sở phủ định: nó không phải là cái gì.</text:p>
      <text:p text:style-name="P24">Cũng cần lưu ý là ở đây đường tròn không được gán cho bất kỳ một thuộc tính thiêng liêng nào cả, nó chỉ là cái tên đưa ra để định hình khái niệm tập hợp các điểm có khoảng cách cho trước đến một điểm cho trước. Thậm chí trong thực tế, không có cái gì chính xác là hình tròn cả, chỉ có những hình tròn gần đúng mà thôi. Các định nghĩa của Euclid chỉ có giá trị giới hạn trong phạm vi của hình học. Theo một nghĩa nào đó, hình học là một sản phẩm thuần tuý của trí tuệ, là một trò chơi của tư duy. Giá trị lớn nhất của trò chơi này nằm ở ngay trong sự hạn chế của nó. Vì luật chơi bao gồm một số tiên đề, và một số phép suy luận được quy định trước, một phát biểu hình học chỉ có thể hoặc là đúng, hoặc là sai, một chứng minh chỉ có thể là đầy đủ chặt chẽ hoặc là thiếu sót ngộ nhận. <text:s/>Đây là cuộc chơi mà tư duy logic của con người được tha hồ thi thố. Cho đến bây giờ nó vẫn giữ nguyên ý nghĩa đó. Để cho trẻ học được phương pháp lập luận chặt chẽ, không có gì tốt hơn là học hình học Euclid.</text:p>
      <text:p text:style-name="P24">Ưu điểm của trò chơi tư duy mà trong các luật chơi được cố định trước là trong phạm vi của cuộc chơi này, mọi cái đúng cái sai đều rõ ràng. Ưu điểm quan trọng khác là con người có thể rút ra kết luận rõ ràng chi tiết từ hệ thống tiên đề và khái niệm, để rồi đem nó ra kiểm chứng, đối chiếu với quan sát thực tế.</text:p>
      <text:p text:style-name="P24">Ở điểm này, thiên hướng của khoa học khiêm tốn hơn nhiều so với thiên hướng của tôn giáo. Những luận điểm của tôn giáo thường có tính khái quát cao, nhưng không có tính chi tiết để có thể kiểm chứng đối chiếu được qua các quan sát thực tế. Trong mọi trường hợp tôn giáo yêu cầu người ta phải tin và phải chấp hành. Ngược lại, lý thuyết khoa học đưa ra những luận điểm đủ cụ thể để có thể kiểm chứng với thực tế và dành cho thực tế quyền phán xét cuối cùng. Sự khiêm tốn, <text:soft-page-break/>luôn đặt mình vào vị trí để cho thực tế phán xét, hoặc khẳng định, hoặc phủ nhận, theo Karl Popper chính là thuộc tính đặc trưng của khoa học, đối lập với tín điều.</text:p>
      <text:p text:style-name="P24">Sự khiêm tốn này cũng chính là cái làm nên sức sống của khoa học. Tôn giáo sẽ chết khi con người không còn đặt lòng tin vào tín điều nữa. Còn trong bản chất của mình, luận điểm khoa học chấp nhận sự phủ định, nó như chỉ chờ được thực tế phủ định để hồi sinh, lột xác thành một lý thuyết khoa học mới, phức tạp hơn, có phạm vi ứng dụng rộng hơn lý thuyết cũ.</text:p>
      <text:p text:style-name="P24">Trong bản chất, mọi lý thuyết khoa học chỉ mô tả được một phạm vi nào đó của thế giới, lý thuyết càng thô sơ thì phạm vi áp dụng của nó càng hẹp. Đi ra ngoài phạm vi đó là bắt đầu một cuộc chơi mới, con người lại phải sáng tạo một hệ thống ngôn ngữ, khái niệm mới, tìm ra một luật chơi mới. <text:s/>Nhưng không phải vì thế mà lý thuyết cũ nhất thiết phải bị thủ tiêu khi một lý thuyết mới ra đời. Trong phạm vi cuộc sống hàng ngày, khi các vật thể chuyện động chậm hơn nhiều so với ánh sáng, cơ học Newton vẫn đúng.</text:p>
      <text:p text:style-name="P24">Người đi tìm hiểu thế giới gần như bắt buộc phải đi lại gần như toàn bộ hành trình tìm hiểu thế giới của loài người. Đây là cái khó khăn rất lớn. Đã có một số quan điểm sai lầm trong giáo dục muốn bỏ qua những lý thuyết khoa học trước đây để đưa học sinh đến với những lý thuyết tiên tiến nhất. Ở phương tây những vào những năm 70 đã có trào lưu xây dựng lại toàn bộ giáo trình toán học dựa theo cách trình bày toán học hiện đại của nhóm Bourbaki. Kết quả của thí nghiệm đại trà này không tốt. Cảm nhận chung là trình độ toán học của học sinh tốt nghiệp phổ thông kém đi nhiều.</text:p>
      <text:p text:style-name="P24">Gần đây, con lắc cực đoan có vẻ như bị văng theo hướng ngược lại. Người ta muốn lược đi khỏi chương trình tất cả những gì được coi là không cần thiết cho cuộc sống hàng ngày. Tôi vô cùng ngạc nhiên bởi ý kiến của một vị Giáo sư cho rằng học sinh không cần học vi phân, tích phân vì hàng ngày có ai cần dùng đến vi phân, tích phân đâu. Nhưng chính là nhờ vào thiên tài của Newton và Leibnitz, các hiện tượng tự nhiên được mô tả một cách tường minh dưới dạng phương trình vi phân. Loại bỏ đi đạo hàm tích phân có khác gì tự nguyện quay lại với tư duy mơ hồ của siêu hình trung cổ.</text:p>
      <text:p text:style-name="P24">Vấn đề không phải đem những kiến thức khoa học tiên tiến nhất đến cho học sinh, vì có muốn cũng không làm được. Vấn đề cũng không phải là tập trung rèn luyện cho học sinh kỹ năng tính toán để phục vụ cho những nhu cầu hàng ngày. Cái cần làm trang bị cho học sinh phương pháp tư duy khoa học: định hình rõ nét khái niệm, liên hệ những khái niệm đó với thế giới khách quan, biết lập luận, biết tính toán để đưa ra những luận điểm cụ thể, kiểm chứng những luận điểm đó với thế giới khách quan.</text:p>
      <text:p text:style-name="P24">Còn một thuộc tính khác của một khoa học có sức sống là khả năng đem đến sự bất ngờ. Hình học Euclid không còn khả năng đưa ra những khẳng định bất ngờ nào nữa và theo nghĩa này, nó là một môn khoa học chết. Nó chỉ còn là một trò chơi trí tuệ để học sinh rèn luyện khả năng tư duy logic. Nhận định của Einstein rằng tia sáng bị uốn cong khi đến gần các vật thể có khối lượng lớn nhờ vào những <text:soft-page-break/>tính toán trong lý thuyết tương đối là một bất ngờ khi trong hình dung của chúng ta, đường thẳng là đường truyền của ánh sáng. Sức sống của một bộ môn khoa học thể hiện ở chỗ từ một hệ thống khái niệm, tiên đề chấp nhận được, bằng tính toán và lập luận, người ta có thể đưa ra những giải thích chưa biết cho những hiện tượng đã biết, hoặc là tiên đoán về những hiện tượng chưa được biết đến.</text:p>
      <text:p text:style-name="P24">Khi khoa học “nhận nhiệm vụ” diễn giải, chứng minh cho một luận điểm cho trước, để phục vụ một mục đích chính trị hoặc tôn giáo, bất kể mục đích đó tốt hay xấu, về mặt thực chất khoa học đã mất đi cái làm nên sức sống của nó. <text:s/>Vấn đề “nhận nhiệm vụ” ảnh hưởng nhiều đến khoa học xã hội hơn là khoa học tự nhiên. Như một số người đã nhận xét, ở các nước xã hội chủ nghĩa cũ, các ngành khoa học tự nhiên có thể rất phát triển trong khi các ngành khoa học xã hội để lại rất ít dấu ấn vào văn minh nhân loại. GS Hà Huy Khoái có lần phát biểu nửa đùa nửa thật “Thực chất, ở Việt Nam chưa có khoa học xã hội”. Phát biểu của ông đã gây ra những phản ứng khá dữ dội. Nói một cách khách quan hơn, nó có đấy, nhưng nó yếm khí và thiếu sức sống.</text:p>
      <text:p text:style-name="Heading">Học như thế nào?</text:p>
      <text:p text:style-name="P24">Ngày xưa để học được chữ thánh hiền, cái quan trọng nhất là cần có chí. Cái chí để đi bắt đom đóm bỏ vào lọ làm đèn mà đọc sách thâu đêm. Trong công việc học tập bây giờ, trong việc tiếp thu kiến thức khoa học của nhân loại tưởng như vô hạn, chỉ có chí thôi chắc là không đủ.</text:p>
      <text:p text:style-name="P24">Như tôi vừa trình bày ở trên, khoa học không bị cái bệnh tự phụ coi những luận điểm của mình đúng một cách tuyệt đối, đúng một cách phổ quát. Mỗi lý thuyết khoa học được khai triển bằng tính toán, bằng lập luận từ một số nhỏ khái niệm, một số tiên đề cơ sở. Mỗi lý thuyết có logic nội tại của nó, nó không tự mâu thuẫn, nhưng những kết luận mà người ta rút ra từ nó chỉ khớp với thực tế khách quan trong một phạm vi nào đó. Theo một nghĩa nào đó, mỗi lý thuyết là một trò chơi trí tuệ, với luật chơi được xác định rõ ràng mà trong đó người chơi có thể triển khai khả năng tư duy của mình để đi đến những kết quả nhiều khi nằm ngoài sự mong đợi ban đầu.</text:p>
      <text:p text:style-name="P24">Rất ít khi người ta chơi trò gì một mình. <text:s/>Để cho cuộc chơi thực sự cuốn hút, để cho người chơi có thể thực sự triển khai mọi tiềm năng tư duy của mình để đi đến những kết quả bất ngờ, đi đến sáng tạo, cuộc chơi phải có bạn chơi và phải có trọng tài. Để minh hoạ quan điểm này, tôi xin đưa ra một gợi ý nhỏ, nhưng rất nghiêm túc.</text:p>
      <text:p text:style-name="P24">Nhờ vào internet, hiện tại người ta có thể tìm được miễn phí rất nhiều tài liệu học tập miễn phí ở trên mạng. Một số trường đại học có tên tuổi như MIT, Stanford còn tổ chức công bố miễn phí hầu hết các tư liệu học tập. Thay bằng việc phải bỏ ra 50 ngàn đô-la một năm để đến đó học, mà không phải cứ có 50 ngàn đô-la là đã được nhận vào học, bạn có thể truy cập miễn phí các tư liệu học tập, theo dõi các bài giảng video. Vậy có đúng là bạn cứ ngồi ở Hà nội, hay Sài gòn, là cũng có thể học như sinh viên ở MIT hay ở Stanford hay không.</text:p>
      <text:p text:style-name="P24"><text:soft-page-break/>Tôi nghĩ rằng trừ khi bạn có một ý chí sắt đá, dù có được cung cấp tất cả mọi tài liệu trên đời, dù dược theo dõi miễn phí các bài giảng, ở nhà một mình bạn vẫn không thể học được. Bởi vì ngồi theo dõi bài giảng trên mạng một mình không phải là một cuộc chơi thú vị: không có địch thủ, không có đồng đội, không có lộ trình, không thấy mục tiêu, không thấy giải thưởng. Đó là những thứ không liên quan trực tiếp đến nội dung khoa học của bài giảng nhưng đó là cái mà người đi học cần để phấn đấu liên tục. Học một mình, bạn có thể tập trung cao độ trong một hai ngày cho đến một tuần. Nhưng bạn cần có tập thể, có lớp học, có thầy giáo để duy trì nỗ lực học tập.</text:p>
      <text:p text:style-name="P24">Gợi ý của tôi là tại sao các bạn không tự tổ chức cùng học theo giáo trình được cung cấp trên mạng. Tại sao không thể dùng trực tiếp bài giảng, tư liệu học tập cung cấp miễn phí trên mạng trong các lớp học chính khoá. Các thầy không nhất thiết phải giảng cả buổi nữa, mà có thể cho sinh viên xem bài giảng trên mạng, có thể làm trước phụ đề tiếng việt, sau đó dành thời gian để giải thích thêm, trả lời câu hỏi của sinh viên, và hướng dẫn làm bài tập. Và cuối cùng là tổ chức thi cử nghiêm túc. Tất nhiên gợi ý thì dễ, mà làm thì khó, nhưng tôi không tin là việc này không thể làm được. Kinh phí để tổ chức lớp học như thế có lẽ là không nhiều lắm, nếu so sánh với học phí 50 ngàn đô la một năm ở MIT hay Stanford.</text:p>
      <text:p text:style-name="P24">Với gợi ý có tính suy tưởng này, tôi hy vọng làm nổi lên được sự quan trọng của việc tổ chức học tập. Học tập là một hoạt động tập thể và có tổ chức. Như đã nêu ở trên, thiếu một tập thể có tổ chức, con người nói chung không có khả năng duy trì nỗ lực của mình trong một thời gian dài. Thiếu tranh biện con người nhanh chóng lạc vào con đường chủ quan, con đường luôn dẫn đến cái đích là sự bế tắc. Bản tính con người là hiếu thắng, cái cần thiết để tạo ra sự sôi động trong tranh luận, những cũng là cái làm hỏng cuộc tranh luận, biến nó thành chiến trường để người này đè bẹp người kia. Vì vậy trong mọi cuộc chơi tập thể cần có một luật chơi lành mạnh để cho sự cạnh tranh chỉ tạo ra nỗ lực để mỗi người vượt lên chính mình, chứ không phải là cái cớ để thỏa mãn bản năng hiếu thắng. Và cuộc chơi cần một người trọng tài, nắm vững luật lệ và có thẩm quyền điều khiển cuộc chơi. Ngoài ra, chính những ràng buộc của luật chơi bắt người chơi phải vươn tới sự sáng tạo thực sự.</text:p>
      <text:p text:style-name="P24">Tôi để ý thấy người ta phá bỏ luật chơi dễ dàng quá. Tôi xin dẫn một ví dụ nhỏ là việc viết thư giới thiệu. Viết thư giới thiệu là một công việc khá vất vả mà lại không thể mong đợi phần thưởng gì khác ngoài cảm giác hoàn thành bổn phận. Để giới thiệu cho một đồng nghiệp vào một vị trí phó giáo sư, hay giáo sư, thường thì người giới thiệu phải tìm hiểu kỹ công trình của người mình giới thiệu để chỉ ra chỗ nào hay, chỗ nào đặc sắc, chỗ nào thì cũng chỉ bình thường, và nêu ra ý nghĩa chung của công trình. Không viết được đầy đủ nội dung như vậy, thì lá thư giới thiệu không có mấy trọng lượng, mà người viết thư giới thiệu lại có thể bị đánh giá, hoặc là về sự nghiêm túc, hoặc là về trình độ. Viết thư là một việc rất vất vả, mà không có ai khen ông này ông kia viết thư giới thiệu rất hay, vì trên nguyên tắc thư giới thiệu được giữ bí mật. Tóm lại, viết thư giới thiệu là một việc vất vả, không có bổng lộc, nhưng lại cần phải làm để ủng hộ một người đồng nghiệp xứng đáng, hoặc chỉ đơn thuần là để thực hiện <text:soft-page-break/>bổn phận của mình. Viết thư giới thiệu cho sinh viên cũng mất công, nhưng không vất vả như viết thư giới thiệu cho đồng nghiệp.</text:p>
      <text:p text:style-name="P24">Có một lần, một sinh viên mà tôi đã từng dạy ở Hà nội nhờ tôi viết thư giới thiệu. <text:s/>Khi tôi còn đang do dự vì tôi đánh giá bạn ấy không thực sự xuất sắc, thì anh ta gửi cho tôi một bức thư giới thiệu soạn sẵn để tôi chỉ việc ký vào đó. Khi tôi tỏ ra vô cùng ngạc nhiên về cách làm này, thì bạn ấy trình bày là các thầy giáo khác yêu cầu bạn ấy làm như thế. Một số người có thể coi đây là việc nhỏ, nhưng tôi nghĩ chính từ những chuyện nhỏ như thế sẽ làm tha hoá cả hệ thống.</text:p>
      <text:p text:style-name="P24">Khi chuẩn bị bài nói chuyện này, ý định của tôi là chia sẻ những suy nghĩ tản mạn của mình về việc học tập, chứ không định phê bình ai cả, càng không có ý định phê bình nền giáo dục ở nước ta. Đã có nhiều người chỉ ra rất nhiều bất cập, tôi không thấy cần thiết phải hoà thêm tiếng nói của mình vào đó. Nhưng nếu chỉ nêu ra một vấn đề, vấn đề lớn nhất, thì theo tôi đó là mức độ tha hóa của hệ thống.</text:p>
      <text:p text:style-name="P24">Xin quay lại sự kiện Đồi ngô mà các bạn đều đã biết cả. Đây là một sự kiện vô cùng đặc biệt, vì chuyện thí sinh quay phim giám thị vi phạm qui chế thi là điều chưa từng có tiền lệ trong lịch sử nhân loại. Đây là một câu chuyện rất buồn, nó phải là tiếng chuông cảnh tình về mức độ tha hoá của hệ thống. Hãy khoan quy trách nhiệm cho một cơ quan, một cá nhân nào mà hãy bình tâm suy nghĩ. Để cho một việc như vậy xảy ra, phải có nhiều người từ trung ương đến địa phương, ở trong và ngoài ngành giáo dục, đã không tôn trọng luật chơi. Kết quả là kỳ thi tốt nghiệp, cái đáng ra phải là một thủ tục mang tính nghiêm cẩn, phải là một cái mốc thiêng liêng cho cả quá trình lao động học tập của học sinh, lại trở thành một trò đùa, một trò đùa làm chúng ta muốn khóc.</text:p>
      <text:p text:style-name="P24">Nước Mỹ có thể tự hào về những trường đại học của mình. Các đại học ở Mỹ thường là tương đối trẻ, trường đại học Chicago nơi tôi làm việc cũng mới khoảng 100 tuổi, đồng niên với Đại học quốc gia Hà nội. Có lẽ cũng phải trả lời câu hỏi, cái gì là “bí quyết thành công” của họ. Vào thời điểm hiện tại thì ta có thể nói rằng lý do thành công của họ là họ rất giàu, có nhiều giáo sư giỏi, có cơ sở vật chất đầy đủ, hiện đại. Nhưng nói như thế là nhầm lẫn giữa kết quả và nguyên nhân. Ban đầu, họ không giàu, mà cũng không có nhiều người thực sự xuất sắc nếu so với cái trường đại học ở châu Âu vào cùng thời. Tuy không có một câu trả lời duy nhất, nhưng một nguyên nhân chắc chắn được nhắc đến là tinh thần fair-play, mọi hành vi ăn gian đều bị trừng trị một cách vô cùng nghiêm khắc.</text:p>
      <text:p text:style-name="P24">Tôi cho rằng sự trung thực là một hành vi khó mà học được từ trong sách vở. Để trẻ học được tính trung thực, trước hết người lớn cũng phải học tính trung thực, để tự biết mà làm gương.</text:p>
      <text:p text:style-name="P24">Tôi đã nói nhiều về sự cần thiết của việc tổ chức học tập, tính kỷ luật và tính trung thực. Nhưng bạn có thể thắc mắc rằng tại sao tôi nói về trường học mà cứ như là nói về doanh trại quân đội.</text:p>
      <text:p text:style-name="P24">Tính kỷ luật và trung thực tất nhiên là không đủ. Cái còn thiếu chính là “niềm say mê” mà tôi nhắc đến lúc bắt đầu. <text:s/>Say mê đi tìm cái mới, cái chưa biết, tìm lời giải thích cho những gì còn chưa hiểu. <text:s/><text:soft-page-break/>Niềm say mê đi từ đâu đến? Thú thực là tôi không biết chắc chắn, và vì thế mà tôi giả sử rằng con người sinh ra với một bản năng hướng thượng, nói cách khác là đã có sẵn trong mình mầm mống của niềm ham mê. Tôi nghĩ rằng thực ra câu hỏi niềm ham mê sinh ra từ đâu không quan trọng bằng làm thế nào để gìn giữ niềm ham mê, và không để cho nó bị tha hoá. Niềm đam mê, tính hướng thượng hướng thiện là động cơ cho việc học tập, và chính việc học tập đích thực là cái nuôi dưỡng sự hướng thượng hướng thiện bởi những giá trị nhân văn chân thiện, chân mỹ, bởi tình yêu sự thật, và bởi niềm hạnh phúc của sự khám phá, <text:s/>để vượt qua biên giới giữa những gì đã biết và những gì chưa biết.</text:p>
      <text:p text:style-name="P24">Một người bạn tôi có góp ý với tôi rằng bên cạnh niềm ham mê, đừng quên bổ sung sự quả cảm. Sự quả cảm là cái bạn cần để không để lười biếng, hèn nhát dụ dỗ mà quay lưng lại với sự thật. Sự quả cảm cũng là cái bạn rất cần khi đi tìm cái mới. Bạn có tập thể, có đồng đội để cùng học tập, tiến bộ. Nhưng dựa vào kinh nghiệm cá nhân, tôi thấy rằng khi đã vượt qua biên giới của những gì đã biết để thực sự đuổi theo cái chưa biết, bạn rất cần tính quả cảm vì đi tìm cái mới thường là một hành trình cô đơn, và nó có thể kéo dài nhiều năm.</text:p>
      <text:p text:style-name="Heading">Lời cảm ơn</text:p>
      <text:p text:style-name="P24">Xin chân thành cảm ơn các ông Bùi Đức Lại, Nguyễn Xuân Long, Hoàng Hồng Minh và Nguyễn Phương Văn về những góp ý quí báu.</text:p>
      <text:p text:style-name="Heading">Tài liệu tham khảo</text:p>
      <text:p text:style-name="P24">1. Hannah Arendt: La crise de l’éducation:</text:p>
      <text:p text:style-name="P24">http://www.meirieu.com/COURSPHILO/textephilo4.pdf</text:p>
      <text:p text:style-name="P24">2. Ngô Bảo Châu: Giữ ký ức:</text:p>
      <text:p text:style-name="P26">thichhoctoan.net/2013/01/16/giu-ky-uc/</text:p>
      <text:p text:style-name="P24">3. Hà Huy Khoái: Muốn có ứng dụng, phải có lý thuyết:</text:p>
      <text:p text:style-name="P24">vnn.vietnamnet.vn/giaoduc/vande/2006/04/562806/</text:p>
      <text:p text:style-name="P4"/>
      <text:p text:style-name="P6"><text:span text:style-name="T8">Claude’s </text:span>Notes</text:p>
      <text:p text:style-name="P23"/>
      <text:p text:style-name="Text_20_body"><text:span text:style-name="Strong_20_Emphasis"><text:span text:style-name="T1">Hướng thượng, hướng thiện</text:span></text:span> — literally <text:span text:style-name="T1">aspiring upward, aspiring toward goodness</text:span>. I've rendered this throughout as <text:span text:style-name="T1">the aspiration toward what is higher and better</text:span>, occasionally compressed to <text:span text:style-name="T1">upward aspiration</text:span>. The phrase is his central concept, and he returns to it repeatedly, so consistency mattered. </text:p>
      <text:p text:style-name="Text_20_body"><text:span text:style-name="Strong_20_Emphasis"><text:span text:style-name="T1">Tha hóa</text:span></text:span> — <text:span text:style-name="T1">alienation</text:span> in the Marxist philosophical sense (also translated as “<text:span text:style-name="T13">corruption” or “degeneration”</text:span>). He uses it with deliberate philosophical weight: the word carries the resonance of Marx’s <text:span text:style-name="Emphasis">Entfremdung</text:span>, filtered through the Vietnamese intellectual tradition. I've used <text:span text:style-name="T1">corrupted</text:span> <text:span text:style-name="T12">a</text:span>nd <text:span text:style-name="T1">corruption</text:span> throughout, which <text:soft-page-break/>captures the moral dimension, though it loses some of the original’s theoretical register. </text:p>
      <text:p text:style-name="Text_20_body"><text:span text:style-name="Strong_20_Emphasis"><text:span text:style-name="T1">Chuyện cái máng gỗ</text:span></text:span> — <text:span text:style-name="T1">the story of the wooden trough</text:span> is a well-known folk tale in which an elderly grandfather is made to eat from a wooden trough by his son, who considers the old man too decrepit to eat at the family table — until the son’s own child begins carving a trough for the son himself. I left the reference intact with minimal gloss, as the moral is self-evident from context. </text:p>
      <text:p text:style-name="Text_20_body"><text:span text:style-name="Strong_20_Emphasis">The Đồi Ngô incident (2012)</text:span> was a widely publicized scandal in which a student secretly filmed teachers and supervisors helping students cheat during the national high school graduation examinations in Bắc Giang province, then posted the video online. It became a symbol of systemic corruption in Vietnamese education. </text:p>
      <text:p text:style-name="Text_20_body"><text:span text:style-name="Strong_20_Emphasis">The Bourbaki passage</text:span> is characteristically candid — he is himself a product of the French mathematical tradition that Bourbaki shaped, yet he criticizes the pedagogical experiment without defensivenes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family-generic="roman" style:font-pitch="variable" fo:font-size="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1pt" fo:font-weight="bold" style:font-name-asian="Noto Sans CJK SC" style:font-family-asian="'Noto Sans CJK SC'" style:font-family-generic-asian="system" style:font-pitch-asian="variable" style:font-size-asian="11pt" style:font-weight-asian="bold" style:font-name-complex="Lohit Devanagari1" style:font-family-complex="'Lohit Devanagari'" style:font-family-generic-complex="system" style:font-pitch-complex="variable" style:font-size-complex="11pt" style:font-weight-complex="bold"/>
    </style:style>
    <style:style style:name="Text_20_body" style:display-name="Text body" style:family="paragraph" style:parent-style-name="Standard" style:class="text">
      <style:paragraph-properties fo:margin-top="0in" fo:margin-bottom="0.0972in" style:contextual-spacing="false" fo:line-height="100%" fo:text-align="justify" style:justify-single-word="false" style:snap-to-layout-grid="false"/>
      <style:text-properties fo:font-size="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0.3937in" fo:margin-right="0.3937in" fo:margin-top="0in" fo:margin-bottom="0.1in" style:contextual-spacing="false" fo:text-align="justify" style:justify-single-word="false" fo:text-indent="0in" style:auto-text-indent="false" style:snap-to-layout-grid="false"/>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0.2pt solid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402in" fo:margin-bottom="0.1799in" style:contextual-spacing="false" fo:text-align="center" style:justify-single-word="false"/>
      <style:text-properties fo:color="#000000" loext:opacity="100%" fo:font-size="16pt" fo:font-weight="bold" officeooo:rsid="009bbf1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in" fo:margin-bottom="0.1799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1in" fo:margin-bottom="0.1799in" style:contextual-spacing="false"/>
      <style:text-properties fo:color="#666666" loext:opacity="10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Header" style:family="paragraph" style:parent-style-name="Header_20_and_20_Footer" style:class="extra">
      <style:paragraph-properties text:number-lines="false" text:line-number="0">
        <style:tab-stops>
          <style:tab-stop style:position="2.8839in" style:type="center"/>
          <style:tab-stop style:position="5.7681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4pt" style:font-size-asian="14pt" style:font-size-complex="14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4.2701in" table:align="margins" fo:background-color="transparent">
        <style:background-image/>
      </style:table-properties>
    </style:style>
    <style:style style:name="Table1.A" style:family="table-column">
      <style:table-column-properties style:column-width="0.5in" style:rel-column-width="720*"/>
    </style:style>
    <style:style style:name="Table1.B" style:family="table-column">
      <style:table-column-properties style:column-width="3.2701in" style:rel-column-width="4709*"/>
    </style:style>
    <style:style style:name="Table1.1" style:family="table-row">
      <style:table-row-properties fo:background-color="transparent">
        <style:background-image/>
      </style:table-row-properties>
    </style:style>
    <style:style style:name="Table1.A1" style:family="table-cell">
      <style:table-cell-properties fo:padding="0.0201in" fo:border-left="none" fo:border-right="none" fo:border-top="none" fo:border-bottom="0.05pt solid #999999"/>
    </style:style>
    <style:style style:name="MP1" style:family="paragraph" style:parent-style-name="Header">
      <style:paragraph-properties fo:text-align="start" style:justify-single-word="false"/>
      <style:text-properties fo:color="#000000" loext:opacity="100%" style:font-name="Liberation Serif" fo:font-size="11pt" fo:font-style="normal" fo:font-weight="normal" officeooo:rsid="003e21a1" officeooo:paragraph-rsid="0093c614" style:font-size-asian="11pt" style:font-style-asian="normal" style:font-weight-asian="normal" style:font-size-complex="11pt" style:font-style-complex="normal" style:font-weight-complex="normal"/>
    </style:style>
    <style:style style:name="MP2" style:family="paragraph" style:parent-style-name="Header">
      <style:paragraph-properties fo:text-align="center" style:justify-single-word="false"/>
      <style:text-properties fo:color="#000000" loext:opacity="100%" style:font-name="Liberation Serif" fo:font-size="11pt" fo:font-style="normal" fo:font-weight="normal" officeooo:rsid="01efbf79" officeooo:paragraph-rsid="01efbf79" style:font-size-asian="11pt" style:font-style-asian="normal" style:font-weight-asian="normal" style:font-size-complex="11pt" style:font-style-complex="normal" style:font-weight-complex="normal"/>
    </style:style>
    <style:style style:name="MP3" style:family="paragraph" style:parent-style-name="Header">
      <style:paragraph-properties fo:text-align="end" style:justify-single-word="false"/>
      <style:text-properties fo:color="#000000" loext:opacity="100%" style:font-name="Liberation Serif" fo:font-size="11pt" fo:font-style="normal" fo:font-weight="normal" style:font-size-asian="11pt" style:font-style-asian="normal" style:font-weight-asian="normal" style:font-size-complex="11pt" style:font-style-complex="normal" style:font-weight-complex="normal"/>
    </style:style>
    <style:page-layout style:name="Mpm1">
      <style:page-layout-properties fo:page-width="8.2701in" fo:page-height="11.6902in" style:num-format="1" style:print-orientation="portrait" fo:margin-top="1in" fo:margin-bottom="1in" fo:margin-left="2in" fo:margin-right="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701in" fo:page-height="11.6902in" style:num-format="1" style:print-orientation="portrait" fo:margin-top="1in" fo:margin-bottom="1in" fo:margin-left="2in" fo:margin-right="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1" table:style-name="Table1">
          <table:table-column table:style-name="Table1.A"/>
          <table:table-column table:style-name="Table1.B"/>
          <table:table-column table:style-name="Table1.A"/>
          <table:table-row table:style-name="Table1.1">
            <table:table-cell table:style-name="Table1.A1" office:value-type="string">
              <text:p text:style-name="MP1"><text:page-number text:select-page="current">9</text:page-number></text:p>
            </table:table-cell>
            <table:table-cell table:style-name="Table1.A1" office:value-type="string">
              <text:p text:style-name="MP2">How Should One Learn?</text:p>
            </table:table-cell>
            <table:table-cell table:style-name="Table1.A1" office:value-type="string">
              <text:p text:style-name="MP3"/>
            </table:table-cell>
          </table:table-row>
        </table:table>
      </style:header>
      <style:header-first>
        <text:p text:style-name="Header"/>
      </style:header-first>
    </style:master-page>
    <style:master-page style:name="Last_20_Page" style:display-name="Last Page" style:page-layout-name="Mpm2" draw:style-name="Mdp1" style:next-style-name="Standard"/>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21T21:53:08.343593437</meta:creation-date>
    <dc:date>2026-07-05T19:03:47.751259876</dc:date>
    <meta:editing-duration>PT13H1M35S</meta:editing-duration>
    <meta:editing-cycles>455</meta:editing-cycles>
    <meta:generator>LibreOffice/7.3.7.2$Linux_X86_64 LibreOffice_project/30$Build-2</meta:generator>
    <meta:document-statistic meta:table-count="1" meta:image-count="0" meta:object-count="0" meta:page-count="25" meta:paragraph-count="165" meta:word-count="14058" meta:character-count="72159" meta:non-whitespace-character-count="58209"/>
  </office:meta>
</office:document-meta>
</file>