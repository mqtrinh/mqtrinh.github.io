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P2" style:family="paragraph" style:parent-style-name="Header">
      <style:paragraph-properties fo:text-align="center" style:justify-single-word="false"/>
      <style:text-properties fo:color="#000000" loext:opacity="100%" style:font-name="Liberation Serif" fo:font-size="11pt" fo:font-style="normal" fo:font-weight="normal" officeooo:rsid="01391a94" officeooo:paragraph-rsid="01391a94" style:font-size-asian="11pt" style:font-style-asian="normal" style:font-weight-asian="normal" style:font-size-complex="11pt" style:font-style-complex="normal" style:font-weight-complex="normal"/>
    </style:style>
    <style:style style:name="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Footnote">
      <style:text-properties officeooo:rsid="01485041" officeooo:paragraph-rsid="01485041"/>
    </style:style>
    <style:style style:name="P5" style:family="paragraph" style:parent-style-name="Footnote">
      <style:text-properties officeooo:rsid="015e1ea2" officeooo:paragraph-rsid="015e1ea2"/>
    </style:style>
    <style:style style:name="P6" style:family="paragraph" style:parent-style-name="Subtitle">
      <style:text-properties officeooo:paragraph-rsid="0153f6b6"/>
    </style:style>
    <style:style style:name="P7" style:family="paragraph" style:parent-style-name="Subtitle">
      <style:text-properties officeooo:paragraph-rsid="015168a3"/>
    </style:style>
    <style:style style:name="P8" style:family="paragraph" style:parent-style-name="Text_20_body">
      <style:text-properties officeooo:paragraph-rsid="015168a3"/>
    </style:style>
    <style:style style:name="P9" style:family="paragraph" style:parent-style-name="Title">
      <style:text-properties officeooo:paragraph-rsid="015168a3"/>
    </style:style>
    <style:style style:name="P10" style:family="paragraph" style:parent-style-name="Text_20_body">
      <style:text-properties officeooo:paragraph-rsid="012f9c72"/>
    </style:style>
    <style:style style:name="P11" style:family="paragraph" style:parent-style-name="Text_20_body">
      <style:paragraph-properties fo:text-align="center" style:justify-single-word="false"/>
      <style:text-properties fo:font-style="italic" officeooo:rsid="015c9c83" officeooo:paragraph-rsid="015c9c83" style:font-style-asian="italic" style:font-style-complex="italic"/>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text-properties officeooo:paragraph-rsid="013840d9"/>
    </style:style>
    <style:style style:name="P14" style:family="paragraph" style:parent-style-name="Text_20_body">
      <style:text-properties officeooo:paragraph-rsid="01398fa7"/>
    </style:style>
    <style:style style:name="P15" style:family="paragraph" style:parent-style-name="Text_20_body">
      <style:paragraph-properties fo:text-align="center" style:justify-single-word="false"/>
      <style:text-properties officeooo:rsid="013a8899" officeooo:paragraph-rsid="013a8899"/>
    </style:style>
    <style:style style:name="P16" style:family="paragraph" style:parent-style-name="Text_20_body">
      <style:paragraph-properties fo:text-align="center" style:justify-single-word="false"/>
      <style:text-properties officeooo:rsid="0136cd54" officeooo:paragraph-rsid="0136cd54"/>
    </style:style>
    <style:style style:name="P17" style:family="paragraph" style:parent-style-name="Text_20_body">
      <style:text-properties officeooo:paragraph-rsid="01415a4c"/>
    </style:style>
    <style:style style:name="P18" style:family="paragraph" style:parent-style-name="Text_20_body">
      <style:paragraph-properties fo:text-align="center" style:justify-single-word="false"/>
      <style:text-properties officeooo:rsid="015c9c83" officeooo:paragraph-rsid="015c9c83"/>
    </style:style>
    <style:style style:name="P19" style:family="paragraph" style:parent-style-name="Text_20_body">
      <style:text-properties officeooo:paragraph-rsid="01735318"/>
    </style:style>
    <style:style style:name="P20" style:family="paragraph" style:parent-style-name="Text_20_body">
      <style:text-properties officeooo:paragraph-rsid="01871f5a"/>
    </style:style>
    <style:style style:name="P21" style:family="paragraph" style:parent-style-name="Quotations">
      <style:paragraph-properties fo:text-align="start" style:justify-single-word="false"/>
    </style:style>
    <style:style style:name="P22" style:family="paragraph" style:parent-style-name="Text_20_body">
      <style:paragraph-properties fo:text-align="start" style:justify-single-word="false"/>
    </style:style>
    <style:style style:name="P23" style:family="paragraph" style:parent-style-name="Heading_20_1">
      <style:paragraph-properties fo:text-align="center" style:justify-single-word="false"/>
    </style:style>
    <style:style style:name="P24" style:family="paragraph" style:parent-style-name="Text_20_body" style:list-style-name="L1">
      <style:text-properties officeooo:paragraph-rsid="01415a4c"/>
    </style:style>
    <style:style style:name="T1" style:family="text">
      <style:text-properties fo:font-style="italic" style:font-style-asian="italic" style:font-style-complex="italic"/>
    </style:style>
    <style:style style:name="T2" style:family="text">
      <style:text-properties fo:font-style="italic" officeooo:rsid="013bfe0f" style:font-style-asian="italic" style:font-style-complex="italic"/>
    </style:style>
    <style:style style:name="T3" style:family="text">
      <style:text-properties fo:font-style="italic" officeooo:rsid="0153f6b6" style:font-style-asian="italic" style:font-style-complex="italic"/>
    </style:style>
    <style:style style:name="T4" style:family="text">
      <style:text-properties fo:font-style="italic" officeooo:rsid="01577485" style:font-style-asian="italic" style:font-style-complex="italic"/>
    </style:style>
    <style:style style:name="T5" style:family="text">
      <style:text-properties fo:font-style="italic" officeooo:rsid="0158e3a4" style:font-style-asian="italic" style:font-style-complex="italic"/>
    </style:style>
    <style:style style:name="T6" style:family="text">
      <style:text-properties fo:font-style="italic" officeooo:rsid="0163a4cd" style:font-style-asian="italic" style:font-style-complex="italic"/>
    </style:style>
    <style:style style:name="T7" style:family="text">
      <style:text-properties fo:font-style="italic" officeooo:rsid="01871f5a" style:font-style-asian="italic" style:font-style-complex="italic"/>
    </style:style>
    <style:style style:name="T8" style:family="text">
      <style:text-properties fo:font-style="italic" officeooo:rsid="01485041" style:font-style-asian="italic" style:font-style-complex="italic"/>
    </style:style>
    <style:style style:name="T9" style:family="text">
      <style:text-properties officeooo:rsid="013dae7e"/>
    </style:style>
    <style:style style:name="T10" style:family="text">
      <style:text-properties officeooo:rsid="01432a59"/>
    </style:style>
    <style:style style:name="T11" style:family="text">
      <style:text-properties officeooo:rsid="01451e95"/>
    </style:style>
    <style:style style:name="T12" style:family="text">
      <style:text-properties officeooo:rsid="0146d95b"/>
    </style:style>
    <style:style style:name="T13" style:family="text">
      <style:text-properties officeooo:rsid="01485041"/>
    </style:style>
    <style:style style:name="T14" style:family="text">
      <style:text-properties officeooo:rsid="014a6080"/>
    </style:style>
    <style:style style:name="T15" style:family="text">
      <style:text-properties officeooo:rsid="014a70fa"/>
    </style:style>
    <style:style style:name="T16" style:family="text">
      <style:text-properties officeooo:rsid="014fb677"/>
    </style:style>
    <style:style style:name="T17" style:family="text">
      <style:text-properties officeooo:rsid="015de7d8"/>
    </style:style>
    <style:style style:name="T18" style:family="text">
      <style:text-properties officeooo:rsid="016c9be2"/>
    </style:style>
    <style:style style:name="T19" style:family="text">
      <style:text-properties officeooo:rsid="016eaa30"/>
    </style:style>
    <style:style style:name="T20" style:family="text">
      <style:text-properties officeooo:rsid="016f5796"/>
    </style:style>
    <style:style style:name="T21" style:family="text">
      <style:text-properties officeooo:rsid="017ca18f"/>
    </style:style>
    <style:style style:name="T22" style:family="text">
      <style:text-properties officeooo:rsid="01871f5a"/>
    </style:style>
    <style:style style:name="T23" style:family="text">
      <style:text-properties officeooo:rsid="01426698"/>
    </style:style>
    <style:style style:name="T24" style:family="text">
      <style:text-properties officeooo:rsid="01a29514"/>
    </style:style>
    <style:style style:name="T25" style:family="text">
      <style:text-properties officeooo:rsid="01a556b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n Being Moved</text:p>
      <text:p text:style-name="P6">Châu Ngô</text:p>
      <text:p text:style-name="Text_20_body"/>
      <text:p text:style-name="P16"><text:span text:style-name="T4">Translat</text:span><text:span text:style-name="T5">e</text:span><text:span text:style-name="T4">d b</text:span><text:span text:style-name="T1">y Claude Sonnet 4.6</text:span></text:p>
      <text:p text:style-name="P15"><text:span text:style-name="T4">E</text:span><text:span text:style-name="T1">dited by </text:span><text:span text:style-name="T2">Minh-Tâ</text:span><text:span text:style-name="T3">m Quang Trinh</text:span></text:p>
      <text:p text:style-name="P10"/>
      <text:h text:style-name="Heading_20_1" text:outline-level="1">1.</text:h>
      <text:p text:style-name="P13">I’ve been having trouble sleeping lately. My mind is tired, unable to settle on anything worth doing, and keeps getting swept up in trivial controversies. So — fight<text:span text:style-name="T9">ing</text:span> fire with fire — I’ve been weighing in on a few scattered debates about paintings and fakes. I enjoy looking at art and have my own views on what is beautiful and what is not, but I'm not an artist and have no formal training in aesthetics. Friends on my list who disagree are more than welcome to leave a comment and set me straight. </text:p>
      <text:p text:style-name="P13">First: <text:span text:style-name="T25">W</text:span>hether a work is good or bad has nothing to do with <text:span text:style-name="T9">post-</text:span>modernism or <text:span text:style-name="T9">traditionalism</text:span>.<text:note text:id="ftn1" text:note-class="footnote"><text:note-citation>1</text:note-citation><text:note-body><text:p text:style-name="P5">Claude translated <text:span text:style-name="T1">tân cổ điển</text:span> more literally, as <text:span text:style-name="T1">neoclassicism</text:span>.</text:p></text:note-body></text:note> That kind of thinking belongs to writers who strain to invoke deconstruction or postcolonialism to sound elevated. It’s like a village banquet: <text:span text:style-name="T12">T</text:span>he elders at the top table eat and grumble and pick their teeth — they’re the postmodernists — while the <text:span text:style-name="T11">traditionali</text:span>sts at the bottom table just wash the dishes. In truth, the moment one tries too hard to express something in a particular way — with the brush or the pen — in order to be sophisticated, one has already killed whatever is delicate in art.</text:p>
      <text:p text:style-name="P13">I enjoy visiting the graduation exhibitions of fine arts students. In those early works there is often something fresh, and a pain that cannot yet find its way into words. It hasn’t found its way out because most young artists are still trying to fit themselves into the academic mold — getting the composition right, getting the color harmonies correct.</text:p>
      <text:p text:style-name="P13">Even established artists, many of them celebrated, fall into the same trap of trying too hard. Trying to be surreal. Trying to be postmodern. Trying to be Bacon. Trying to be Basquiat. Trying to be beautiful.</text:p>
      <text:p text:style-name="P19">The difference between beauty and goodness is that beauty cannot be forced. A true experience of beauty can only happen once, or many times, but never the same way twice. One can only create the conditions in which the experience of beauty may or may not occur; one cannot will it into being. Just because a certain work has moved us before, we cannot keep following the same formula trying to program the feeling into happening again.</text:p>
      <text:p text:style-name="P13"><text:soft-page-break/><text:s/>It is a little like the sweetness of meditation: when our mind is clear on a fresh morning, our soul can be moved deeply by the simple sound of a bird singing. The next day or the day after we might be moved again — by the sound of wind stirring leaves — but that is something that may happen; we cannot make it happen through an act of will. Because every stirring is always a new stirring.</text:p>
      <text:p text:style-name="P13">John Lennon wrote about this better than I can in “In My Life”:</text:p>
      <text:p text:style-name="P21">And these memories lose their meaning<text:line-break/>When I think of love as something new</text:p>
      <text:h text:style-name="P23" text:outline-level="1">2.</text:h>
      <text:p text:style-name="P14">Some time ago, Danh Anh invited me to dinner at his home. Danh Anh is a serious collector from a family with a long tradition of dealing in antiques on Hàng Bông Street. I was very eager, having heard a great deal about his collection of paintings. According to street legend, Danh Anh’s collection traces its origins to the famous collection of Đức Minh. Đức Minh’s son, pressed for money, sold his father’s paintings to Danh Anh by literally throwing them out the window — in the literal sense — while Danh Anh waited on a cyclo below to carry them home. Danh Anh confirmed purchasing works from the Đức Minh collection, but did not confirm the part about the window.</text:p>
      <text:p text:style-name="P14">The dinner was held in a very large apartment in the middle of Hàng Bông Street. It is hard to imagine that spaces so wide could exist inside the old quarter. But there were no windows. Sitting there listening to Danh Anh recount the life-and-death dramas of the art and antiques trade, I felt as though I were sitting in a tiger’s den, listening to the tiger tell stories.</text:p>
      <text:p text:style-name="P14">In the living room hung three or four paintings attributed to Nguyễn Gia Trí. The brushwork was quick and deft, consistent with Gia Trí’s hand, but all three or four lacquer pieces looked brand new, quite unlike the lacquer works of Gia Trí’s I had seen before. Although Gia Trí was a prosperous painter, the lacquer materials available in his time were of poor quality, and most of his works have faded with age. The pieces on Danh Anh’s wall showed no trace of the patina of time. My suspicion had some basis in the ill-natured rumors that circulated about Danh Anh’s dealings. Naturally, all I said was that he had kept his Gia Trí paintings in remarkable condition.</text:p>
      <text:p text:style-name="P20">After dinner and conversation, Danh Anh led the group of guests into another room. This one was even larger, also windowless, and contained no furniture at all, only paintings, covering every surface, hung or leaned against the walls without any particular arrangement. There was a large work by Nguyễn Tiến Chung depicting three or four militia members, very beautiful.<text:note text:id="ftn2" text:note-class="footnote"><text:note-citation>2</text:note-citation><text:note-body><text:p text:style-name="P4"><text:a xlink:type="simple" xlink:href="https://www.hanoiarttours.com/nguyen-tien-chungs-biography/" text:style-name="Internet_20_link" text:visited-style-name="Visited_20_Internet_20_Link">https://www.hanoiarttours.com/nguyen-tien-chungs-biography/</text:a></text:p></text:note-body></text:note> In a corner near the entrance stood a Nguyễn Sáng <text:span text:style-name="T22">[</text:span><text:span text:style-name="T7">r</text:span><text:span text:style-name="T8">ecte </text:span><text:span text:style-name="T13">Trần Văn Cẩn</text:span><text:span text:style-name="T22">] </text:span>portrait, <text:span text:style-name="T24">Em</text:span> Thúy.<text:note text:id="ftn3" text:note-class="footnote"><text:note-citation>3</text:note-citation><text:note-body><text:p text:style-name="P4"><text:a xlink:type="simple" xlink:href="https://vi.wikipedia.org/wiki/Em_Thúy" text:style-name="Internet_20_link" text:visited-style-name="Visited_20_Internet_20_Link">https://vi.wikipedia.org/wiki/Em_Th%C3%BAy</text:a></text:p></text:note-body></text:note> But <text:soft-page-break/>the painting that moved me most was a work by Bùi Xuân Phái: a young man with a handsome, deeply sorrowful face.<text:note text:id="ftn4" text:note-class="footnote"><text:note-citation>4</text:note-citation><text:note-body><text:p text:style-name="Footnote"><text:a xlink:type="simple" xlink:href="https://jeanfrancoishubert.com/en/2025/06/26/bui-xuan-phai-portrait-of-my-son-bui-ky-anh-1979-or-a-secular-requiem/" text:style-name="Internet_20_link" text:visited-style-name="Visited_20_Internet_20_Link">https://jeanfrancoishubert.com/en/2025/06/26/bui-xuan-phai-portrait-of-my-son-bui-ky-anh-1979-or-a-secular-requiem/</text:a></text:p></text:note-body></text:note> Danh Anh said it was Phái’s portrait of his own son. Looking at it carefully, one could feel the profound love the painter held for his subject.</text:p>
      <text:p text:style-name="P14">I only learned later the story of Phái’s son: he had served in the army, and after being demobilized was struck by a truck right in front of their home. Some say this was not an accident but post-war depression. All of it is street hearsay, but I believe the young man in that painting is indeed that son.</text:p>
      <text:p text:style-name="P14">Not every painting springs from a great internal tragedy, from that depth of torment. But if a work does not arise from some vibration within the artist’s soul, it cannot produce a stirring in the viewer. A forged painting, a copy, a commissioned piece: <text:span text:style-name="T18">T</text:span>hese reflect no one’s inner trembling.</text:p>
      <text:p text:style-name="P14">They are like a lie. A lie, however eloquently and skillfully told, cannot produce what the French call a <text:span text:style-name="T1">mouvement d’âme</text:span> — a movement of the soul. Unless one deliberately chooses to believe the lie for some other reason. And when one places one’s trust in a lie, one should not expect things to end well. The ending is usually pain and humiliation: <text:span text:style-name="T19">n</text:span>ot necessarily the material loss of being deceived, but the shame of it, the feeling of violation, almost like a bodily intrusion. Hanging a fake in one’s home as decoration is harmless enough. But one should not let oneself be moved by a forgery.</text:p>
      <text:p text:style-name="P14">That was the last time I saw Danh Anh. A few years later I heard he had died suddenly. I don’t know what became of his collection. I hope that one day his family will have a small museum, so that I might have occasion to encounter Phái’s son again.</text:p>
      <text:h text:style-name="P23" text:outline-level="1">3.</text:h>
      <text:p text:style-name="P14">There has been some response — from people I know and people I don’t — to the two pieces on being moved that I have posted. Some liked them, some offered praise, and some reproached me for not understanding anything about art. That I acknowledged from the start. On the whole I feel glad about these civil exchanges — debate grounded in reason and respect, not belligerence as a method.</text:p>
      <text:p text:style-name="P14">Someone raised the question of authority: who has the authority to define art? I think anyone has the right to reflect on the most fundamental questions — such as beauty — but no one has the authority to impose their thinking on others. To question someone’s right to reflect at all is surely already a mistake. Socrates taught us two things: first, that the premise of thought is acknowledging we know nothing; second, that we accept only reasoning, not authority. </text:p>
      <text:p text:style-name="P14">Whether reflection is necessary at all is also worth discussing. Everyone knows what a cat is — one glance and the recognition is instant — but defining a cat turns out to be a difficult matter. Deng <text:soft-page-break/>Xiaoping said there was no need to define the cat, as long as it caught mice. Defining a cat may in fact be harder than defining art.</text:p>
      <text:p text:style-name="P14">Krishnamurti wrote extensively about this in the Buddhist philosophical tradition. We should let the world, let life, come to us — accept it as it is — rather than straining to interpret and explain it. Because the effort of thinking obstructs the process of living, which is to say, living each moment of life fully as it arrives.</text:p>
      <text:p text:style-name="P14">Yet according to that other idealist authority, Monsieur Descartes, we should still think and still interpret. Because the external world cannot be proven to exist — that is Descartes’ great doubt — and the only thing we can know with certainty to exist is the emotion that the external world produces in us. That is the stirring. And so we should reflect on the stirring, because for Descartes it is the most eloquent proof of existence: <text:span text:style-name="T21">I</text:span>n a certain sense, it is life itself.</text:p>
      <text:p text:style-name="P14">Being a devotee of Socrates and Descartes, and afflicted with the occupational hazard of the mathematician, I have the unfortunate habit of reducing everything to formulas. Reducing things to formulas always comes out a little naïve; I always use the word naïve in a positive sense, <text:span text:style-name="T14">because</text:span> Socrates was the greatest naïve<text:span text:style-name="T15">ly sincere</text:span> philosopher of all.</text:p>
      <text:p text:style-name="P14">For me, art is a process that begins with the emotion of the artist and, through the making of a work, produces emotion in others. Of course emotion is not the whole story: <text:span text:style-name="T20">W</text:span>ithout the work itself, the artist’s emotion has nowhere to travel. To transmit the wave, sometimes to amplify it, sometimes to compose it into a full symphony of emotion: that is the difficult and magnificent part of what an artist does.</text:p>
      <text:p text:style-name="P14">Works of propaganda or advertising are not art, however painstaking their execution, even if they sometimes produce directed emotions in an audience. They do not arise from the artist’s personal feeling but from a political or commercial intention.</text:p>
      <text:p text:style-name="P14">To close this series on being moved, I will share a few personal experiences of encountering art. Some I can interpret — in my usual naïve, formula-driven way — and some I cannot explain at all.</text:p>
      <text:list xml:id="list2229075456" text:style-name="L1">
        <text:list-item>
          <text:p text:style-name="P24">The rare occasion when art produced an emotion so overwhelming that my eyes filled with tears was a visit to the ruins of Ajanta on the western coast of India. These are enormous frescoes painted inside caves, depicting scenes from the life of the Buddha. Truly, I cannot explain what moved me so deeply. Even now, I still want to find a painter to paint the life of the Buddha on the walls of my home, in the style of Ajanta.</text:p>
        </text:list-item>
        <text:list-item>
          <text:p text:style-name="P24">Fra Angelico’s <text:span text:style-name="T1">Annunciation</text:span> gave me a sensation of boundless happiness. This is an early Renaissance work, with the common religious theme of the Good News. I felt that this painting was announcing some good news, though nearly twenty years on, I still haven’t worked out what the news is.</text:p>
        </text:list-item>
        <text:list-item>
          <text:p text:style-name="P24"><text:soft-page-break/>Rothko’s large canvases of two color fields produce an effect on the psyche that is almost religious. The last time I sat in silence for nearly twenty minutes before two Rothko paintings in the Smithsonian, I lost track of everything around me. In his early period Rothko worked in many different styles, but later he painted only these two-tone compositions that faintly resemble window frames. And he said his only concern was with the way painting could generate emotion.</text:p>
          <text:p text:style-name="P24">Once I managed to photograph a sunset sinking to the horizon through an airplane window. The result was a realistic photograph that somehow strongly resembled one of Rothko’s abstract compositions. Human beings are very easily moved by a sunset. Perhaps it is a feeling of harmony between the human condition and the universe.</text:p>
        </text:list-item>
        <text:list-item>
          <text:p text:style-name="P24">At the home of Chị Thi there is a very small painting by Anh Vũ. The painting shows only a glass jar with a label that reads <text:span text:style-name="T1">Jus de pluie</text:span> — <text:span text:style-name="T6">P</text:span><text:span text:style-name="T1">ressed rain</text:span>. Both my daughter and I were moved by Anh Vũ’s jar of pressed rain. I'm not sure what she felt, but for me, rain is synonymous with the memories of childhood.</text:p>
          <text:p text:style-name="P24">To have a jar in which to carefully preserve those memories, and to drink from it when thirsty on the long road of life — what a fine thing that would be.</text:p>
        </text:list-item>
      </text:list>
      <text:p text:style-name="P17"/>
      <text:p text:style-name="P9">Về sự xao xuyến</text:p>
      <text:p text:style-name="P7">Ngô Bảo Châu</text:p>
      <text:p text:style-name="P8"/>
      <text:p text:style-name="P11"><text:span text:style-name="T17">Text u</text:span>nedited</text:p>
      <text:p text:style-name="P18"/>
      <text:h text:style-name="Heading_20_1" text:outline-level="1">1. 12/29/25</text:h>
      <text:p text:style-name="P8">Đợt này tôi hay bị mất ngủ. Đầu óc mệt mỏi không tập trung vào được cái gì để làm cho ra hồn mà lại hay bị cuốn theo những chuyện thị phi. Vậy thì lấy độc trị độc, tôi cũng góp chuyện cho mấy cuộc tranh luận linh tinh về tranh pháo. Tôi thích xem tranh, có chủ kiến của mình về chuyện xấu đẹp, nhưng không phải là nghệ sĩ cũng không được học hành gì về mỹ học. Các anh chị trong friend list không đồng ý xin cứ thoải mái comment mắng mỏ.</text:p>
      <text:p text:style-name="P8">Thứ nhất chuyện tranh hay dở không liên quan gi đến hậu hiện đại hay tân cổ điển. Đấy là cách suy nghĩ của mấy ông bà nhà văn cứ cố gồng mình lên để giải cấu trúc hay hậu thuộc địa cho nó sang. Đấy cũng giống như ăn cỗ trong làng, mâm trên là mâm các cụ hậu hiện <text:soft-page-break/>đại vừa ăn vừa chửi vừa xỉa răng, mâm dưới là mâm bọn tân cổ điển chỉ biết rửa bát. Thực ra cứ cố phải diễn đạt bằng bút hay bằng cây cọ như thế nào cho sang là đã giết cái tinh tế của nghệ thuật.</text:p>
      <text:p text:style-name="P8">Tôi thích đi xem triển lãm tác phẩm tốt nghiệp của sinh viên mỹ thuật. Ở các tác phẩm đầu đời hay có cái gì đó tươi tắn, và có sự đau đớn không thoát ra được thành lời. Nó chưa thoát ra được vì đa số các nghệ sĩ trẻ còn cố gò mình vào cái khuôn hàn lâm, bố cục, hoà sắc thế nào cho chuẩn.</text:p>
      <text:p text:style-name="P8">Ngay cả các nghệ sĩ đã cứng tuổi, nhiều người đã thành danh, cũng bị lâm vào cái cảnh cố quá như thế. Cố cho siêu thực, cố cho hậu hiện đại, cố cho nó Bacon, cố cho nó Basquiat. Cố cho nó đẹp.</text:p>
      <text:p text:style-name="P8">Cái đẹp khác với cái tốt ở chỗ là không cố được. Sự cảm thụ về cái đẹp thực sự chỉ có thể xảy ra một lần, hoặc nhiều lần nhưng không lần nào giống lần nào. Chỉ có thể tạo ra hoàn cảnh để sự cảm thụ về cái đẹp xảy ra, hoặc không, chứ không cố được. Không thể vì tác phẩm này đã làm ta xao xuyến mà cứ cố theo cái công thức đấy để lập trình cho sự xao xuyến.</text:p>
      <text:p text:style-name="Text_20_body">Nó hơi giống như vị ngọt của thiền: khi đầu óc ta trong sáng trong một buổi sáng trong lành, tâm hồn ta rung động sâu sắc chỉ vì một tiếng chim hót. Ngày mai ngày kia ta có thể lại rung động vì tiếng gió làm rì rào lá, nhưng cái đó nó co thể xảy ra chứ ta không thể làm cho nó xảy ra bằng ý chí. Vì mỗi rung động luôn là rung động mới.</text:p>
      <text:p text:style-name="Text_20_body">John Lennon viết về chuyện này hay hơn trong bài hát In my life</text:p>
      <text:p text:style-name="P22">And these memories lose their meaning<text:line-break/>When I think of love as something new ooh ooh ooh</text:p>
      <text:h text:style-name="Heading_20_1" text:outline-level="1">2. 12/31/25</text:h>
      <text:p text:style-name="P8">Cũng lâu lâu rồi, có một lần ông Danh Anh mời tôi đến nhà ăn tối. Danh Anh là một nhà sưu tầm cộm cán, trong một gia đình có truyền thống buôn đồ cổ ở phố Hàng Bông. Tôi rất háo hức vì đã nghe nhiều bộ sưu tầm tranh của ông. Theo huyền thoại phố phường, bộ sưu tầm của Danh Anh có nguồn gốc từ bộ sưu tầm nổi tiếng của Đức Minh. Con trai ông Đức Minh túng tiền bán tranh của bố cho Danh Anh theo hình thức ném tranh qua cửa sổ theo nghĩa đen, Danh Anh ngồi sẵn trên xích lô chở tranh về nhà. Ông Danh Anh xác nhận việc mua tranh từ bộ sưu tầm Đức Minh, nhưng không xác nhận việc mua qua cửa sổ.</text:p>
      <text:p text:style-name="P8">Nơi tôi đến ăn tối là một căn hộ rất rộng ở ngày giữa phố Hàng Bông. Khó tưởng tượng trong phố cổ lại có những cái phòng rộng như thế. Nhưng không có cửa sổ. Nghe Danh Anh kể chuyện sinh tử trong thương trường tranh pháo đồ cổ mà có cảm tưởng mình ngồi trong hang hổ, nghe hổ kể chuyện. </text:p>
      <text:p text:style-name="P8">Trong phòng khách có treo ba bốn bức tranh của Nguyễn Gia Trí. Nét vẽ rất nhanh và khéo, giống bút pháp của Gia Trí, nhưng cả ba bốn bức sơn mài đều mới coong khác với những bức sơn mài của Gia Trí mà tôi được xem trước đó. Tuy Gia Trí là hoạ sĩ giàu, nhưng vào thời <text:soft-page-break/>của ông chất liệu sơn mài không được tốt, đa số các tác phẩm của ông đều bạc màu. Mấy bức treo trong phòng khách của Danh Anh thì không thấy bóng dáng của màu thời gian. Sự nghi ngờ của tôi phần nào có lý do từ những lời đồn đại ác ý về việc buôn tranh của ông Danh Anh. Tất nhiên tôi chỉ nói anh giữ được tranh Gia Trí tốt quá.</text:p>
      <text:p text:style-name="P8">Anh em ăn uống chém xong, Danh Anh dẫn cả đoàn khách sang một phòng khác. Phòng này còn rộng hơn, cũng không có cửa sổ, và không có đồ đạc gì mà toàn tranh là tranh. Tranh cũng không được bầy biện gì cả mà chỉ để cạnh nhau, treo hoặc dựa vào tường. Có một bức tranh kích thước lớn của Nguyễn Tiến Chung vẽ ba bốn anh chị dân quân rất đẹp. Ở góc tường, cạnh cửa vào có một bức Nguyễn Sáng vẽ em Thuý. Nhưng bức tranh làm cho tôi xúc động nhất là một bức tranh của Bùi Xuân Phái vẽ một người đàn ông trẻ với gương mặt đẹp nhưng rất buồn. Ông Danh Anh nói đây là ông Phái vẽ con trai ông ấy. Ngắm kỹ bức tranh ta có thể cảm nhận được tình yêu sâu sắc của người hoạ sĩ dành cho nhân vật của mình.</text:p>
      <text:p text:style-name="P8">Sau này tôi mới biết chuyện ông Phái có một người con trai đi bộ đội, sau khi giải ngũ thì bị tai nạn giao thông, bị xe tải chẹt ngay trước cửa nhà. Có người nói rằng đây không phải là tai nạn mà là bệnh trầm cảm hậu chiến tranh. Toàn chuyện giang hồ đồn đại nhưng tôi tin rằng nhân vật của bức tranh chính là người con trai đó của ông Phái.</text:p>
      <text:p text:style-name="P8">Không phải bức tranh nào cũng xuất phát từ bi kịch nội tâm lớn, day dứt đến như thế. Nhưng nếu không xuất phát từ một dao động trong tâm hồn của người nghệ sĩ thì tác phẩm không thể tạo ra sự xao xuyến trong lòng người xem. Một bức tranh giả, tranh sao chép, được thực hiện theo đặt hàng nên không phản ánh dao động tâm hồn của ai cả. </text:p>
      <text:p text:style-name="P8">Nó như một lời nói dối. Lời nói dối, dù nói hay và khéo đến đâu, cũng không tạo ra cái tạo ra được trong lòng ta cái trong tiếng Pháp gọi là mouvement d'âme. Trừ khi ta cố tình muốn tin vào lời nói dối vì một lý do gì khác. Khi đặt lòng tin vào lời nói dối thì không nên chờ đợi một kết cục gì tốt đẹp. Kết cục thường là đau đớn, bẽ bàng. Cái đau đớn không nhất thiết là do sự mất mát vật chất do bị lừa, mà là do cảm giác bẽ bàng, thậm chí ô uế như khi bị xâm phạm thân thể. Treo tranh giả trong nhà để trang trí cũng không làm sao. Nhưng không nên xao xuyến vì những bức tranh giả. </text:p>
      <text:p text:style-name="P8">Đây là lần cuối tôi gặp ông Danh Anh. Sau đó mấy năm nghe nói ông mất đột ngột. Không rõ bộ sựu tập của ông đi về đâu. Hy vọng đến một ngày nào đó, gia đình ông có cái bảo tàng nhỏ để thỉnh thoảng tôi có dịp gặp lại người con trai của ông Phái.</text:p>
      <text:h text:style-name="Heading_20_1" text:outline-level="1">3. 1/2/26</text:h>
      <text:p text:style-name="P8">Có một chút phản ứng từ những người tôi quen và không quen về hai bài xao xuyến đã đăng. Có người thích, có người khen và cũng có người chê tôi không hiểu gì về nghệ thuật. Điều đó thì tôi đã nhận ngay từ đầu. Cơ bản tôi cảm thấy vui về những phản hồi văn minh <text:soft-page-break/>này, tranh luận trên cơ sở của lý trí và sự tôn trọng chứ không lấy hung hăng làm phương pháp.</text:p>
      <text:p text:style-name="P8">Có người đặt vấn đề về thẩm quyền: Ai có thẩm quyền định nghĩa nghệ thuật. Tôi nghĩ rằng ai cũng có quyền suy tư về những vấn đề cốt lõi nhất như cái đẹp, nhưng không ai co thẩm quyền áp đặt suy nghĩ của mình lên người khác. Đặt vấn đề thẩm quyền suy tư thì chắc sai rồi. Socrates đã dạy chúng ta hai điều. Một là tiền đề của suy tư là công nhận ta không biết gì. Hai là chỉ chấp nhận lý lẽ chứ không chấp nhận thẩm quyền.</text:p>
      <text:p text:style-name="P8">Có cần suy tư hay không thì cũng là chuyện phải bàn. Ai cũng biết con mèo là gì, nhìn phát nhận ra ngay, nhưng định nghĩa con mèo lại là chuyện gian nan. Cụ Đặng bảo chẳng cần định nghĩa con mèo làm gì, miễn là nó bắt chuột. Định nghĩa con mèo có khi còn khó hơn định nghĩa nghệ thuật.</text:p>
      <text:p text:style-name="P8">Krishnamurthy nói nhiều về chuyện này theo truyền thống lý luận phật giáo. Chúng ta hãy để thế giới, để cuộc đời đến với ta, chấp nhận nó như “nó là”, chứ không nên cố suy tư diễn giải về nó. Vì nỗ lực tư duy cản trở quá trình sống tức là sống trọn vẹn khoảnh khắc cuộc sống đến với ta.</text:p>
      <text:p text:style-name="P8">Nhưng theo thẩm quyền duy tâm khác là thầy Descartes thì chúng ta vẫn nên tư duy nên diễn giải. Vì thế giới bên ngoài chưa chắc đã tồn tại, đó là cái nghi ngờ vĩ đại của Descartes, cái duy nhất ta biết chắc tồn tại chính là cảm xúc do cái bên ngoài tác động lên ta. Đó là sự xao xuyến. Cho nên ta vẫn nên suy tư về sự xao xuyến vì đối với Descartes, đó là chứng minh hùng hồn cho sự tồn tại, theo một nghĩa nào đó, đây là cuộc sống.</text:p>
      <text:p text:style-name="P8">Là tín đố của Socrates và Descartes, lại vướng bệnh nghề nghiệp là nhà toán học, nên tôi có thói quen không tốt là công thức hoá mọi thứ. Công thức hoá thì bao giờ cũng hơi ngô nghê, tôi luôn dùng chữ ngô nghê với nghĩa tốt vì Socrates là nhà triết học ngô nghê vĩ đại nhất.</text:p>
      <text:p text:style-name="P8">Đối với tôi, nghệ thuật là quá trình xuất phát từ cảm xúc của người nghệ sĩ, thông qua kiến tạo tác phẩm mà gây ra cảm xúc ở người khác. Tất nhiên cảm xúc không phải là toàn bộ câu chuyện, vì dĩ nhiên nếu không có tác phẩm thì cảm xúc của người nghệ sĩ không truyền đi đâu được. Truyền sóng, đôi khi khuếch đại sóng, hoặc tạo thành một bản giao hưởng cảm xúc, đó là phần khó khăn và vĩ đại trong công việc của người nghệ sĩ.</text:p>
      <text:p text:style-name="P8">Các tác phẩm mang tính tuyên truyền, quảng cáo không phải là nghệ thuật, mặc dù rất công phu, dù đôi lúc cũng tạo ra cảm xúc có định hướng ở khán giả, nhưng nó không xuất phát từ cảm xúc cá nhân của người nghệ sĩ mà từ một ý đồ chính trị hoặc thương mại.</text:p>
      <text:p text:style-name="P8">Để kết thúc câu chuyện về sự xao xuyến, tôi chia sẻ một vài trải nghiệm cá nhân về cảm thụ nghệ thuật. Có những trải nghiệm tôi có thể diễn giả được, tất nhiên theo kiểu ngô nghê công thức hoá, có những trải nghiệm không giải thích được.</text:p>
      <text:p text:style-name="P8"><text:soft-page-break/>1. Lần hiếm hoi mà nghệ thuật tạo ra cảm xúc cao trào đến rưng rưng nước mắt là lần thăm quan phế tích Ajanta ở bờ tây Ấn độ. Đây là những bức bích hoạ rất lớn vẽ trong hang động, kể về cuộc đời cùa Đức phật. Quả thực là tôi không diễn giải được cái gì đã làm mình xúc động đến thế. Đến bây giờ, tôi vẫn muốn tìm hoạ sĩ vẽ về cuộc đời Đức phật lên tưởng nhà tôi, theo phong cách Ajanta.</text:p>
      <text:p text:style-name="P8">2. Bức tranh Annonciation của Fra Angelico đã đem đến cho tôi một cảm giác hạnh phúc vô bờ bến. Đây là một tác phẩm thời đầu phục hưng, với chủ đề tôn giáo phổ biến là Tin mừng. Tôi cảm giác bức tranh này báo một tin mừng gì đó mà đến bây giờ gần hai mươi năm sau vẫn chưa rõ là tin gì.</text:p>
      <text:p text:style-name="P8">3. Những bức tranh khổ lớn với hai mảng màu của Rothko có tác động tâm lý gần như tôn giáo. Lần cuối cùng tôi ngồi lặng gần 20’ trước hai nức tranh của Rothko trong bảo tàng Smithsonian. Giai đoạn đầu Rothko vẽ rất nhiều phong cách khác nhau, nhưng về sau ông chỉ vẽ những bức hai màu hơi giống cái khung cửa sổ. Và ông ấy nói chỉ quan tâm đến phương thức hội hoạ tạo nên cảm xúc. </text:p>
      <text:p text:style-name="P8">Có một lần tôi chụp được tấm ảnh mặt trời lặn xuống đường chân trời qua cửa sổ máy bay. Kết quả là một tấm ảnh hiện thực có gì rất giống hội hoạ trừu tượng của Rothko. Con người rất dễ xúc động trước cảnh mặt trời lặn. Phải chăng đó là cảm nhận về sự hoà hợp giữa thân phận con người và vũ trụ.</text:p>
      <text:p text:style-name="P8">4. Ở nhà chị Thi có một bức tranh rất nhỏ của anh Vũ. Bức tranh chỉ có một cái lọ thuỷ tinh dán nhãn Jus de pluie (nước mưa ép). Hai bố con tôi đều thích và cảm thấy xúc động vì lọ Nước mưa ép của anh Vũ. Tôi không rõ cảm nhận của con gái thì thế nào, nhưng với tôi, cơn mưa đồng nghĩa với kỷ niệm thời niên thiếu. </text:p>
      <text:p text:style-name="P8">Có cái lọ đựng chắt chiu kỷ niệm để uống khi khát trên con đường thiên lý cuộc đời thì tốt quá.</text:p>
      <text:p text:style-name="Text_20_body"/>
      <text:p text:style-name="P12"><text:span text:style-name="T10">Claude’s </text:span><text:span text:style-name="T23">Notes</text:span></text:p>
      <text:p text:style-name="Text_20_body"/>
      <text:p text:style-name="Text_20_body"><text:span text:style-name="Strong_20_Emphasis"><text:span text:style-name="T1">Sự xao xuyến</text:span></text:span> is rendered throughout as <text:span text:style-name="Emphasis">being moved </text:span>or <text:span text:style-name="Emphasis">the stirring </text:span>depending on context. The word describes a gentle inner trembling or emotional perturbation — neither “emotion” nor “excitement” quite captures it. I kept <text:span text:style-name="Emphasis">mouvement d’âme</text:span> in the original French where Ngô Bảo Châu uses it, since he clearly chose it deliberately. </text:p>
      <text:p text:style-name="Text_20_body"><text:span text:style-name="Strong_20_Emphasis">The Lennon lyrics</text:span> I left in English, as they appear to be quoted in English in the original (or are being cited from the original song) — translating them into Vietnamese and back would be circular.</text:p>
      <text:p text:style-name="Text_20_body"><text:span text:style-name="Strong_20_Emphasis"><text:span text:style-name="T1">Ngô nghê</text:span></text:span><text:span text:style-name="Strong_20_Emphasis"> </text:span>in <text:span text:style-name="T16">S</text:span>ection 3 is a tricky word: it can mean naive, clumsy, or artlessly sincere. His gloss — that he uses it positively, linking it to Socrates — guided me toward <text:span text:style-name="Emphasis">naively sincere </text:span>and <text:span text:style-name="Emphasis">naive </text:span>rather than something more pejorative.</text:p>
      <text:p text:style-name="Text_20_body"><text:span text:style-name="Strong_20_Emphasis">Krishnamurthy </text:span>appears to be Jiddu Krishnamurti, whose name I standardized in the English.</text:p>
      <text:p text:style-name="Text_20_body"><text:soft-page-break/>The closing image of the jar of pressed rain I kept as close as possible to the original; its quiet, slightly whimsical sadness is one of the loveliest moments in the pie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nap-to-layout-grid="false"/>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in" style:contextual-spacing="false" fo:text-align="justify" style:justify-single-word="false" fo:text-indent="0in" style:auto-text-indent="false" style:snap-to-layout-grid="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2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402in" fo:margin-bottom="0.1799in" style:contextual-spacing="false" fo:text-align="center" style:justify-single-word="false"/>
      <style:text-properties fo:color="#000000" loext:opacity="100%" fo:font-size="16pt" fo:font-weight="bold" officeooo:rsid="009bbf1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color="#666666"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4.2701in" table:align="margins" fo:background-color="transparent">
        <style:background-image/>
      </style:table-properties>
    </style:style>
    <style:style style:name="Table1.A" style:family="table-column">
      <style:table-column-properties style:column-width="1.4236in"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201in" fo:border-left="none" fo:border-right="none" fo:border-top="none" fo:border-bottom="0.05pt solid #999999"/>
    </style:style>
    <style:style style:name="MP1" style:family="paragraph" style:parent-style-name="Header">
      <style:paragraph-properties fo:text-align="start" style:justify-single-word="false"/>
      <style:text-properties fo:color="#000000" loext:opacity="100%" style:font-name="Liberation Serif" fo:font-size="11pt" fo:font-style="normal" fo:font-weight="normal" officeooo:rsid="003e21a1" officeooo:paragraph-rsid="0093c614" style:font-size-asian="11pt" style:font-style-asian="normal" style:font-weight-asian="normal" style:font-size-complex="11pt" style:font-style-complex="normal" style:font-weight-complex="normal"/>
    </style:style>
    <style:style style:name="MP2" style:family="paragraph" style:parent-style-name="Header">
      <style:paragraph-properties fo:text-align="center" style:justify-single-word="false"/>
      <style:text-properties fo:color="#000000" loext:opacity="100%" style:font-name="Liberation Serif" fo:font-size="11pt" fo:font-style="normal" fo:font-weight="normal" officeooo:rsid="01391a94" officeooo:paragraph-rsid="01391a94" style:font-size-asian="11pt" style:font-style-asian="normal" style:font-weight-asian="normal" style:font-size-complex="11pt" style:font-style-complex="normal" style:font-weight-complex="normal"/>
    </style:style>
    <style:style style:name="MP3" style:family="paragraph" style:parent-style-name="Header">
      <style:paragraph-properties fo:text-align="end" style:justify-single-word="false"/>
      <style:text-properties fo:color="#000000" loext:opacity="100%" style:font-name="Liberation Serif" fo:font-size="11pt" fo:font-style="normal" fo:font-weight="normal" style:font-size-asian="11pt" style:font-style-asian="normal" style:font-weight-asian="normal" style:font-size-complex="11pt" style:font-style-complex="normal" style:font-weight-complex="normal"/>
    </style:style>
    <style:page-layout style:name="Mpm1">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text:page-number text:select-page="current">10</text:page-number></text:p>
            </table:table-cell>
            <table:table-cell table:style-name="Table1.A1" office:value-type="string">
              <text:p text:style-name="MP2">On Being Moved</text:p>
            </table:table-cell>
            <table:table-cell table:style-name="Table1.A1" office:value-type="string">
              <text:p text:style-name="MP3"/>
            </table:table-cell>
          </table:table-row>
        </table:table>
      </style:header>
      <style:header-first>
        <text:p text:style-name="Header"/>
      </style:header-first>
    </style:master-page>
    <style:master-page style:name="Last_20_Page" style:display-name="Last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21T21:53:08.343593437</meta:creation-date>
    <dc:date>2026-06-19T20:36:46.865796040</dc:date>
    <meta:editing-duration>PT9H47M36S</meta:editing-duration>
    <meta:editing-cycles>312</meta:editing-cycles>
    <meta:generator>LibreOffice/7.3.7.2$Linux_X86_64 LibreOffice_project/30$Build-2</meta:generator>
    <meta:document-statistic meta:table-count="1" meta:image-count="0" meta:object-count="0" meta:page-count="10" meta:paragraph-count="87" meta:word-count="4695" meta:character-count="23801" meta:non-whitespace-character-count="19157"/>
  </office:meta>
</office:document-meta>
</file>